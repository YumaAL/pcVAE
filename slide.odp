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content.xml" manifest:media-type="text/xml"/>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4"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Pictures/1000000000000280000001E0855C1EFF.png" manifest:media-type="image/png"/>
  <manifest:file-entry manifest:full-path="Pictures/1000000000000280000001E00F99CF3D.png" manifest:media-type="image/png"/>
  <manifest:file-entry manifest:full-path="Pictures/1000000000000280000001E0A3DD3E8E.png" manifest:media-type="image/png"/>
  <manifest:file-entry manifest:full-path="Pictures/1000000100000681000005F817FF4C25.png" manifest:media-type="image/png"/>
  <manifest:file-entry manifest:full-path="Pictures/1000000100000280000001E0B6FC820B.png" manifest:media-type="image/png"/>
  <manifest:file-entry manifest:full-path="Pictures/1000000100000320000002589C26F1C8.png" manifest:media-type="image/png"/>
  <manifest:file-entry manifest:full-path="Pictures/100073CB00002C0E0000018F7AC2D07B.svg" manifest:media-type="image/svg+xml"/>
  <manifest:file-entry manifest:full-path="Pictures/1000000100000280000001E0926A426C.png" manifest:media-type="image/png"/>
  <manifest:file-entry manifest:full-path="Pictures/10000001000003200000025835042CBF.png" manifest:media-type="image/png"/>
  <manifest:file-entry manifest:full-path="Pictures/1000000000000280000001E0520CEBC7.png" manifest:media-type="image/png"/>
  <manifest:file-entry manifest:full-path="Pictures/10000001000000A4000000100661E3D1.png" manifest:media-type="image/png"/>
  <manifest:file-entry manifest:full-path="Pictures/1000000100000280000001E00ADDE0EA.png" manifest:media-type="image/png"/>
  <manifest:file-entry manifest:full-path="Pictures/1000000000000280000001E0A643510D.png" manifest:media-type="image/png"/>
  <manifest:file-entry manifest:full-path="Pictures/10004F3600000F55000003FED56732D6.svg" manifest:media-type="image/svg+xml"/>
  <manifest:file-entry manifest:full-path="Pictures/100000010000032000000258E050CEBB.png" manifest:media-type="image/png"/>
  <manifest:file-entry manifest:full-path="Pictures/100000010000009400000027043BCA17.png" manifest:media-type="image/png"/>
  <manifest:file-entry manifest:full-path="Pictures/1000314F0000138F000003FEDEB57DB3.svg" manifest:media-type="image/svg+xml"/>
  <manifest:file-entry manifest:full-path="Pictures/10000001000001AA0000000F1BDB9AA2.png" manifest:media-type="image/png"/>
  <manifest:file-entry manifest:full-path="Pictures/10000001000001E90000004818EEF98B.png" manifest:media-type="image/png"/>
  <manifest:file-entry manifest:full-path="Pictures/10007BDF0000361C0000041E028B9A37.svg" manifest:media-type="image/svg+xml"/>
  <manifest:file-entry manifest:full-path="Pictures/1000000100000280000001E0B06C811A.png" manifest:media-type="image/png"/>
  <manifest:file-entry manifest:full-path="Pictures/10000001000000C000000023D732FB99.png" manifest:media-type="image/png"/>
  <manifest:file-entry manifest:full-path="Pictures/100000010000011F0000000F65E56557.png" manifest:media-type="image/png"/>
  <manifest:file-entry manifest:full-path="Pictures/10000001000003200000025828627538.png" manifest:media-type="image/png"/>
  <manifest:file-entry manifest:full-path="Pictures/1000000000000280000001E0B2B706C4.png" manifest:media-type="image/png"/>
  <manifest:file-entry manifest:full-path="Pictures/10007041000013D3000003A71CECB53A.svg" manifest:media-type="image/svg+xml"/>
  <manifest:file-entry manifest:full-path="Pictures/100019F80000081B000001117C0AB55D.svg" manifest:media-type="image/svg+xml"/>
  <manifest:file-entry manifest:full-path="Pictures/1000000100000280000001E0FC2A7C01.png" manifest:media-type="image/png"/>
  <manifest:file-entry manifest:full-path="Pictures/1000000100000280000001E01C60022F.png" manifest:media-type="image/png"/>
  <manifest:file-entry manifest:full-path="Pictures/TablePreview1.svm" manifest:media-type=""/>
  <manifest:file-entry manifest:full-path="Pictures/1000000000000280000001E09E073F14.png" manifest:media-type="image/png"/>
  <manifest:file-entry manifest:full-path="Pictures/1000000100000280000001E0FFEE8F06.png" manifest:media-type="image/png"/>
  <manifest:file-entry manifest:full-path="Pictures/1000000100000280000001E07857F5CE.png" manifest:media-type="image/png"/>
  <manifest:file-entry manifest:full-path="Pictures/1000368C000010F80000019D6845E844.svg" manifest:media-type="image/svg+xml"/>
  <manifest:file-entry manifest:full-path="Pictures/100000000000108B000005BCE9DFA142.jpg" manifest:media-type="image/jpeg"/>
  <manifest:file-entry manifest:full-path="Pictures/10000001000001270000000FB19DDA25.png" manifest:media-type="image/png"/>
  <manifest:file-entry manifest:full-path="Pictures/1000000000000280000001E05D70F6AF.png" manifest:media-type="image/png"/>
  <manifest:file-entry manifest:full-path="Pictures/10000001000000BD000000271E463347.png" manifest:media-type="image/png"/>
  <manifest:file-entry manifest:full-path="Pictures/1000000100000280000001E05A1F29EC.png" manifest:media-type="image/png"/>
  <manifest:file-entry manifest:full-path="Pictures/100000010000020C000000287EA370C3.png" manifest:media-type="image/png"/>
  <manifest:file-entry manifest:full-path="Pictures/100000010000004E0000000AC2A6708F.png" manifest:media-type="image/png"/>
  <manifest:file-entry manifest:full-path="Pictures/1000768400001E880000018F523E2DFA.svg" manifest:media-type="image/svg+xml"/>
  <manifest:file-entry manifest:full-path="Pictures/1000000100000280000001E0A3414D98.png" manifest:media-type="image/png"/>
  <manifest:file-entry manifest:full-path="Pictures/1000708E00001DAF0000018F2132834D.svg" manifest:media-type="image/svg+xml"/>
  <manifest:file-entry manifest:full-path="Pictures/1000000100000354000000BDA2F6D301.png" manifest:media-type="image/png"/>
  <manifest:file-entry manifest:full-path="Pictures/10000001000003200000025879D5A484.png" manifest:media-type="image/png"/>
  <manifest:file-entry manifest:full-path="Pictures/10007D4A000032860000076CEE5E80E1.svg" manifest:media-type="image/svg+xml"/>
  <manifest:file-entry manifest:full-path="Pictures/1000000000000280000001E066F59BD3.png" manifest:media-type="image/png"/>
  <manifest:file-entry manifest:full-path="Pictures/1000000100000280000001E0D1F6C4D9.png" manifest:media-type="image/png"/>
  <manifest:file-entry manifest:full-path="Pictures/100000010000032000000258E37DEFC1.png" manifest:media-type="image/png"/>
  <manifest:file-entry manifest:full-path="Pictures/1000000100000280000001E06C02D8A7.png" manifest:media-type="image/png"/>
  <manifest:file-entry manifest:full-path="Pictures/1000000100000280000001E066921BEF.png" manifest:media-type="image/png"/>
  <manifest:file-entry manifest:full-path="Pictures/1000000100000280000001E014F0CA83.png" manifest:media-type="image/png"/>
  <manifest:file-entry manifest:full-path="Pictures/100000010000087900000780822C90CE.png" manifest:media-type="image/png"/>
  <manifest:file-entry manifest:full-path="Pictures/1000000100000280000001E08AEF0539.png" manifest:media-type="image/png"/>
  <manifest:file-entry manifest:full-path="Pictures/10000001000003C1000000C50363C0DD.png" manifest:media-type="image/png"/>
  <manifest:file-entry manifest:full-path="Pictures/1000000100000280000001E0E326FE1F.png" manifest:media-type="image/png"/>
  <manifest:file-entry manifest:full-path="Pictures/1000000100000280000001E0FD03E6E4.png" manifest:media-type="image/png"/>
  <manifest:file-entry manifest:full-path="Pictures/10000001000005B1000000C102F0FB83.png" manifest:media-type="image/png"/>
  <manifest:file-entry manifest:full-path="Pictures/TablePreview2.svm" manifest:media-type=""/>
  <manifest:file-entry manifest:full-path="Pictures/1000000000000280000001E08DE80222.png" manifest:media-type="image/png"/>
  <manifest:file-entry manifest:full-path="Pictures/1000000000000280000001E0B96F4DBE.png" manifest:media-type="image/png"/>
  <manifest:file-entry manifest:full-path="Pictures/10000001000003C1000000C573350A38.png" manifest:media-type="image/png"/>
  <manifest:file-entry manifest:full-path="Pictures/10001E710000E02C0000C670B3EDF066.pdf" manifest:media-type="application/pdf"/>
  <manifest:file-entry manifest:full-path="Pictures/1000000100000280000001E05FCAA171.png" manifest:media-type="image/png"/>
  <manifest:file-entry manifest:full-path="Pictures/1000000100000280000001E06B11C175.png" manifest:media-type="image/png"/>
  <manifest:file-entry manifest:full-path="Pictures/1000000000000280000001E00F56EEAD.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4"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4"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4"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4"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4"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4" style:family="graphic">
      <style:graphic-properties loext:decorative="false"/>
    </style:style>
    <style:style style:name="gr5" style:family="graphic" style:parent-style-name="standard">
      <style:graphic-properties draw:stroke="none" svg:stroke-color="#000000" draw:fill="none" draw:fill-color="#ffffff" draw:auto-grow-height="true" draw:auto-grow-width="false" fo:min-height="6.508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ole-draw-aspect="1" style:protect="size" loext:decorative="false"/>
    </style:style>
    <style:style style:name="gr7" style:family="graphic" style:parent-style-name="standard">
      <style:graphic-properties draw:stroke="none" svg:stroke-color="#000000" draw:fill="none" draw:fill-color="#ffffff" draw:auto-grow-height="true" draw:auto-grow-width="false" fo:min-height="2.98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auto-grow-height="true" draw:auto-grow-width="false" fo:min-height="1.80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4.11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2.3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2.392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3.56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5.88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4.156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graphic-properties draw:stroke="none" svg:stroke-color="#000000" draw:fill="none" draw:fill-color="#ffffff" draw:auto-grow-height="true" draw:auto-grow-width="false" fo:min-height="1.21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4.70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23" style:family="graphic" style:parent-style-name="standard">
      <style:graphic-properties draw:stroke="none" draw:fill="none" fo:min-height="8.05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4.744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7.684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textarea-vertical-align="top" draw:auto-grow-height="true" draw:auto-grow-width="false" fo:min-height="3.331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4.44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2.71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2.776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31" style:family="graphic" style:parent-style-name="standard">
      <style:graphic-properties draw:stroke="none" draw:fill="none" fo:min-height="0.589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0.51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34" style:family="graphic" style:parent-style-name="standard">
      <style:graphic-properties draw:stroke="none" draw:fill="none" fo:min-height="0.55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4.996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666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1.783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6.879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5.042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3.919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4.574cm" loext:decorative="false"/>
      <style:paragraph-properties style:writing-mode="lr-tb"/>
    </style:style>
    <style:style style:name="gr42" style:family="graphic" style:parent-style-name="standard">
      <style:graphic-properties draw:stroke="none" svg:stroke-color="#000000" draw:fill="none" draw:fill-color="#ffffff" draw:textarea-horizontal-align="center" draw:auto-grow-height="true" draw:auto-grow-width="false" fo:min-height="0.475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845cm"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46" style:family="graphic" style:parent-style-name="Object_20_with_20_no_20_fill_20_and_20_no_20_line">
      <style:graphic-properties draw:opacity="100%" draw:textarea-horizontal-align="center" draw:textarea-vertical-align="middle" draw:ole-draw-aspect="1" style:protect="size" loext:decorative="false"/>
    </style:style>
    <style:style style:name="gr47" style:family="graphic" style:parent-style-name="standard">
      <style:graphic-properties draw:stroke="none" svg:stroke-color="#000000" draw:fill="none" draw:fill-color="#ffffff" draw:auto-grow-height="true" draw:auto-grow-width="false" fo:min-height="3.276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7.149cm" loext:decorative="false"/>
      <style:paragraph-properties style:writing-mode="lr-tb"/>
    </style:style>
    <style:style style:name="pr1" style:family="presentation" style:parent-style-name="Default-notes">
      <style:graphic-properties draw:fill-color="#ffffff" draw:auto-grow-height="false" fo:min-height="13.365cm" loext:decorative="false"/>
      <style:paragraph-properties style:writing-mode="lr-tb"/>
    </style:style>
    <style:style style:name="co1" style:family="table-column">
      <style:table-column-properties style:column-width="1.028cm" style:use-optimal-column-width="false"/>
    </style:style>
    <style:style style:name="co2" style:family="table-column">
      <style:table-column-properties style:column-width="3.11cm" style:use-optimal-column-width="false"/>
    </style:style>
    <style:style style:name="ro1" style:family="table-row">
      <style:table-row-properties style:row-height="1.04cm" style:use-optimal-row-height="false"/>
    </style:style>
    <style:style style:name="ro2" style:family="table-row">
      <style:table-row-properties style:row-height="0.756cm" style:use-optimal-row-height="false"/>
    </style:style>
    <style:style style:name="ro3" style:family="table-row">
      <style:table-row-properties style:row-height="1.936cm" style:use-optimal-row-height="false"/>
    </style:style>
    <style:style style:name="ro4" style:family="table-row">
      <style:table-row-properties style:row-height="1.937cm" style:use-optimal-row-height="false"/>
    </style:style>
    <style:style style:name="ce1" style:family="table-cell">
      <loext:graphic-properties draw:textarea-vertical-align="middle"/>
      <style:paragraph-properties fo:text-align="center"/>
      <style:text-properties fo:font-size="14pt" style:font-size-asian="14pt" style:font-size-complex="14pt"/>
    </style:style>
    <style:style style:name="ce2"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loext:graphic-properties draw:fill="none" draw:fill-color="#ffffff"/>
      <style:text-properties fo:font-size="21pt" fo:font-weight="bold" style:font-size-asian="21pt" style:font-weight-asian="bold" style:font-size-complex="21pt" style:font-weight-complex="bold"/>
    </style:style>
    <style:style style:name="P2" style:family="paragraph">
      <loext:graphic-properties draw:fill="none"/>
      <style:paragraph-properties fo:text-align="center"/>
    </style:style>
    <style:style style:name="P3" style:family="paragraph">
      <style:paragraph-properties fo:text-align="right"/>
    </style:style>
    <style:style style:name="P4" style:family="paragraph">
      <loext:graphic-properties draw:fill="none" draw:fill-color="#ffffff"/>
      <style:paragraph-properties fo:text-align="right"/>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none" draw:fill-color="#ffffff"/>
      <style:text-properties fo:font-size="15pt" fo:font-weight="bold" style:font-size-asian="15pt" style:font-weight-asian="bold" style:font-size-complex="15pt" style:font-weight-complex="bold"/>
    </style:style>
    <style:style style:name="P9" style:family="paragraph">
      <loext:graphic-properties draw:fill="none" draw:fill-color="#ffffff"/>
      <style:text-properties fo:font-weight="normal" style:font-weight-asian="normal" style:font-weight-complex="normal"/>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style:font-size-asian="14pt" style:font-size-complex="14pt"/>
    </style:style>
    <style:style style:name="P12" style:family="paragraph">
      <loext:graphic-properties draw:fill="none"/>
      <style:text-properties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style:paragraph-properties fo:text-align="left"/>
    </style:style>
    <style:style style:name="P15" style:family="paragraph">
      <loext:graphic-properties draw:fill="none" draw:fill-color="#ffffff"/>
      <style:paragraph-properties fo:text-align="left"/>
      <style:text-properties fo:font-weight="bold" style:font-weight-asian="bold" style:font-weight-complex="bold"/>
    </style:style>
    <style:style style:name="P16" style:family="paragraph">
      <loext:graphic-properties draw:fill="none" draw:fill-color="#ffffff"/>
      <style:paragraph-properties fo:text-align="right"/>
      <style:text-properties fo:font-size="15pt" fo:font-weight="bold" style:font-size-asian="15pt" style:font-weight-asian="bold" style:font-size-complex="15pt" style:font-weight-complex="bold"/>
    </style:style>
    <style:style style:name="P17" style:family="paragraph">
      <loext:graphic-properties draw:fill="none"/>
      <style:text-properties fo:font-weight="bold" style:font-weight-asian="bold" style:font-weight-complex="bold"/>
    </style:style>
    <style:style style:name="P18" style:family="paragraph">
      <loext:graphic-properties draw:fill="none" draw:fill-color="#ffffff"/>
      <style:text-properties fo:font-size="12pt" fo:font-weight="bold" style:font-size-asian="12pt" style:font-size-complex="12pt"/>
    </style:style>
    <style:style style:name="P19" style:family="paragraph">
      <loext:graphic-properties draw:fill="none"/>
    </style:style>
    <style:style style:name="P20" style:family="paragraph">
      <loext:graphic-properties draw:fill="none" draw:fill-color="#ffffff"/>
    </style:style>
    <style:style style:name="P21" style:family="paragraph">
      <loext:graphic-properties draw:fill="none" draw:fill-color="#ffffff"/>
      <style:paragraph-properties fo:text-align="right"/>
      <style:text-properties fo:font-size="21pt" fo:font-weight="bold" style:font-size-asian="21pt" style:font-weight-asian="bold" style:font-size-complex="21pt" style:font-weight-complex="bold"/>
    </style:style>
    <style:style style:name="P22" style:family="paragraph">
      <style:paragraph-properties fo:text-align="center"/>
      <style:text-properties fo:font-size="14pt" fo:font-weight="bold" style:font-size-asian="14pt" style:font-weight-asian="bold" style:font-size-complex="14pt" style:font-weight-complex="bold"/>
    </style:style>
    <style:style style:name="P23" style:family="paragraph">
      <style:paragraph-properties fo:text-align="center"/>
      <style:text-properties fo:font-weight="bold" style:font-size-asian="14pt" style:font-weight-asian="bold" style:font-size-complex="14pt" style:font-weight-complex="bold"/>
    </style:style>
    <style:style style:name="P24" style:family="paragraph">
      <loext:graphic-properties draw:fill="none" draw:fill-color="#ffffff"/>
      <style:text-properties style:text-underline-style="solid" style:text-underline-width="auto" style:text-underline-color="font-color"/>
    </style:style>
    <style:style style:name="P25" style:family="paragraph">
      <loext:graphic-properties draw:fill="none" draw:fill-color="#ffffff"/>
      <style:text-properties fo:font-size="12pt"/>
    </style:style>
    <style:style style:name="P26" style:family="paragraph">
      <loext:graphic-properties draw:fill="none" draw:fill-color="#ffffff"/>
      <style:text-properties fo:font-style="normal" style:text-underline-style="solid" style:text-underline-width="auto" style:text-underline-color="font-color" style:font-style-asian="normal" style:font-style-complex="normal"/>
    </style:style>
    <style:style style:name="P27" style:family="paragraph">
      <loext:graphic-properties draw:fill="none" draw:fill-color="#ffffff"/>
      <style:paragraph-properties fo:text-align="left"/>
      <style:text-properties fo:font-size="12pt" style:text-underline-style="solid" style:text-underline-width="auto" style:text-underline-color="font-color" style:font-size-asian="12pt" style:font-size-complex="12pt"/>
    </style:style>
    <style:style style:name="P28" style:family="paragraph">
      <loext:graphic-properties draw:fill="none"/>
      <style:paragraph-properties fo:text-align="center"/>
      <style:text-properties fo:font-size="15pt"/>
    </style:style>
    <style:style style:name="P29" style:family="paragraph">
      <loext:graphic-properties draw:fill="none" draw:fill-color="#ffffff"/>
      <style:paragraph-properties fo:text-align="center"/>
      <style:text-properties fo:font-weight="bold" style:font-weight-asian="bold" style:font-weight-complex="bold"/>
    </style:style>
    <style:style style:name="P30" style:family="paragraph">
      <loext:graphic-properties draw:fill="none" draw:fill-color="#ffffff"/>
      <style:text-properties fo:font-size="20pt" fo:font-weight="bold" style:font-size-asian="20pt" style:font-weight-asian="bold" style:font-size-complex="20pt" style:font-weight-complex="bold"/>
    </style:style>
    <style:style style:name="P31" style:family="paragraph">
      <loext:graphic-properties draw:fill="none" draw:opacity="100%"/>
      <style:paragraph-properties fo:text-align="center"/>
    </style:style>
    <style:style style:name="P32" style:family="paragraph">
      <loext:graphic-properties draw:opacity="100%"/>
      <style:paragraph-properties fo:text-align="center"/>
    </style:style>
    <style:style style:name="P33" style:family="paragraph">
      <loext:graphic-properties draw:fill="none" draw:fill-color="#ffffff"/>
      <style:paragraph-properties fo:text-align="right"/>
      <style:text-properties fo:font-size="12pt" fo:font-weight="bold" style:font-size-asian="12pt" style:font-weight-asian="bold" style:font-size-complex="12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style:font-size-asian="12pt" style:font-size-complex="12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 style:family="text">
      <style:text-properties fo:font-size="15pt" style:font-size-asian="15pt" style:font-size-complex="15pt"/>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3" style:family="text">
      <style:text-properties fo:font-size="14pt" style:font-size-asian="14pt" style:font-size-complex="14pt"/>
    </style:style>
    <style:style style:name="T14" style:family="text">
      <style:text-properties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9" style:family="text">
      <style:text-properties fo:font-size="14pt" style:text-underline-style="none" fo:font-weight="normal" style:font-size-asian="14pt" style:font-weight-asian="normal" style:font-size-complex="14pt" style:font-weight-complex="normal"/>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fo:font-size="14pt" fo:font-style="normal" fo:font-weight="bold" style:font-size-asian="14pt" style:font-style-asian="normal" style:font-weight-asian="bold" style:font-size-complex="14pt" style:font-style-complex="normal" style:font-weight-complex="bold"/>
    </style:style>
    <style:style style:name="T25" style:family="text">
      <style:text-properties fo:font-size="12pt" fo:font-weight="bold" style:font-size-asian="12pt" style:font-size-complex="12pt"/>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7" style:family="text">
      <style:text-properties fo:font-size="14pt" style:text-underline-style="solid" style:text-underline-width="auto" style:text-underline-color="font-color" style:font-size-asian="14pt" style:font-size-complex="14pt"/>
    </style:style>
    <style:style style:name="T28" style:family="text">
      <style:text-properties fo:font-size="14pt" fo:font-style="normal" style:text-underline-style="none" style:font-size-asian="14pt" style:font-style-asian="normal" style:font-size-complex="14pt" style:font-style-complex="normal"/>
    </style:style>
    <style:style style:name="T29" style:family="text">
      <style:text-properties fo:font-size="12pt"/>
    </style:style>
    <style:style style:name="T3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31" style:family="text">
      <style:text-properties fo:font-size="12pt" style:text-underline-style="solid" style:text-underline-width="auto" style:text-underline-color="font-color" style:font-size-asian="12pt" style:font-size-complex="12pt"/>
    </style:style>
    <style:style style:name="T3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style:font-size-asian="12pt" style:font-style-asian="normal" style:font-size-complex="12pt" style:font-style-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font-size="11pt" fo:font-style="normal" fo:font-weight="bold" style:font-size-asian="11pt" style:font-style-asian="normal" style:font-weight-asian="bold" style:font-size-complex="11pt" style:font-style-complex="normal" style:font-weight-complex="bold"/>
    </style:style>
    <style:style style:name="T41" style:family="text">
      <style:text-properties fo:font-size="15pt" style:text-underline-style="none"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962cm">
          <draw:image xlink:href="Pictures/100000000000108B000005BCE9DFA142.jpg" xlink:type="simple" xlink:show="embed" xlink:actuate="onLoad" draw:mime-type="image/jpeg">
            <text:p/>
          </draw:image>
        </draw:frame>
        <draw:frame draw:style-name="gr3" draw:text-style-name="P4" draw:layer="layout" svg:width="5.193cm" svg:height="0.725cm" svg:x="22.072cm" svg:y="5.741cm">
          <draw:text-box>
            <text:p text:style-name="P3"><text:span text:style-name="T2">Schoulepnikoff2025</text:span></text:p>
          </draw:text-box>
        </draw:frame>
        <draw:g draw:style-name="gr4">
          <draw:frame draw:style-name="gr5" draw:text-style-name="P5" draw:layer="layout" svg:width="12.887cm" svg:height="6.758cm" svg:x="1.152cm" svg:y="3.694cm">
            <draw:text-box>
              <text:p><text:span text:style-name="T3">Generative model – Decoder pθ(x)</text:span></text:p>
              <text:p><text:span text:style-name="T4">Aim</text:span><text:span text:style-name="T5">: optimize parameter θ to well approximate the true probabilistic distribution p(x)~</text:span><text:span text:style-name="T6">pθ(x), namely</text:span><text:span text:style-name="T7"> </text:span><text:span text:style-name="T4">maximize</text:span><text:span text:style-name="T5"> </text:span><text:span text:style-name="T4">the logarithmic evidence</text:span><text:span text:style-name="T5"> log[</text:span><text:span text:style-name="T6">pθ(x)]</text:span></text:p>
              <text:p><text:span text:style-name="T6"/></text:p>
              <text:p><text:span text:style-name="T7">Latent variable z</text:span></text:p>
              <text:p><text:span text:style-name="T6">To represent more complex distribution, we introduce the latent variable z</text:span></text:p>
              <text:p><text:span text:style-name="T6"/></text:p>
              <text:p><text:span text:style-name="T6"/></text:p>
              <text:p><text:span text:style-name="T6">However, this integral is in general intractable.</text:span></text:p>
            </draw:text-box>
          </draw:frame>
          <draw:frame draw:style-name="gr6" draw:text-style-name="P6" draw:layer="layout" svg:width="3.56cm" svg:height="0.907cm" svg:x="4.582cm" svg:y="8.688cm">
            <draw:object xlink:href="./Object 12" xlink:type="simple" xlink:show="embed" xlink:actuate="onLoad">
              <loext:p/>
            </draw:object>
            <draw:image xlink:href="./ObjectReplacements/Object 12" xlink:type="simple" xlink:show="embed" xlink:actuate="onLoad"/>
          </draw:frame>
        </draw:g>
        <draw:frame draw:style-name="gr7" draw:text-style-name="P5" draw:layer="layout" svg:width="12.273cm" svg:height="3.23cm" svg:x="13.574cm" svg:y="11.313cm">
          <draw:text-box>
            <text:p><text:span text:style-name="T8">Interference model </text:span><text:span text:style-name="T3">– Encoder qφ(x)</text:span></text:p>
            <text:p><text:span text:style-name="T7">Aim</text:span><text:span text:style-name="T6">: optimize parameter φ to approximate the posterior probability pθ(z|x) (how to map data into latent space), qφ(x)~pθ(z|x)</text:span></text:p>
            <text:p><text:span text:style-name="T6"/></text:p>
          </draw:text-box>
        </draw:fram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9" draw:text-style-name="P5" draw:layer="layout" svg:width="13.181cm" svg:height="2.054cm" svg:x="0cm" svg:y="1.643cm">
          <draw:text-box>
            <text:p><text:span text:style-name="T3">Optimizing parameters</text:span></text:p>
            <text:p><text:span text:style-name="T9">Using Jensen's inequality, the logarithmic evidence can be written as follow,</text:span></text:p>
          </draw:text-box>
        </draw:frame>
        <draw:frame draw:style-name="gr10" draw:text-style-name="P5" draw:layer="layout" svg:width="27.56cm" svg:height="2.015cm" svg:x="0.124cm" svg:y="5.953cm">
          <draw:text-box>
            <text:p><text:span text:style-name="T9">As the KL divergence takes non-negative values, the logarithmic evidence (l.h.s) is greater than the first term of r.h.s. This term is called</text:span><text:span text:style-name="T7"> the evidence lower bound (ELBO)</text:span><text:span text:style-name="T6">, and we can use the ELBO as the target function to maximize, instead of the evidence itself, which is intractable. Therefore, the cost function of VAE reads,</text:span></text:p>
          </draw:text-box>
        </draw:frame>
        <draw:frame draw:style-name="gr2" draw:text-style-name="P2" draw:layer="layout" svg:width="9.855cm" svg:height="1.814cm" svg:x="1.261cm" svg:y="3.821cm">
          <draw:image xlink:href="Pictures/10007041000013D3000003A71CECB53A.svg" xlink:type="simple" xlink:show="embed" xlink:actuate="onLoad" draw:mime-type="image/svg+xml">
            <text:p/>
          </draw:image>
          <draw:image xlink:href="Pictures/10000001000000C000000023D732FB99.png" xlink:type="simple" xlink:show="embed" xlink:actuate="onLoad" draw:mime-type="image/png"/>
        </draw:frame>
        <draw:frame draw:style-name="gr2" draw:text-style-name="P2" draw:layer="layout" svg:width="19.649cm" svg:height="1.029cm" svg:x="4.164cm" svg:y="8.4cm">
          <draw:image xlink:href="Pictures/1000708E00001DAF0000018F2132834D.svg" xlink:type="simple" xlink:show="embed" xlink:actuate="onLoad" draw:mime-type="image/svg+xml">
            <text:p/>
          </draw:image>
          <draw:image xlink:href="Pictures/100000010000011F0000000F65E56557.png" xlink:type="simple" xlink:show="embed" xlink:actuate="onLoad" draw:mime-type="image/png"/>
        </draw:frame>
        <draw:frame draw:style-name="gr11" draw:text-style-name="P5" draw:layer="layout" svg:width="27.56cm" svg:height="4.367cm" svg:x="0.247cm" svg:y="12.306cm">
          <draw:text-box>
            <text:p><text:span text:style-name="T7">Reparametrization trick</text:span></text:p>
            <text:p><text:span text:style-name="T9">To optimize the parameters, we calculate the gradient of ELBO with the parameters θ and φ. However, random sampling itself depends on the parameter φ, and the back propagation won’t reach encoder as the gradient is not differentiable.</text:span></text:p>
            <text:p><text:span text:style-name="T9">Reparameterization trick enables to avoid this issue by rewriting random sampling as the deterministic calculation for a fixed distribution. Namely, let μ and σ^2 as predicted mean and variance, and denote the standard normal distribution as ε, the random sampling can be written as</text:span></text:p>
          </draw:text-box>
        </draw:frame>
        <draw:frame draw:style-name="gr12" draw:text-style-name="P5" draw:layer="layout" svg:width="22.049cm" svg:height="2.603cm" svg:x="2.794cm" svg:y="9.85cm">
          <draw:text-box>
            <text:list text:style-name="L1">
              <text:list-item>
                <text:p><text:span text:style-name="T7">First term</text:span><text:span text:style-name="T9">: Reconstruction error</text:span></text:p>
              </text:list-item>
              <text:list-item>
                <text:p><text:span text:style-name="T7">Second term</text:span><text:span text:style-name="T6">: The distance between the posterior distribution predicted by encoder and priori distribution. Regularization term to make the resulting distribution into the desired form.</text:span></text:p>
              </text:list-item>
            </text:list>
          </draw:text-box>
        </draw:frame>
        <draw:frame draw:style-name="gr2" draw:text-style-name="P2" draw:layer="layout" svg:width="5.147cm" svg:height="0.675cm" svg:x="9.228cm" svg:y="17.523cm">
          <draw:image xlink:href="Pictures/100019F80000081B000001117C0AB55D.svg" xlink:type="simple" xlink:show="embed" xlink:actuate="onLoad" draw:mime-type="image/svg+xml">
            <text:p/>
          </draw:image>
          <draw:image xlink:href="Pictures/100000010000004E0000000AC2A6708F.png" xlink:type="simple" xlink:show="embed" xlink:actuate="onLoad" draw:mime-type="image/png"/>
        </draw:frame>
        <presentation:notes draw:style-name="dp2">
          <draw:page-thumbnail draw:style-name="gr8"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3" draw:text-style-name="P5" draw:layer="layout" svg:width="13.181cm" svg:height="2.642cm" svg:x="0cm" svg:y="1.643cm">
          <draw:text-box>
            <text:p><text:span text:style-name="T3">β-VAE</text:span></text:p>
            <text:p><text:span text:style-name="T9">One can introduce the additional coefficient β for KL divergence term to adjust how strongly enforce the regularization. The ELBO reads,</text:span></text:p>
          </draw:text-box>
        </draw:frame>
        <draw:frame draw:style-name="gr2" draw:text-style-name="P2" draw:layer="layout" svg:width="15.925cm" svg:height="0.811cm" svg:x="0.601cm" svg:y="4.432cm">
          <draw:image xlink:href="Pictures/1000768400001E880000018F523E2DFA.svg" xlink:type="simple" xlink:show="embed" xlink:actuate="onLoad" draw:mime-type="image/svg+xml">
            <text:p/>
          </draw:image>
          <draw:image xlink:href="Pictures/10000001000001270000000FB19DDA25.png" xlink:type="simple" xlink:show="embed" xlink:actuate="onLoad" draw:mime-type="image/png"/>
        </draw:frame>
        <draw:frame draw:style-name="gr14" draw:text-style-name="P5" draw:layer="layout" svg:width="27.537cm" svg:height="3.818cm" svg:x="0.2cm" svg:y="6.396cm">
          <draw:text-box>
            <text:p><text:span text:style-name="T3">TC-VAE (Total Correlation VAE)</text:span></text:p>
            <text:p><text:span text:style-name="T9">In the βVAE, the reconstruction error and the regularization terms are trading off, either increasing the generality and losing the reconstruction precision, or keep the precision and lose the generality.</text:span></text:p>
            <text:p><text:span text:style-name="T9">To evade this drawback, Chen introduced the so-called the total correlation (TC) VAE in 2018, enabling to separate the regularization term into three terms and optimize each weight.</text:span></text:p>
            <text:p><text:span text:style-name="T9">The KL divergence term can be decomposed as follow: <text:s/></text:span></text:p>
          </draw:text-box>
        </draw:frame>
        <draw:frame draw:style-name="gr2" draw:text-style-name="P2" draw:layer="layout" svg:width="25.315cm" svg:height="3.717cm" svg:x="1.348cm" svg:y="10.388cm">
          <draw:image xlink:href="Pictures/10007D4A000032860000076CEE5E80E1.svg" xlink:type="simple" xlink:show="embed" xlink:actuate="onLoad" draw:mime-type="image/svg+xml">
            <text:p/>
          </draw:image>
          <draw:image xlink:href="Pictures/10000001000001E90000004818EEF98B.png" xlink:type="simple" xlink:show="embed" xlink:actuate="onLoad" draw:mime-type="image/png"/>
        </draw:frame>
        <draw:frame draw:style-name="gr15" draw:text-style-name="P8" draw:layer="layout" svg:width="27.537cm" svg:height="6.131cm" svg:x="0.177cm" svg:y="14.652cm">
          <draw:text-box>
            <text:list text:style-name="L1">
              <text:list-item>
                <text:p><text:span text:style-name="T7">MI: Index-core mutual information</text:span></text:p>
                <text:p><text:span text:style-name="T9">Mutual information between latent variable z and the data x. Indicates how much information regarding the specific input x the latent variable z has. Important for recovering information.</text:span></text:p>
              </text:list-item>
              <text:list-item>
                <text:p><text:span text:style-name="T10">TC: Total correlation</text:span></text:p>
                <text:p><text:span text:style-name="T6">The distance between the entire latent variable distribution and the distribution under the assumption of the independence of each latent variable z. The larger value indicates the latent variables are strongly entangles each other. Imposing the big penalty leads </text:span><text:span text:style-name="T11">disentangle</text:span><text:span text:style-name="T12"> of latent variables.</text:span></text:p>
              </text:list-item>
              <text:list-item>
                <text:p><text:span text:style-name="T7">dwKL: dimension-wise KL</text:span></text:p>
                <text:p><text:span text:style-name="T6">How close the joint distribution of each latent variable to priori distribution. Important to enforcing the distribution form (to normal distribution in general).</text:span></text:p>
              </text:list-item>
            </text:list>
          </draw:text-box>
        </draw:frame>
        <presentation:notes draw:style-name="dp2">
          <draw:page-thumbnail draw:style-name="gr8"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6" draw:text-style-name="P5" draw:layer="layout" svg:width="13.181cm" svg:height="4.406cm" svg:x="0cm" svg:y="1.643cm">
          <draw:text-box>
            <text:p><text:span text:style-name="T3">Conditional Probabilistic Decoder</text:span></text:p>
            <text:p><text:span text:style-name="T9">Schoulepnikoff2025 proposed to enable the decoder to generate the spin distribution with the conditional probability. To this end, they embed the autoregressive neural network (ARNN) into the decider part, which generate the spin configuration with the 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BO for the cpVAE</text:span></text:p>
            <text:p><text:span text:style-name="T9">Assuming outcome x can be -1 or 1, the probabilistic mass function can be rewritten using the Bernoulli distribution,</text:span></text:p>
          </draw:text-box>
        </draw:frame>
        <draw:frame draw:style-name="gr2" draw:text-style-name="P2" draw:layer="layout" svg:width="9.106cm" svg:height="0.864cm" svg:x="6.133cm" svg:y="10.679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17" draw:text-style-name="P9" draw:layer="layout" svg:width="27.095cm" svg:height="0.839cm" svg:x="0.345cm" svg:y="12.125cm">
          <draw:text-box>
            <text:p><text:span text:style-name="T6">Therefore, the ELBO for the cpVAE reads,</text:span></text:p>
          </draw:text-box>
        </draw:frame>
        <draw:frame draw:style-name="gr2" draw:text-style-name="P2" draw:layer="layout" svg:width="20.911cm" svg:height="0.738cm" svg:x="2.74cm" svg:y="13.327cm">
          <draw:image xlink:href="Pictures/100073CB00002C0E0000018F7AC2D07B.svg" xlink:type="simple" xlink:show="embed" xlink:actuate="onLoad" draw:mime-type="image/svg+xml">
            <text:p/>
          </draw:image>
          <draw:image xlink:href="Pictures/10000001000001AA0000000F1BDB9AA2.png" xlink:type="simple" xlink:show="embed" xlink:actuate="onLoad" draw:mime-type="image/png"/>
        </draw:frame>
        <draw:frame draw:style-name="gr18" draw:text-style-name="P9" draw:layer="layout" svg:width="27.095cm" svg:height="1.427cm" svg:x="0.346cm" svg:y="14.626cm">
          <draw:text-box>
            <text:p><text:span text:style-name="T6">They demonstrate the cpVAE with the models which consider only two states for each lattice site. To use cpVAE, one needs to extend this formula to the categorical distribution.</text:span></text:p>
          </draw:text-box>
        </draw:frame>
        <presentation:notes draw:style-name="dp2">
          <draw:page-thumbnail draw:style-name="gr8"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6" draw:text-style-name="P5" draw:layer="layout" svg:width="13.181cm" svg:height="4.406cm" svg:x="0cm" svg:y="1.643cm">
          <draw:text-box>
            <text:p><text:span text:style-name="T3">Conditional Probabilistic Decoder</text:span></text:p>
            <text:p><text:span text:style-name="T9">Schoulepnikoff2025 proposed to enable the decoder to generate the spin distribution with the conditional probability. To this end, they embed the autoregressive neural network (ARNN) into the decoder part, which generate the spin configuration with the 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BO for the cpVAE with more than three local Hilbert space</text:span></text:p>
            <text:p><text:span text:style-name="T9">Assume outcome x can be K categories, the probabilistic mass function can be rewritten using the categorical distribution in the one-hot encoding manner.</text:span></text:p>
          </draw:text-box>
        </draw:frame>
        <draw:frame draw:style-name="gr19" draw:layer="layout" svg:width="4.111cm" svg:height="4.159cm" svg:x="1.182cm" svg:y="10.916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10"><text:span text:style-name="T13">x1</text:span></text:p>
              </table:table-cell>
              <table:table-cell>
                <text:p text:style-name="P10"><text:span text:style-name="T13">x2</text:span></text:p>
              </table:table-cell>
              <table:table-cell>
                <text:p text:style-name="P10"><text:span text:style-name="T13">...</text:span></text:p>
              </table:table-cell>
              <table:table-cell>
                <text:p text:style-name="P10"><text:span text:style-name="T13">xK</text:span></text:p>
              </table:table-cell>
            </table:table-row>
            <table:table-row table:style-name="ro1" table:default-cell-style-name="ce1">
              <table:table-cell>
                <text:p text:style-name="P11"><text:span text:style-name="T13">1</text:span></text:p>
              </table:table-cell>
              <table:table-cell>
                <text:p text:style-name="P10"><text:span text:style-name="T13">0</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1</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0</text:span></text:p>
              </table:table-cell>
              <table:table-cell>
                <text:p text:style-name="P10"><text:span text:style-name="T13">...</text:span></text:p>
              </table:table-cell>
              <table:table-cell>
                <text:p text:style-name="P10"><text:span text:style-name="T13">1</text:span></text:p>
              </table:table-cell>
            </table:table-row>
          </table:table>
          <draw:image xlink:href="Pictures/TablePreview1.svm" xlink:type="simple" xlink:show="embed" xlink:actuate="onLoad"/>
        </draw:frame>
        <draw:frame draw:style-name="gr17" draw:text-style-name="P5" draw:layer="layout" svg:width="20.921cm" svg:height="0.839cm" svg:x="6.322cm" svg:y="10.679cm">
          <draw:text-box>
            <text:p><text:span text:style-name="T9">In this case, the probabilistic mass function is given as:</text:span></text:p>
          </draw:text-box>
        </draw:frame>
        <draw:frame draw:style-name="gr2" draw:text-style-name="P2" draw:layer="layout" svg:width="6.714cm" svg:height="1.747cm" svg:x="19.792cm" svg:y="10.23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17" draw:text-style-name="P5" draw:layer="layout" svg:width="20.921cm" svg:height="0.839cm" svg:x="6.348cm" svg:y="11.697cm">
          <draw:text-box>
            <text:p><text:span text:style-name="T9">Therefore, the reconstruction loss is given as:</text:span></text:p>
          </draw:text-box>
        </draw:frame>
        <draw:frame draw:style-name="gr2" draw:text-style-name="P2" draw:layer="layout" svg:width="20.139cm" svg:height="1.531cm" svg:x="7.21cm" svg:y="12.936cm">
          <draw:image xlink:href="Pictures/10007BDF0000361C0000041E028B9A37.svg" xlink:type="simple" xlink:show="embed" xlink:actuate="onLoad" draw:mime-type="image/svg+xml">
            <text:p/>
          </draw:image>
          <draw:image xlink:href="Pictures/100000010000020C000000287EA370C3.png" xlink:type="simple" xlink:show="embed" xlink:actuate="onLoad" draw:mime-type="image/png"/>
        </draw:frame>
        <draw:frame draw:style-name="gr18" draw:text-style-name="P5" draw:layer="layout" svg:width="26.529cm" svg:height="1.427cm" svg:x="0.616cm" svg:y="15.715cm">
          <draw:text-box>
            <text:p><text:span text:style-name="T9">Maximizing the log likelihood is equivalent to minimizing the cross-entropy (CE). Therefore, we use the CE as the reconstruction error.</text:span></text:p>
          </draw:text-box>
        </draw:frame>
        <presentation:notes draw:style-name="dp2">
          <draw:page-thumbnail draw:style-name="gr8"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0" draw:text-style-name="P5" draw:layer="layout" svg:width="27.684cm" svg:height="1.466cm" svg:x="0.1cm" svg:y="12.143cm">
          <draw:text-box>
            <text:p><text:span text:style-name="T3">Benchmark for generalized reconstruction error</text:span></text:p>
            <text:p><text:span text:style-name="T9">Compare the reconstruction error in the previous paper (Schoulepnikoff2025) and the generalized code.</text:span></text:p>
          </draw:text-box>
        </draw:frame>
        <draw:frame draw:style-name="gr2" draw:text-style-name="P2" draw:layer="layout" svg:width="6.714cm" svg:height="1.747cm" svg:x="1.369cm" svg:y="18.927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21" draw:text-style-name="P5" draw:layer="layout" svg:width="21.878cm" svg:height="4.955cm" svg:x="0.417cm" svg:y="13.834cm">
          <draw:text-box>
            <text:p><text:span text:style-name="T7">Condition:</text:span></text:p>
            <text:p><text:span text:style-name="T6">Model: NNN-TFIM (N=20)</text:span></text:p>
            <text:p><text:span text:style-name="T9">Input data: 1 sample generated from wave function obtained through ED </text:span></text:p>
            <text:p><text:span text:style-name="T9">Models (different reconstruction error): </text:span></text:p>
            <text:p><text:span text:style-name="T9">- Schoulepnikoff2025</text:span></text:p>
            <text:p><text:span text:style-name="T9"/></text:p>
            <text:p><text:span text:style-name="T9"/></text:p>
            <text:p><text:span text:style-name="T9">- generalized</text:span></text:p>
          </draw:text-box>
        </draw:frame>
        <draw:frame draw:style-name="gr2" draw:text-style-name="P2" draw:layer="layout" svg:width="6.999cm" svg:height="0.664cm" svg:x="1.356cm" svg:y="17.225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6" draw:text-style-name="P6" draw:layer="layout" svg:width="9.882cm" svg:height="0.757cm" svg:x="12.593cm" svg:y="18.251cm">
          <draw:object xlink:href="./Object 14" xlink:type="simple" xlink:show="embed" xlink:actuate="onLoad">
            <loext:p/>
          </draw:object>
          <draw:image xlink:href="./ObjectReplacements/Object 14" xlink:type="simple" xlink:show="embed" xlink:actuate="onLoad"/>
        </draw:frame>
        <draw:frame draw:style-name="gr6" draw:text-style-name="P6" draw:layer="layout" svg:width="8.621cm" svg:height="0.757cm" svg:x="13.916cm" svg:y="19.575cm">
          <draw:object xlink:href="./Object 19" xlink:type="simple" xlink:show="embed" xlink:actuate="onLoad">
            <loext:p/>
          </draw:object>
          <draw:image xlink:href="./ObjectReplacements/Object 19" xlink:type="simple" xlink:show="embed" xlink:actuate="onLoad"/>
        </draw:frame>
        <draw:frame draw:style-name="gr22" draw:text-style-name="P5" draw:layer="layout" svg:width="27.684cm" svg:height="0.878cm" svg:x="0.1cm" svg:y="1.343cm">
          <draw:text-box>
            <text:p><text:span text:style-name="T3">Code for generalized reconstruction error</text:span></text:p>
          </draw:text-box>
        </draw:frame>
        <draw:frame draw:style-name="gr23" draw:text-style-name="P12" draw:layer="layout" svg:width="27.255cm" svg:height="8.309cm" svg:x="0.502cm" svg:y="2.442cm">
          <draw:text-box>
            <text:p><text:span text:style-name="T2">Consider $N=4$ system and the spin configuration is $s = [-1,1,-1,1]$. For encoding, one needs to map the spin configuration in to positive indices, such as $-1\rightarrow 0$ and $+1\rightarrow 1$. The mapped configuration is $s_{\text{map}} = [0,1,0,1]$. Using one_hot() function, it will return $N\times K$ array, which contains</text:span></text:p>
            <text:p/>
            <text:p><text:span text:style-name="T2">one_hot($s_{\text{map}}$, $K=2$)</text:span></text:p>
            <text:p><text:span text:style-name="T2">$$\rightarrow [[x_{i=1,k=1}, x_{i=1,k=2}], [x_{i=2,k=1}, x_{i=2,k=2}], [x_{i=3,k=1}, x_{i=3,k=2}], [x_{i=4,k=1}, x_{i=4,k=2}]] = [[1,0],[0.1],[1,0],[0,1]]$$</text:span></text:p>
            <text:p/>
            <text:p><text:span text:style-name="T2">Obtraining the same array structure of logrithmic probability, such as,</text:span></text:p>
            <text:p/>
            <text:p><text:span text:style-name="T2">$\log p$</text:span></text:p>
            <text:p><text:span text:style-name="T2">$$\rightarrow [[\log p(x_{i=1,k=1}), \log p(x_{i=1,k=2})], [\log p(x_{i=2,k=1}), \log p(x_{i=2,k=2})], [\log p(x_{i=3,k=1}), \log p(x_{i=3,k=2})], [\log p(x_{i=4,k=1}), \log p(x_{i=4,k=2})]]$$</text:span></text:p>
            <text:p/>
            <text:p><text:span text:style-name="T2">we can calculate the reconstruction error simply one_hot($s_{\text{map}}$, $K=2$)*$\log p$</text:span></text:p>
          </draw:text-box>
        </draw:frame>
        <presentation:notes draw:style-name="dp2">
          <draw:page-thumbnail draw:style-name="gr8"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7.81cm" svg:height="0.962cm" svg:x="0.072cm" svg:y="0.123cm">
          <draw:text-box>
            <text:p><text:span text:style-name="T1">dVAE for Spin-1 system</text:span></text:p>
          </draw:text-box>
        </draw:frame>
        <draw:frame draw:style-name="gr24" draw:text-style-name="P5" draw:layer="layout" svg:width="27.684cm" svg:height="4.994cm" svg:x="0.1cm" svg:y="1.343cm">
          <draw:text-box>
            <text:p><text:span text:style-name="T3">Code from previous paper (for spin-1/2)</text:span></text:p>
            <text:list text:style-name="L1">
              <text:list-item>
                <text:p><text:span text:style-name="T6">Input: sampling from wave function (Nsample, N)</text:span></text:p>
              </text:list-item>
              <text:list-item>
                <text:p><text:span text:style-name="T6">Encoder → μ, σ → (reparameterization trick) z</text:span></text:p>
              </text:list-item>
              <text:list-item>
                <text:p><text:span text:style-name="T6">z → decoder → probabilities (Nsample, N), which shows the probability 0 to 1 (1→ +1, 0→ -1)</text:span></text:p>
              </text:list-item>
              <text:list-item>
                <text:p><text:span text:style-name="T6">Jax.random.Bernoulli() → get samples generated from the probability predicted by the decoder</text:span></text:p>
              </text:list-item>
            </text:list>
            <text:p><text:span text:style-name="T6"/></text:p>
            <text:p><text:span text:style-name="T6">This architecture works for only the system with 2 states as the state is either +1 (p=1) or -1 (p=0)</text:span></text:p>
            <text:p><text:span text:style-name="T6">For K&gt;2 cases, we need to output from decoder the probability for each z-axis spin.</text:span></text:p>
          </draw:text-box>
        </draw:frame>
        <draw:frame draw:style-name="gr25" draw:text-style-name="P5" draw:layer="layout" svg:width="27.684cm" svg:height="7.934cm" svg:x="0.1cm" svg:y="8.043cm">
          <draw:text-box>
            <text:p><text:span text:style-name="T3">Code for spin-1</text:span></text:p>
            <text:list text:style-name="L1">
              <text:list-item>
                <text:p><text:span text:style-name="T6">Input: sampling from wave function (Nsample, N)</text:span></text:p>
              </text:list-item>
              <text:list-item>
                <text:p><text:span text:style-name="T6">Encoder → μ, σ → (reparameterization trick) z</text:span></text:p>
              </text:list-item>
            </text:list>
            <text:p><text:span text:style-name="T6"/></text:p>
            <text:p><text:span text:style-name="T6">change:</text:span></text:p>
            <text:list text:continue-numbering="true" text:style-name="L1">
              <text:list-item>
                <text:p><text:span text:style-name="T14">Output from decoder: </text:span><text:span text:style-name="T15"><text:s/>Instead of output all the probabilities for Nsample*N, we output probability of each state at each site. Namely, decoder outputs N*(K=3) probability p_i^k corresponds to z-axis spin at site i,</text:span></text:p>
                <text:p><text:span text:style-name="T15">-1 → p_i^1,</text:span><text:span text:style-name="T15"><text:tab/></text:span><text:span text:style-name="T15">0 → p_i^2, +1 → p_i^3</text:span></text:p>
                <text:p text:style-name="P13"><text:span text:style-name="T5">so that p_i^1+p_i^2+</text:span><text:span text:style-name="T15">p_i^3 = 1. (We can do this by using softmax function as an activate function to the output layer)</text:span></text:p>
              </text:list-item>
              <text:list-item>
                <text:p><text:span text:style-name="T14">Loss function: </text:span><text:span text:style-name="T16"><text:s/></text:span><text:span text:style-name="T15">Instead of MSE as in the previous paper, we calculate the cross-entropy for reconstruction error.</text:span></text:p>
              </text:list-item>
              <text:list-item>
                <text:p><text:span text:style-name="T14">Samples from decoder: </text:span><text:span text:style-name="T15"><text:s/>We use jax.random.categorical() for generating samples </text:span></text:p>
              </text:list-item>
            </text:list>
            <text:p><text:span text:style-name="T6"/></text:p>
          </draw:text-box>
        </draw:frame>
        <draw:g draw:style-name="gr4">
          <draw:frame draw:style-name="gr26" draw:text-style-name="P15" draw:layer="layout" svg:width="27.102cm" svg:height="3.581cm" svg:x="0.177cm" svg:y="16.944cm">
            <draw:text-box>
              <text:p text:style-name="P14"><text:span text:style-name="T17">MPS perfect sampling</text:span></text:p>
              <text:p text:style-name="P14"><text:span text:style-name="T18">References:</text:span></text:p>
              <text:list text:style-name="L1">
                <text:list-item>
                  <text:p text:style-name="P14"><text:span text:style-name="T19">tensornetwork.org</text:span></text:p>
                </text:list-item>
                <text:list-item>
                  <text:p text:style-name="P14"><text:span text:style-name="T19">Ferris and Vidal, Phys. Rev. B 85, 165146 (2012), “Perfect sampling with unitary tensor networks”</text:span></text:p>
                </text:list-item>
              </text:list>
              <text:p text:style-name="P14"><text:span text:style-name="T19">Each sample is taken from the probabilistic distribution ‘directly’, not relying on Marcov chain, namely, each new sample does not depend on the previous samples. The computational cost scales <text:s text:c="12"/>if the MPS is right-orthogonal.</text:span></text:p>
            </draw:text-box>
          </draw:frame>
          <draw:frame draw:style-name="gr6" draw:text-style-name="P6" draw:layer="layout" svg:width="1.699cm" svg:height="0.685cm" svg:x="16.48cm" svg:y="19.84cm">
            <draw:object xlink:href="./Object 22" xlink:type="simple" xlink:show="embed" xlink:actuate="onLoad">
              <loext:p/>
            </draw:object>
            <draw:image xlink:href="./ObjectReplacements/Object 22" xlink:type="simple" xlink:show="embed" xlink:actuate="onLoad"/>
          </draw:frame>
        </draw:g>
        <presentation:notes draw:style-name="dp2">
          <draw:page-thumbnail draw:style-name="gr8"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7.81cm" svg:height="0.962cm" svg:x="0.072cm" svg:y="0.123cm">
          <draw:text-box>
            <text:p><text:span text:style-name="T1">BENCHMARK: β-dVAE, cpVAE for Spin-1 system</text:span></text:p>
          </draw:text-box>
        </draw:frame>
        <draw:frame draw:style-name="gr9" draw:text-style-name="P5" draw:layer="layout" svg:width="27.684cm" svg:height="2.054cm" svg:x="0.1cm" svg:y="1.343cm">
          <draw:text-box>
            <text:p><text:span text:style-name="T3">Product state</text:span></text:p>
            <text:p><text:span text:style-name="T6">We prepare the simple product state where there are no correlations between sites, and all the sites are in a same state (+1, 0, or -1). We feed the samples to dVAE for each θ to benchmark the code for spin-1 systems.</text:span></text:p>
          </draw:text-box>
        </draw:frame>
        <draw:frame draw:style-name="gr25" draw:text-style-name="P5" draw:layer="layout" svg:width="27.684cm" svg:height="7.934cm" svg:x="0.1cm" svg:y="3.843cm">
          <draw:text-box>
            <text:p><text:span text:style-name="T3">Benchmark</text:span></text:p>
            <text:p><text:span text:style-name="T6">We benchmark the code by feeding the samples and train dVAE, and reconstruct the samples from the trained model. We check following quantities:</text:span></text:p>
            <text:list text:style-name="L1">
              <text:list-item>
                <text:p><text:span text:style-name="T6">Loss function during the training (reconstruction loss, KL divergence)</text:span></text:p>
              </text:list-item>
              <text:list-item>
                <text:p><text:span text:style-name="T6">Logarithm variance during the training</text:span></text:p>
              </text:list-item>
              <text:list-item>
                <text:p><text:span text:style-name="T6">Reconstruction error of input samples and reconstructed samples.</text:span></text:p>
                <text:p><text:span text:style-name="T6">We simply calculate the <text:s/>Root Mean Squared Error (RMSE).</text:span></text:p>
              </text:list-item>
              <text:list-item>
                <text:p><text:span text:style-name="T6">Compare z-axis spin (for each site) and the string correlation function calculated with the input samples and the reconstructed samples</text:span></text:p>
              </text:list-item>
              <text:list-item>
                <text:p><text:span text:style-name="T6">Mean values predicted by the trained encoder for each θ (which is uniform)</text:span></text:p>
              </text:list-item>
              <text:list-item>
                <text:p><text:span text:style-name="T6">Latent space scan</text:span></text:p>
                <text:p><text:span text:style-name="T6">Instead of input the samples to the encoder, we change the values of latent variable directly and see the difference in the decoder output.</text:span></text:p>
              </text:list-item>
            </text:list>
          </draw:text-box>
        </draw:frame>
        <presentation:notes draw:style-name="dp2">
          <draw:page-thumbnail draw:style-name="gr8"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27"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0.0</text:span></text:p>
          </draw:text-box>
        </draw:frame>
        <draw:frame draw:style-name="gr2" draw:text-style-name="P2" draw:layer="layout" svg:width="11.522cm" svg:height="8.642cm" svg:x="0.642cm" svg:y="4.777cm">
          <draw:image xlink:href="Pictures/1000000100000280000001E01C60022F.png" xlink:type="simple" xlink:show="embed" xlink:actuate="onLoad" draw:mime-type="image/png">
            <text:p/>
          </draw:image>
        </draw:frame>
        <draw:frame draw:style-name="gr2" draw:text-style-name="P2" draw:layer="layout" svg:width="11.506cm" svg:height="8.636cm" svg:x="12.429cm" svg:y="4.703cm">
          <draw:image xlink:href="Pictures/1000000100000280000001E0A3414D98.png" xlink:type="simple" xlink:show="embed" xlink:actuate="onLoad" draw:mime-type="image/png">
            <text:p/>
          </draw:image>
        </draw:frame>
        <draw:frame draw:style-name="gr28" draw:text-style-name="P5" draw:layer="layout" svg:width="10.902cm" svg:height="2.964cm" svg:x="1.05cm" svg:y="13.695cm">
          <draw:text-box>
            <text:p><text:span text:style-name="T17">Loss function during the training</text:span></text:p>
            <text:p><text:span text:style-name="T22">As β=0, only the cross-entropy term is non-zero. The loss function decreases as the epoch increases</text:span></text:p>
          </draw:text-box>
        </draw:frame>
        <draw:frame draw:style-name="gr29" draw:text-style-name="P5" draw:layer="layout" svg:width="10.902cm" svg:height="3.026cm" svg:x="13.202cm" svg:y="13.573cm">
          <draw:text-box>
            <text:p><text:span text:style-name="T17">Log variance during the training</text:span></text:p>
            <text:p><text:span text:style-name="T22">As β=0, all the neurons are active. As the epoch increases, the variance in the three different neurons saturates to the specific values.</text:span></text:p>
          </draw:text-box>
        </draw:frame>
        <draw:frame draw:style-name="gr17" draw:text-style-name="P5" draw:layer="layout" svg:width="19.426cm" svg:height="0.839cm" svg:x="0cm" svg:y="2.932cm">
          <draw:text-box>
            <text:p><text:span text:style-name="T7">During training</text:span></text:p>
          </draw:text-box>
        </draw:frame>
        <presentation:notes draw:style-name="dp2">
          <draw:page-thumbnail draw:style-name="gr8"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7"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0.0</text:span></text:p>
          </draw:text-box>
        </draw:frame>
        <draw:frame draw:style-name="gr28" draw:text-style-name="P5" draw:layer="layout" svg:width="10.902cm" svg:height="2.964cm" svg:x="16.594cm" svg:y="8.133cm">
          <draw:text-box>
            <text:p><text:span text:style-name="T17">Sz for each lattice site</text:span></text:p>
            <text:p><text:span text:style-name="T22">For the train dataset (blue) and the test dataset (red), the decoder can produce the same results as the input (black)</text:span></text:p>
          </draw:text-box>
        </draw:frame>
        <draw:frame draw:style-name="gr10" draw:text-style-name="P5" draw:layer="layout" svg:width="19.426cm" svg:height="2.015cm" svg:x="0cm" svg:y="2.533cm">
          <draw:text-box>
            <text:p><text:span text:style-name="T7">Reconstruction error after training</text:span></text:p>
            <text:p><text:span text:style-name="T6">Compare the physical quantities calculated by the input samples and the samples reconstructed from the trained decoder.</text:span></text:p>
          </draw:text-box>
        </draw:frame>
        <draw:frame draw:style-name="gr2" draw:text-style-name="P2" draw:layer="layout" svg:width="7.62cm" svg:height="5.69cm" svg:x="0.375cm" svg:y="6.713cm">
          <draw:image xlink:href="Pictures/10000001000003200000025828627538.png" xlink:type="simple" xlink:show="embed" xlink:actuate="onLoad" draw:mime-type="image/png">
            <text:p/>
          </draw:image>
        </draw:frame>
        <draw:frame draw:style-name="gr2" draw:text-style-name="P2" draw:layer="layout" svg:width="7.62cm" svg:height="5.69cm" svg:x="8.974cm" svg:y="6.793cm">
          <draw:image xlink:href="Pictures/100000010000032000000258E050CEBB.png" xlink:type="simple" xlink:show="embed" xlink:actuate="onLoad" draw:mime-type="image/png">
            <text:p/>
          </draw:image>
        </draw:frame>
        <draw:frame draw:style-name="gr2" draw:text-style-name="P2" draw:layer="layout" svg:width="7.62cm" svg:height="5.69cm" svg:x="0.546cm" svg:y="12.862cm">
          <draw:image xlink:href="Pictures/1000000100000320000002589C26F1C8.png" xlink:type="simple" xlink:show="embed" xlink:actuate="onLoad" draw:mime-type="image/png">
            <text:p/>
          </draw:image>
        </draw:frame>
        <draw:frame draw:style-name="gr2" draw:text-style-name="P2" draw:layer="layout" svg:width="7.62cm" svg:height="5.69cm" svg:x="8.925cm" svg:y="12.909cm">
          <draw:image xlink:href="Pictures/10000001000003200000025835042CBF.png" xlink:type="simple" xlink:show="embed" xlink:actuate="onLoad" draw:mime-type="image/png">
            <text:p/>
          </draw:image>
        </draw:frame>
        <draw:frame draw:style-name="gr28" draw:text-style-name="P5" draw:layer="layout" svg:width="10.902cm" svg:height="2.964cm" svg:x="16.545cm" svg:y="14.184cm">
          <draw:text-box>
            <text:p><text:span text:style-name="T17">String correlator</text:span></text:p>
            <text:p><text:span text:style-name="T22">For the train dataset (blue) and the test dataset (red), the decoder can produce the same results as the input (black)</text:span></text:p>
          </draw:text-box>
        </draw:frame>
        <draw:frame draw:style-name="gr17" draw:text-style-name="P5" draw:layer="layout" svg:width="19.426cm" svg:height="0.839cm" svg:x="0.196cm" svg:y="4.937cm">
          <draw:text-box>
            <text:p><text:span text:style-name="T7">Root mean square error (RMSE) over each sample: 0.0</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2">
          <draw:page-thumbnail draw:style-name="gr8"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7"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0.0</text:span></text:p>
          </draw:text-box>
        </draw:frame>
        <draw:frame draw:style-name="gr30" draw:text-style-name="P9" draw:layer="layout" svg:width="10.902cm" svg:height="1.361cm" svg:x="9.416cm" svg:y="4.937cm">
          <draw:text-box>
            <text:p><text:span text:style-name="T22">As all the θ has the same samples, there is no dependence on θ</text:span></text:p>
          </draw:text-box>
        </draw:frame>
        <draw:frame draw:style-name="gr17" draw:text-style-name="P5" draw:layer="layout" svg:width="19.426cm" svg:height="0.839cm" svg:x="0cm" svg:y="2.533cm">
          <draw:text-box>
            <text:p><text:span text:style-name="T7">Mean values predicted by the trained encoder</text:span></text:p>
          </draw:text-box>
        </draw:frame>
        <draw:frame draw:style-name="gr2" draw:text-style-name="P2" draw:layer="layout" svg:width="8.75cm" svg:height="6.562cm" svg:x="0.447cm" svg:y="3.459cm">
          <draw:image xlink:href="Pictures/1000000100000280000001E0FC2A7C01.png" xlink:type="simple" xlink:show="embed" xlink:actuate="onLoad" draw:mime-type="image/png">
            <text:p/>
          </draw:image>
        </draw:frame>
        <draw:frame draw:style-name="gr31" draw:text-style-name="P17" draw:layer="layout" svg:width="6.876cm" svg:height="0.839cm" svg:x="0.45cm" svg:y="10.212cm">
          <draw:text-box>
            <text:p><text:span text:style-name="T7">Latent scan</text:span></text:p>
          </draw:text-box>
        </draw:frame>
        <draw:frame draw:style-name="gr2" draw:text-style-name="P2" draw:layer="layout" svg:width="7.62cm" svg:height="5.69cm" svg:x="3.998cm" svg:y="11.198cm">
          <draw:image xlink:href="Pictures/1000000100000280000001E014F0CA83.png" xlink:type="simple" xlink:show="embed" xlink:actuate="onLoad" draw:mime-type="image/png">
            <text:p/>
          </draw:image>
        </draw:frame>
        <draw:frame draw:style-name="gr2" draw:text-style-name="P2" draw:layer="layout" svg:width="7.62cm" svg:height="5.69cm" svg:x="11.324cm" svg:y="11.198cm">
          <draw:image xlink:href="Pictures/1000000100000280000001E0D1F6C4D9.png" xlink:type="simple" xlink:show="embed" xlink:actuate="onLoad" draw:mime-type="image/png">
            <text:p/>
          </draw:image>
        </draw:frame>
        <draw:frame draw:style-name="gr2" draw:text-style-name="P2" draw:layer="layout" svg:width="7.62cm" svg:height="5.69cm" svg:x="18.944cm" svg:y="11.198cm">
          <draw:image xlink:href="Pictures/1000000100000280000001E0B6FC820B.png" xlink:type="simple" xlink:show="embed" xlink:actuate="onLoad" draw:mime-type="image/png">
            <text:p/>
          </draw:image>
        </draw:frame>
        <draw:frame draw:style-name="gr6" draw:text-style-name="P6" draw:layer="layout" svg:width="2.673cm" svg:height="1.401cm" svg:x="1.152cm" svg:y="13.205cm">
          <draw:object xlink:href="./Object 20" xlink:type="simple" xlink:show="embed" xlink:actuate="onLoad">
            <loext:p/>
          </draw:object>
          <draw:image xlink:href="./ObjectReplacements/Object 20" xlink:type="simple" xlink:show="embed" xlink:actuate="onLoad"/>
        </draw:frame>
        <draw:frame draw:style-name="gr32" draw:text-style-name="P18" draw:layer="layout" svg:width="4.866cm" svg:height="0.76cm" svg:x="5.326cm" svg:y="10.926cm">
          <draw:text-box>
            <text:p><text:span text:style-name="T25">Latent variable No. 1</text:span></text:p>
          </draw:text-box>
        </draw:frame>
        <draw:frame draw:style-name="gr32" draw:text-style-name="P18" draw:layer="layout" svg:width="4.866cm" svg:height="0.76cm" svg:x="12.553cm" svg:y="10.926cm">
          <draw:text-box>
            <text:p><text:span text:style-name="T25">Latent variable No. 2</text:span></text:p>
          </draw:text-box>
        </draw:frame>
        <draw:frame draw:style-name="gr32" draw:text-style-name="P18" draw:layer="layout" svg:width="4.866cm" svg:height="0.76cm" svg:x="20.295cm" svg:y="10.828cm">
          <draw:text-box>
            <text:p><text:span text:style-name="T25">Latent variable No. 3</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33" draw:text-style-name="P9" draw:layer="layout" svg:width="21.99cm" svg:height="0.806cm" svg:x="3.562cm" svg:y="17.677cm">
          <draw:text-box>
            <text:p><text:span text:style-name="T22">Quantities do not depends on latent variable</text:span></text:p>
          </draw:text-box>
        </draw:frame>
        <presentation:notes draw:style-name="dp2">
          <draw:page-thumbnail draw:style-name="gr8"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7"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28" draw:text-style-name="P5" draw:layer="layout" svg:width="10.902cm" svg:height="2.964cm" svg:x="1.05cm" svg:y="13.695cm">
          <draw:text-box>
            <text:p><text:span text:style-name="T17">Loss function during the training</text:span></text:p>
            <text:p><text:span text:style-name="T22">As β is finite, all the KL divergence term has non-zero value. Both term decreases as the epoch increases.</text:span></text:p>
          </draw:text-box>
        </draw:frame>
        <draw:frame draw:style-name="gr28" draw:text-style-name="P5" draw:layer="layout" svg:width="10.902cm" svg:height="2.964cm" svg:x="13.202cm" svg:y="13.573cm">
          <draw:text-box>
            <text:p><text:span text:style-name="T17">Log variance during the training</text:span></text:p>
            <text:p><text:span text:style-name="T22">As β is finite, only the one neuron is active and the other two are washed out. The invariance converge to zero.</text:span></text:p>
          </draw:text-box>
        </draw:frame>
        <draw:frame draw:style-name="gr17" draw:text-style-name="P5" draw:layer="layout" svg:width="19.426cm" svg:height="0.839cm" svg:x="0cm" svg:y="2.932cm">
          <draw:text-box>
            <text:p><text:span text:style-name="T7">During training</text:span></text:p>
          </draw:text-box>
        </draw:frame>
        <draw:frame draw:style-name="gr2" draw:text-style-name="P2" draw:layer="layout" svg:width="11.506cm" svg:height="8.636cm" svg:x="12.059cm" svg:y="4.487cm">
          <draw:image xlink:href="Pictures/1000000100000280000001E0B06C811A.png" xlink:type="simple" xlink:show="embed" xlink:actuate="onLoad" draw:mime-type="image/png">
            <text:p/>
          </draw:image>
        </draw:frame>
        <draw:frame draw:style-name="gr2" draw:text-style-name="P2" draw:layer="layout" svg:width="11.506cm" svg:height="8.636cm" svg:x="0.553cm" svg:y="4.487cm">
          <draw:image xlink:href="Pictures/1000000100000280000001E07857F5CE.png" xlink:type="simple" xlink:show="embed" xlink:actuate="onLoad" draw:mime-type="image/png">
            <text:p/>
          </draw:image>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2">
          <draw:page-thumbnail draw:style-name="gr8"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8" draw:text-style-name="P5" draw:layer="layout" svg:width="10.902cm" svg:height="2.964cm" svg:x="16.594cm" svg:y="8.133cm">
          <draw:text-box>
            <text:p><text:span text:style-name="T17">Sz for each lattice site</text:span></text:p>
            <text:p><text:span text:style-name="T22">For the train dataset (blue) and the test dataset (red), the decoder can produce the same results as the input (black)</text:span></text:p>
          </draw:text-box>
        </draw:frame>
        <draw:frame draw:style-name="gr10" draw:text-style-name="P5" draw:layer="layout" svg:width="19.426cm" svg:height="2.015cm" svg:x="0cm" svg:y="2.533cm">
          <draw:text-box>
            <text:p><text:span text:style-name="T7">Reconstruction error after training</text:span></text:p>
            <text:p><text:span text:style-name="T6">Compare the physical quantities calculated by the input samples and the samples reconstructed from the trained decoder.</text:span></text:p>
          </draw:text-box>
        </draw:frame>
        <draw:frame draw:style-name="gr28" draw:text-style-name="P5" draw:layer="layout" svg:width="10.902cm" svg:height="2.964cm" svg:x="16.545cm" svg:y="14.184cm">
          <draw:text-box>
            <text:p><text:span text:style-name="T17">String correlator</text:span></text:p>
            <text:p><text:span text:style-name="T22">For the train dataset (blue) and the test dataset (red), the decoder can produce the same results as the input (black)</text:span></text:p>
          </draw:text-box>
        </draw:frame>
        <draw:frame draw:style-name="gr17" draw:text-style-name="P5" draw:layer="layout" svg:width="19.426cm" svg:height="0.839cm" svg:x="0.196cm" svg:y="4.937cm">
          <draw:text-box>
            <text:p><text:span text:style-name="T7">Root mean square error (RMSE) over each sample: 0.0</text:span></text:p>
          </draw:text-box>
        </draw:frame>
        <draw:frame draw:style-name="gr27" draw:text-style-name="P16" draw:layer="layout" svg:width="12.125cm" svg:height="4.691cm" svg:x="15.558cm" svg:y="0.247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2" draw:text-style-name="P2" draw:layer="layout" svg:width="7.62cm" svg:height="5.69cm" svg:x="8.363cm" svg:y="12.886cm">
          <draw:image xlink:href="Pictures/10000001000003200000025835042CBF.png" xlink:type="simple" xlink:show="embed" xlink:actuate="onLoad" draw:mime-type="image/png">
            <text:p/>
          </draw:image>
        </draw:frame>
        <draw:frame draw:style-name="gr2" draw:text-style-name="P2" draw:layer="layout" svg:width="7.62cm" svg:height="5.69cm" svg:x="0.743cm" svg:y="12.886cm">
          <draw:image xlink:href="Pictures/1000000100000320000002589C26F1C8.png" xlink:type="simple" xlink:show="embed" xlink:actuate="onLoad" draw:mime-type="image/png">
            <text:p/>
          </draw:image>
        </draw:frame>
        <draw:frame draw:style-name="gr2" draw:text-style-name="P2" draw:layer="layout" svg:width="7.62cm" svg:height="5.69cm" svg:x="8.337cm" svg:y="6.148cm">
          <draw:image xlink:href="Pictures/100000010000032000000258E050CEBB.png" xlink:type="simple" xlink:show="embed" xlink:actuate="onLoad" draw:mime-type="image/png">
            <text:p/>
          </draw:image>
        </draw:frame>
        <draw:frame draw:style-name="gr2" draw:text-style-name="P2" draw:layer="layout" svg:width="7.62cm" svg:height="5.69cm" svg:x="0.914cm" svg:y="6.148cm">
          <draw:image xlink:href="Pictures/10000001000003200000025828627538.png" xlink:type="simple" xlink:show="embed" xlink:actuate="onLoad" draw:mime-type="image/png">
            <text:p/>
          </draw:image>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2">
          <draw:page-thumbnail draw:style-name="gr8"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30" draw:text-style-name="P9" draw:layer="layout" svg:width="10.902cm" svg:height="1.361cm" svg:x="12.797cm" svg:y="6.015cm">
          <draw:text-box>
            <text:p><text:span text:style-name="T22">As all the θ has the same samples, there is no dependence on θ</text:span></text:p>
          </draw:text-box>
        </draw:frame>
        <draw:frame draw:style-name="gr17" draw:text-style-name="P5" draw:layer="layout" svg:width="19.426cm" svg:height="0.839cm" svg:x="0cm" svg:y="2.533cm">
          <draw:text-box>
            <text:p><text:span text:style-name="T7">Mean values predicted by the trained encoder</text:span></text:p>
          </draw:text-box>
        </draw:frame>
        <draw:frame draw:style-name="gr31" draw:text-style-name="P17" draw:layer="layout" svg:width="6.876cm" svg:height="0.839cm" svg:x="0.45cm" svg:y="12.246cm">
          <draw:text-box>
            <text:p><text:span text:style-name="T7">Latent scan</text:span></text:p>
          </draw:text-box>
        </draw:frame>
        <draw:frame draw:style-name="gr6" draw:text-style-name="P6" draw:layer="layout" svg:width="2.673cm" svg:height="1.401cm" svg:x="1.152cm" svg:y="15.239cm">
          <draw:object xlink:href="./Object 21" xlink:type="simple" xlink:show="embed" xlink:actuate="onLoad">
            <loext:p/>
          </draw:object>
          <draw:image xlink:href="./ObjectReplacements/Object 21" xlink:type="simple" xlink:show="embed" xlink:actuate="onLoad"/>
        </draw:frame>
        <draw:frame draw:style-name="gr32" draw:text-style-name="P18" draw:layer="layout" svg:width="4.866cm" svg:height="0.76cm" svg:x="5.326cm" svg:y="12.96cm">
          <draw:text-box>
            <text:p><text:span text:style-name="T25">Latent variable No. 1</text:span></text:p>
          </draw:text-box>
        </draw:frame>
        <draw:frame draw:style-name="gr32" draw:text-style-name="P18" draw:layer="layout" svg:width="4.866cm" svg:height="0.76cm" svg:x="12.553cm" svg:y="12.96cm">
          <draw:text-box>
            <text:p><text:span text:style-name="T25">Latent variable No. 2</text:span></text:p>
          </draw:text-box>
        </draw:frame>
        <draw:frame draw:style-name="gr32" draw:text-style-name="P18" draw:layer="layout" svg:width="4.866cm" svg:height="0.76cm" svg:x="20.295cm" svg:y="12.862cm">
          <draw:text-box>
            <text:p><text:span text:style-name="T25">Latent variable No. 3</text:span></text:p>
          </draw:text-box>
        </draw:frame>
        <draw:frame draw:style-name="gr27" draw:text-style-name="P16" draw:layer="layout" svg:width="12.125cm" svg:height="4.691cm" svg:x="15.558cm" svg:y="0.247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2" draw:text-style-name="P2" draw:layer="layout" svg:width="10.16cm" svg:height="7.62cm" svg:x="0.962cm" svg:y="3.072cm">
          <draw:image xlink:href="Pictures/1000000100000280000001E0FFEE8F06.png" xlink:type="simple" xlink:show="embed" xlink:actuate="onLoad" draw:mime-type="image/png">
            <text:p/>
          </draw:image>
        </draw:frame>
        <draw:frame draw:style-name="gr34" draw:text-style-name="P19" draw:layer="layout" svg:width="2.114cm" svg:height="0.806cm" svg:x="3.105cm" svg:y="3.199cm">
          <draw:text-box>
            <text:p><text:span text:style-name="T22">1E-5</text:span></text:p>
          </draw:text-box>
        </draw:frame>
        <draw:frame draw:style-name="gr2" draw:text-style-name="P2" draw:layer="layout" svg:width="7.62cm" svg:height="5.69cm" svg:x="3.853cm" svg:y="13.485cm">
          <draw:image xlink:href="Pictures/1000000100000280000001E00ADDE0EA.png" xlink:type="simple" xlink:show="embed" xlink:actuate="onLoad" draw:mime-type="image/png">
            <text:p/>
          </draw:image>
        </draw:frame>
        <draw:frame draw:style-name="gr2" draw:text-style-name="P2" draw:layer="layout" svg:width="7.62cm" svg:height="5.69cm" svg:x="11.103cm" svg:y="13.485cm">
          <draw:image xlink:href="Pictures/1000000100000280000001E00ADDE0EA.png" xlink:type="simple" xlink:show="embed" xlink:actuate="onLoad" draw:mime-type="image/png">
            <text:p/>
          </draw:image>
        </draw:frame>
        <draw:frame draw:style-name="gr2" draw:text-style-name="P2" draw:layer="layout" svg:width="7.62cm" svg:height="5.69cm" svg:x="18.723cm" svg:y="13.485cm">
          <draw:image xlink:href="Pictures/1000000100000280000001E00ADDE0EA.png" xlink:type="simple" xlink:show="embed" xlink:actuate="onLoad" draw:mime-type="image/png">
            <text:p/>
          </draw:image>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2">
          <draw:page-thumbnail draw:style-name="gr8"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17.81cm" svg:height="0.962cm" svg:x="0.072cm" svg:y="0.123cm">
          <draw:text-box>
            <text:p><text:span text:style-name="T1">BENCHMARK: cpVAE for Spin-1 system</text:span></text:p>
          </draw:text-box>
        </draw:frame>
        <draw:frame draw:style-name="gr35" draw:text-style-name="P16" draw:layer="layout" svg:width="18.47cm" svg:height="5.246cm" svg:x="9.212cm" svg:y="0.246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0.0</text:span></text:p>
          </draw:text-box>
        </draw:frame>
        <draw:frame draw:style-name="gr28" draw:text-style-name="P5" draw:layer="layout" svg:width="10.902cm" svg:height="2.964cm" svg:x="1.05cm" svg:y="14.995cm">
          <draw:text-box>
            <text:p><text:span text:style-name="T17">Loss function during the training</text:span></text:p>
            <text:p><text:span text:style-name="T22">As β=0, only the cross-entropy term is non-zero. The loss function decreases as the epoch increases</text:span></text:p>
          </draw:text-box>
        </draw:frame>
        <draw:frame draw:style-name="gr29" draw:text-style-name="P5" draw:layer="layout" svg:width="10.902cm" svg:height="3.026cm" svg:x="13.202cm" svg:y="14.873cm">
          <draw:text-box>
            <text:p><text:span text:style-name="T17">Log variance during the training</text:span></text:p>
            <text:p><text:span text:style-name="T22">As β=0, all the neurons are active. As the epoch increases, the variance in the three different neurons saturates to the specific values.</text:span></text:p>
          </draw:text-box>
        </draw:frame>
        <draw:frame draw:style-name="gr17" draw:text-style-name="P5" draw:layer="layout" svg:width="19.426cm" svg:height="0.839cm" svg:x="0cm" svg:y="2.932cm">
          <draw:text-box>
            <text:p><text:span text:style-name="T7">During training</text:span></text:p>
          </draw:text-box>
        </draw:frame>
        <draw:frame draw:style-name="gr2" draw:text-style-name="P2" draw:layer="layout" svg:width="11.506cm" svg:height="8.636cm" svg:x="12.001cm" svg:y="5.909cm">
          <draw:image xlink:href="Pictures/1000000100000280000001E06C02D8A7.png" xlink:type="simple" xlink:show="embed" xlink:actuate="onLoad" draw:mime-type="image/png">
            <text:p/>
          </draw:image>
        </draw:frame>
        <draw:frame draw:style-name="gr2" draw:text-style-name="P2" draw:layer="layout" svg:width="11.506cm" svg:height="8.636cm" svg:x="0.495cm" svg:y="5.909cm">
          <draw:image xlink:href="Pictures/1000000100000280000001E06B11C175.png" xlink:type="simple" xlink:show="embed" xlink:actuate="onLoad" draw:mime-type="image/png">
            <text:p/>
          </draw:image>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2">
          <draw:page-thumbnail draw:style-name="gr8"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0" draw:text-style-name="P5" draw:layer="layout" svg:width="19.426cm" svg:height="2.015cm" svg:x="0cm" svg:y="2.533cm">
          <draw:text-box>
            <text:p><text:span text:style-name="T7">Reconstruction error after training</text:span></text:p>
            <text:p><text:span text:style-name="T6">Compare the physical quantities calculated by the input samples and the samples reconstructed from the trained decoder.</text:span></text:p>
          </draw:text-box>
        </draw:frame>
        <draw:frame draw:style-name="gr28" draw:text-style-name="P5" draw:layer="layout" svg:width="10.902cm" svg:height="2.964cm" svg:x="16.276cm" svg:y="14.747cm">
          <draw:text-box>
            <text:p><text:span text:style-name="T17">String correlator</text:span></text:p>
            <text:p><text:span text:style-name="T22">For the train dataset (blue) and the test dataset (red), the decoder can produce the same results as the input (black)</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1" draw:text-style-name="P1" draw:layer="layout" svg:width="17.81cm" svg:height="0.962cm" svg:x="0.072cm" svg:y="0.124cm">
          <draw:text-box>
            <text:p><text:span text:style-name="T1">BENCHMARK: cpVAE for Spin-1 system</text:span></text:p>
          </draw:text-box>
        </draw:frame>
        <draw:frame draw:style-name="gr35" draw:text-style-name="P16" draw:layer="layout" svg:width="18.47cm" svg:height="5.246cm" svg:x="9.212cm" svg:y="0.247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0.0</text:span></text:p>
          </draw:text-box>
        </draw:frame>
        <draw:frame draw:style-name="gr2" draw:text-style-name="P2" draw:layer="layout" svg:width="9.793cm" svg:height="7.344cm" svg:x="0.741cm" svg:y="4.818cm">
          <draw:image xlink:href="Pictures/1000000100000280000001E066921BEF.png" xlink:type="simple" xlink:show="embed" xlink:actuate="onLoad" draw:mime-type="image/png">
            <text:p/>
          </draw:image>
        </draw:frame>
        <draw:frame draw:style-name="gr30" draw:text-style-name="P5" draw:layer="layout" svg:width="10.902cm" svg:height="1.361cm" svg:x="2.679cm" svg:y="6.124cm">
          <draw:text-box>
            <text:p><text:span text:style-name="T17">Reconstruction error</text:span></text:p>
            <text:p><text:span text:style-name="T22">0.0</text:span></text:p>
          </draw:text-box>
        </draw:frame>
        <draw:frame draw:style-name="gr2" draw:text-style-name="P2" draw:layer="layout" svg:width="11.091cm" svg:height="8.318cm" svg:x="0.619cm" svg:y="12.162cm">
          <draw:image xlink:href="Pictures/10000001000003200000025879D5A484.png" xlink:type="simple" xlink:show="embed" xlink:actuate="onLoad" draw:mime-type="image/png">
            <text:p/>
          </draw:image>
        </draw:frame>
        <draw:frame draw:style-name="gr28" draw:text-style-name="P5" draw:layer="layout" svg:width="10.902cm" svg:height="2.964cm" svg:x="2.507cm" svg:y="16.928cm">
          <draw:text-box>
            <text:p><text:span text:style-name="T17">Sz for each lattice site</text:span></text:p>
            <text:p><text:span text:style-name="T22">For the train dataset (blue) and the test dataset (red), the decoder can produce the same results as the input (black)</text:span></text:p>
          </draw:text-box>
        </draw:frame>
        <draw:frame draw:style-name="gr2" draw:text-style-name="P2" draw:layer="layout" svg:width="11.409cm" svg:height="8.557cm" svg:x="14.511cm" svg:y="6.388cm">
          <draw:image xlink:href="Pictures/100000010000032000000258E37DEFC1.png" xlink:type="simple" xlink:show="embed" xlink:actuate="onLoad" draw:mime-type="image/png">
            <text:p/>
          </draw:image>
        </draw:frame>
        <presentation:notes draw:style-name="dp2">
          <draw:page-thumbnail draw:style-name="gr8"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30" draw:text-style-name="P9" draw:layer="layout" svg:width="10.902cm" svg:height="1.361cm" svg:x="12.356cm" svg:y="6.014cm">
          <draw:text-box>
            <text:p><text:span text:style-name="T22">As all the θ has the same samples, there is no dependence on θ</text:span></text:p>
          </draw:text-box>
        </draw:frame>
        <draw:frame draw:style-name="gr17" draw:text-style-name="P5" draw:layer="layout" svg:width="19.426cm" svg:height="0.839cm" svg:x="0cm" svg:y="2.533cm">
          <draw:text-box>
            <text:p><text:span text:style-name="T7">Mean values predicted by the trained encoder</text:span></text:p>
          </draw:text-box>
        </draw:frame>
        <draw:frame draw:style-name="gr2" draw:text-style-name="P2" draw:layer="layout" svg:width="7.62cm" svg:height="5.69cm" svg:x="3.998cm" svg:y="11.198cm">
          <draw:image xlink:href="Pictures/1000000100000280000001E014F0CA83.png" xlink:type="simple" xlink:show="embed" xlink:actuate="onLoad" draw:mime-type="image/png">
            <text:p/>
          </draw:image>
        </draw:frame>
        <draw:frame draw:style-name="gr2" draw:text-style-name="P2" draw:layer="layout" svg:width="7.62cm" svg:height="5.69cm" svg:x="11.324cm" svg:y="11.198cm">
          <draw:image xlink:href="Pictures/1000000100000280000001E0D1F6C4D9.png" xlink:type="simple" xlink:show="embed" xlink:actuate="onLoad" draw:mime-type="image/png">
            <text:p/>
          </draw:image>
        </draw:frame>
        <draw:frame draw:style-name="gr2" draw:text-style-name="P2" draw:layer="layout" svg:width="7.62cm" svg:height="5.69cm" svg:x="18.944cm" svg:y="11.198cm">
          <draw:image xlink:href="Pictures/1000000100000280000001E0B6FC820B.png" xlink:type="simple" xlink:show="embed" xlink:actuate="onLoad" draw:mime-type="image/png">
            <text:p/>
          </draw:image>
        </draw:frame>
        <draw:frame draw:style-name="gr6" draw:text-style-name="P6" draw:layer="layout" svg:width="2.673cm" svg:height="1.401cm" svg:x="1.152cm" svg:y="13.205cm">
          <draw:object xlink:href="./Object 23" xlink:type="simple" xlink:show="embed" xlink:actuate="onLoad">
            <loext:p/>
          </draw:object>
          <draw:image xlink:href="./ObjectReplacements/Object 23" xlink:type="simple" xlink:show="embed" xlink:actuate="onLoad"/>
        </draw:frame>
        <draw:frame draw:style-name="gr32" draw:text-style-name="P18" draw:layer="layout" svg:width="4.866cm" svg:height="0.76cm" svg:x="5.326cm" svg:y="10.926cm">
          <draw:text-box>
            <text:p><text:span text:style-name="T25">Latent variable No. 1</text:span></text:p>
          </draw:text-box>
        </draw:frame>
        <draw:frame draw:style-name="gr32" draw:text-style-name="P18" draw:layer="layout" svg:width="4.866cm" svg:height="0.76cm" svg:x="12.553cm" svg:y="10.926cm">
          <draw:text-box>
            <text:p><text:span text:style-name="T25">Latent variable No. 2</text:span></text:p>
          </draw:text-box>
        </draw:frame>
        <draw:frame draw:style-name="gr32" draw:text-style-name="P18" draw:layer="layout" svg:width="4.866cm" svg:height="0.76cm" svg:x="20.295cm" svg:y="10.828cm">
          <draw:text-box>
            <text:p><text:span text:style-name="T25">Latent variable No. 3</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2" draw:text-style-name="P2" draw:layer="layout" svg:width="10.16cm" svg:height="7.62cm" svg:x="1.893cm" svg:y="3.372cm">
          <draw:image xlink:href="Pictures/1000000100000280000001E0926A426C.png" xlink:type="simple" xlink:show="embed" xlink:actuate="onLoad" draw:mime-type="image/png">
            <text:p/>
          </draw:image>
        </draw:frame>
        <draw:frame draw:style-name="gr1" draw:text-style-name="P1" draw:layer="layout" svg:width="17.81cm" svg:height="0.962cm" svg:x="0.072cm" svg:y="0.125cm">
          <draw:text-box>
            <text:p><text:span text:style-name="T1">BENCHMARK: cpVAE for Spin-1 system</text:span></text:p>
          </draw:text-box>
        </draw:frame>
        <draw:frame draw:style-name="gr35" draw:text-style-name="P16" draw:layer="layout" svg:width="18.47cm" svg:height="5.246cm" svg:x="9.212cm" svg:y="0.248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0.0</text:span></text:p>
          </draw:text-box>
        </draw:frame>
        <presentation:notes draw:style-name="dp2">
          <draw:page-thumbnail draw:style-name="gr8"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17.81cm" svg:height="0.962cm" svg:x="0.072cm" svg:y="0.123cm">
          <draw:text-box>
            <text:p><text:span text:style-name="T1">BENCHMARK: cpVAE for Spin-1 system</text:span></text:p>
          </draw:text-box>
        </draw:frame>
        <draw:frame draw:style-name="gr35" draw:text-style-name="P16" draw:layer="layout" svg:width="18.47cm" svg:height="5.246cm" svg:x="9.212cm" svg:y="0.246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1.0</text:span></text:p>
          </draw:text-box>
        </draw:frame>
        <draw:frame draw:style-name="gr17" draw:text-style-name="P5" draw:layer="layout" svg:width="19.426cm" svg:height="0.839cm" svg:x="0cm" svg:y="2.932cm">
          <draw:text-box>
            <text:p><text:span text:style-name="T7">During training</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2" draw:text-style-name="P2" draw:layer="layout" svg:width="11.506cm" svg:height="8.636cm" svg:x="11.952cm" svg:y="6.237cm">
          <draw:image xlink:href="Pictures/1000000100000280000001E0FD03E6E4.png" xlink:type="simple" xlink:show="embed" xlink:actuate="onLoad" draw:mime-type="image/png">
            <text:p/>
          </draw:image>
        </draw:frame>
        <draw:frame draw:style-name="gr2" draw:text-style-name="P2" draw:layer="layout" svg:width="11.506cm" svg:height="8.636cm" svg:x="0.446cm" svg:y="6.359cm">
          <draw:image xlink:href="Pictures/1000000100000280000001E08AEF0539.png" xlink:type="simple" xlink:show="embed" xlink:actuate="onLoad" draw:mime-type="image/png">
            <text:p/>
          </draw:image>
        </draw:frame>
        <draw:frame draw:style-name="gr28" draw:text-style-name="P5" draw:layer="layout" svg:width="10.902cm" svg:height="2.964cm" svg:x="1.05cm" svg:y="15.312cm">
          <draw:text-box>
            <text:p><text:span text:style-name="T17">Loss function during the training</text:span></text:p>
            <text:p><text:span text:style-name="T22">As β is finite, all the KL divergence term has non-zero value. Both term decreases as the epoch increases.</text:span></text:p>
          </draw:text-box>
        </draw:frame>
        <draw:frame draw:style-name="gr28" draw:text-style-name="P5" draw:layer="layout" svg:width="10.902cm" svg:height="2.964cm" svg:x="13.202cm" svg:y="15.19cm">
          <draw:text-box>
            <text:p><text:span text:style-name="T17">Log variance during the training</text:span></text:p>
            <text:p><text:span text:style-name="T22">As β is finite, only the one neuron is active and the other two are washed out. The invariance converge to zero.</text:span></text:p>
          </draw:text-box>
        </draw:frame>
        <presentation:notes draw:style-name="dp2">
          <draw:page-thumbnail draw:style-name="gr8"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2" draw:text-style-name="P2" draw:layer="layout" svg:width="9.474cm" svg:height="7.112cm" svg:x="1.305cm" svg:y="5.05cm">
          <draw:image xlink:href="Pictures/1000000100000280000001E05FCAA171.png" xlink:type="simple" xlink:show="embed" xlink:actuate="onLoad" draw:mime-type="image/png">
            <text:p/>
          </draw:image>
        </draw:frame>
        <draw:frame draw:style-name="gr10" draw:text-style-name="P5" draw:layer="layout" svg:width="19.426cm" svg:height="2.015cm" svg:x="0cm" svg:y="2.533cm">
          <draw:text-box>
            <text:p><text:span text:style-name="T7">Reconstruction error after training</text:span></text:p>
            <text:p><text:span text:style-name="T6">Compare the physical quantities calculated by the input samples and the samples reconstructed from the trained decoder.</text:span></text:p>
          </draw:text-box>
        </draw:frame>
        <draw:frame draw:style-name="gr28" draw:text-style-name="P5" draw:layer="layout" svg:width="10.902cm" svg:height="2.964cm" svg:x="16.276cm" svg:y="14.747cm">
          <draw:text-box>
            <text:p><text:span text:style-name="T17">String correlator</text:span></text:p>
            <text:p><text:span text:style-name="T22">For the train dataset (blue) and the test dataset (red), the decoder can produce the same results as the input (black)</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1" draw:text-style-name="P1" draw:layer="layout" svg:width="17.81cm" svg:height="0.962cm" svg:x="0.072cm" svg:y="0.124cm">
          <draw:text-box>
            <text:p><text:span text:style-name="T1">BENCHMARK: cpVAE for Spin-1 system</text:span></text:p>
          </draw:text-box>
        </draw:frame>
        <draw:frame draw:style-name="gr30" draw:text-style-name="P5" draw:layer="layout" svg:width="10.902cm" svg:height="1.361cm" svg:x="2.679cm" svg:y="6.124cm">
          <draw:text-box>
            <text:p><text:span text:style-name="T17">Reconstruction error</text:span></text:p>
            <text:p><text:span text:style-name="T22">0.0</text:span></text:p>
          </draw:text-box>
        </draw:frame>
        <draw:frame draw:style-name="gr28" draw:text-style-name="P5" draw:layer="layout" svg:width="10.902cm" svg:height="2.964cm" svg:x="1.306cm" svg:y="17.785cm">
          <draw:text-box>
            <text:p><text:span text:style-name="T17">Sz for each lattice site</text:span></text:p>
            <text:p><text:span text:style-name="T22">For the train dataset (blue) and the test dataset (red), the decoder can produce the same results as the input (black)</text:span></text:p>
          </draw:text-box>
        </draw:frame>
        <draw:frame draw:style-name="gr35" draw:text-style-name="P16" draw:layer="layout" svg:width="18.47cm" svg:height="5.246cm" svg:x="9.212cm" svg:y="0.246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1.0</text:span></text:p>
          </draw:text-box>
        </draw:frame>
        <draw:frame draw:style-name="gr2" draw:text-style-name="P2" draw:layer="layout" svg:width="8.458cm" svg:height="6.35cm" svg:x="16.838cm" svg:y="7.986cm">
          <draw:image xlink:href="Pictures/100000010000032000000258E37DEFC1.png" xlink:type="simple" xlink:show="embed" xlink:actuate="onLoad" draw:mime-type="image/png">
            <text:p/>
          </draw:image>
        </draw:frame>
        <draw:frame draw:style-name="gr2" draw:text-style-name="P2" draw:layer="layout" svg:width="8.458cm" svg:height="6.35cm" svg:x="2.507cm" svg:y="12.162cm">
          <draw:image xlink:href="Pictures/10000001000003200000025879D5A484.png" xlink:type="simple" xlink:show="embed" xlink:actuate="onLoad" draw:mime-type="image/png">
            <text:p/>
          </draw:image>
        </draw:frame>
        <presentation:notes draw:style-name="dp2">
          <draw:page-thumbnail draw:style-name="gr8"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30" draw:text-style-name="P9" draw:layer="layout" svg:width="10.902cm" svg:height="1.361cm" svg:x="12.356cm" svg:y="6.014cm">
          <draw:text-box>
            <text:p><text:span text:style-name="T22">As all the θ has the same samples, there is no dependence on θ</text:span></text:p>
          </draw:text-box>
        </draw:frame>
        <draw:frame draw:style-name="gr17" draw:text-style-name="P5" draw:layer="layout" svg:width="19.426cm" svg:height="0.839cm" svg:x="0cm" svg:y="2.533cm">
          <draw:text-box>
            <text:p><text:span text:style-name="T7">Mean values predicted by the trained encoder</text:span></text:p>
          </draw:text-box>
        </draw:frame>
        <draw:frame draw:style-name="gr6" draw:text-style-name="P6" draw:layer="layout" svg:width="2.673cm" svg:height="1.401cm" svg:x="20.433cm" svg:y="15.066cm">
          <draw:object xlink:href="./Object 24" xlink:type="simple" xlink:show="embed" xlink:actuate="onLoad">
            <loext:p/>
          </draw:object>
          <draw:image xlink:href="./ObjectReplacements/Object 24" xlink:type="simple" xlink:show="embed" xlink:actuate="onLoad"/>
        </draw:frame>
        <draw:frame draw:style-name="gr32" draw:text-style-name="P18" draw:layer="layout" svg:width="4.866cm" svg:height="0.76cm" svg:x="5.326cm" svg:y="10.926cm">
          <draw:text-box>
            <text:p><text:span text:style-name="T25">Latent variable No. 1</text:span></text:p>
          </draw:text-box>
        </draw:frame>
        <draw:frame draw:style-name="gr20"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1" draw:text-style-name="P1" draw:layer="layout" svg:width="17.81cm" svg:height="0.962cm" svg:x="0.072cm" svg:y="0.125cm">
          <draw:text-box>
            <text:p><text:span text:style-name="T1">BENCHMARK: cpVAE for Spin-1 system</text:span></text:p>
          </draw:text-box>
        </draw:frame>
        <draw:frame draw:style-name="gr35" draw:text-style-name="P16" draw:layer="layout" svg:width="18.47cm" svg:height="5.246cm" svg:x="9.212cm" svg:y="0.246cm">
          <draw:text-box>
            <text:p text:style-name="P3"><text:span text:style-name="T21">Conditions</text:span></text:p>
            <text:p text:style-name="P3"><text:span text:style-name="T22">N=1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20</text:span></text:p>
            <text:p text:style-name="P3"><text:span text:style-name="T22">Latent dimension: </text:span><text:span text:style-name="T23">5</text:span></text:p>
            <text:p text:style-name="P3"><text:span text:style-name="T23">(!To change # of latent dim, we need to modify the ARNN code file!)</text:span></text:p>
            <text:p text:style-name="P3"><text:span text:style-name="T24">β: 1.0</text:span></text:p>
          </draw:text-box>
        </draw:frame>
        <draw:frame draw:style-name="gr2" draw:text-style-name="P2" draw:layer="layout" svg:width="10.215cm" svg:height="7.661cm" svg:x="1.251cm" svg:y="3.875cm">
          <draw:image xlink:href="Pictures/1000000100000280000001E0E326FE1F.png" xlink:type="simple" xlink:show="embed" xlink:actuate="onLoad" draw:mime-type="image/png">
            <text:p/>
          </draw:image>
        </draw:frame>
        <draw:frame draw:style-name="gr34" draw:text-style-name="P19" draw:layer="layout" svg:width="2.114cm" svg:height="0.806cm" svg:x="3.448cm" svg:y="3.875cm">
          <draw:text-box>
            <text:p><text:span text:style-name="T22">1E-6</text:span></text:p>
          </draw:text-box>
        </draw:frame>
        <draw:frame draw:style-name="gr2" draw:text-style-name="P2" draw:layer="layout" svg:width="10.16cm" svg:height="7.595cm" svg:x="5.984cm" svg:y="13.086cm">
          <draw:image xlink:href="Pictures/1000000100000280000001E05A1F29EC.png" xlink:type="simple" xlink:show="embed" xlink:actuate="onLoad" draw:mime-type="image/png">
            <text:p/>
          </draw:image>
        </draw:frame>
        <draw:frame draw:style-name="gr2" draw:text-style-name="P2" draw:layer="layout" svg:width="10.16cm" svg:height="7.595cm" svg:x="16.812cm" svg:y="13.16cm">
          <draw:image xlink:href="Pictures/1000000100000280000001E00ADDE0EA.png" xlink:type="simple" xlink:show="embed" xlink:actuate="onLoad" draw:mime-type="image/png">
            <text:p/>
          </draw:image>
        </draw:frame>
        <draw:frame draw:style-name="gr31" draw:text-style-name="P17" draw:layer="layout" svg:width="6.876cm" svg:height="0.839cm" svg:x="0.45cm" svg:y="12.247cm">
          <draw:text-box>
            <text:p><text:span text:style-name="T7">Latent scan</text:span></text:p>
          </draw:text-box>
        </draw:frame>
        <draw:frame draw:style-name="gr6" draw:text-style-name="P6" draw:layer="layout" svg:width="2.673cm" svg:height="1.401cm" svg:x="20.752cm" svg:y="15.951cm">
          <draw:object xlink:href="./Object 25" xlink:type="simple" xlink:show="embed" xlink:actuate="onLoad">
            <loext:p/>
          </draw:object>
          <draw:image xlink:href="./ObjectReplacements/Object 25" xlink:type="simple" xlink:show="embed" xlink:actuate="onLoad"/>
        </draw:frame>
        <draw:frame draw:style-name="gr6" draw:text-style-name="P6" draw:layer="layout" svg:width="4.603cm" svg:height="0.768cm" svg:x="9.481cm" svg:y="16.046cm">
          <draw:object xlink:href="./Object 26" xlink:type="simple" xlink:show="embed" xlink:actuate="onLoad">
            <loext:p/>
          </draw:object>
          <draw:image xlink:href="./ObjectReplacements/Object 26" xlink:type="simple" xlink:show="embed" xlink:actuate="onLoad"/>
        </draw:frame>
        <draw:frame draw:style-name="gr36" draw:text-style-name="P9" draw:layer="layout" svg:width="5.749cm" svg:height="1.916cm" svg:x="0.548cm" svg:y="14.614cm">
          <draw:text-box>
            <text:p><text:span text:style-name="T22">Quantities do not depends on latent variable</text:span></text:p>
          </draw:text-box>
        </draw:frame>
        <presentation:notes draw:style-name="dp2">
          <draw:page-thumbnail draw:style-name="gr8"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7" draw:text-style-name="P5" draw:layer="layout" svg:width="12.887cm" svg:height="0.839cm" svg:x="0.637cm" svg:y="1.176cm">
          <draw:text-box>
            <text:p><text:span text:style-name="T7">Generating data</text:span></text:p>
          </draw:text-box>
        </draw:frame>
        <draw:frame draw:style-name="gr2" draw:text-style-name="P2" draw:layer="layout" svg:width="9.606cm" svg:height="2.131cm" svg:x="1.568cm" svg:y="2.4cm">
          <draw:image xlink:href="Pictures/1000000100000354000000BDA2F6D301.png" xlink:type="simple" xlink:show="embed" xlink:actuate="onLoad" draw:mime-type="image/png">
            <text:p/>
          </draw:image>
        </draw:frame>
        <draw:frame draw:style-name="gr37" draw:text-style-name="P20" draw:layer="layout" svg:width="15.36cm" svg:height="2.033cm" svg:x="11.956cm" svg:y="2.181cm">
          <draw:text-box>
            <text:p><text:span text:style-name="T13">The general spin-1 model. We use α=cos(θ) and β=sin(θ).</text:span></text:p>
            <text:list text:style-name="L1">
              <text:list-item>
                <text:p><text:span text:style-name="T13">θ=0.0: Heisenberg model</text:span></text:p>
              </text:list-item>
              <text:list-item>
                <text:p><text:span text:style-name="T26">arctan(</text:span><text:span text:style-name="T13">θ)=1/3: AKLT model</text:span></text:p>
              </text:list-item>
            </text:list>
          </draw:text-box>
        </draw:frame>
        <presentation:notes draw:style-name="dp2">
          <draw:page-thumbnail draw:style-name="gr8"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1"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2" draw:text-style-name="P2" draw:layer="layout" svg:width="12.04cm" svg:height="1.594cm" svg:x="1.509cm" svg:y="3.119cm">
          <draw:image xlink:href="Pictures/10000001000005B1000000C102F0FB83.png" xlink:type="simple" xlink:show="embed" xlink:actuate="onLoad" draw:mime-type="image/png">
            <text:p/>
          </draw:image>
        </draw:frame>
        <draw:frame draw:style-name="gr17" draw:text-style-name="P5" draw:layer="layout" svg:width="12.887cm" svg:height="0.839cm" svg:x="0.908cm" svg:y="2.28cm">
          <draw:text-box>
            <text:p><text:span text:style-name="T7">Exactly-solvable AKLT model</text:span></text:p>
          </draw:text-box>
        </draw:frame>
        <draw:frame draw:style-name="gr19" draw:layer="layout" svg:width="9.329cm" svg:height="8.501cm" svg:x="1.891cm" svg:y="5.825cm">
          <table:table table:template-name="default" table:use-first-row-styles="true" table:use-banding-rows-styles="true">
            <table:table-column table:style-name="co2"/>
            <table:table-column table:style-name="co2"/>
            <table:table-column table:style-name="co2"/>
            <table:table-row table:style-name="ro2" table:default-cell-style-name="ce2">
              <table:table-cell table:style-name="ce1"/>
              <table:table-cell>
                <text:p text:style-name="P22"><text:span text:style-name="T17">Exact</text:span></text:p>
              </table:table-cell>
              <table:table-cell>
                <text:p text:style-name="P22"><text:span text:style-name="T17">Code</text:span></text:p>
              </table:table-cell>
            </table:table-row>
            <table:table-row table:style-name="ro3" table:default-cell-style-name="ce1">
              <table:table-cell table:style-name="ce2">
                <text:p text:style-name="P23"><text:span text:style-name="T17">Ground energy per site*</text:span></text:p>
              </table:table-cell>
              <table:table-cell>
                <text:p text:style-name="P10"><text:span text:style-name="T13">0.0</text:span></text:p>
                <text:p text:style-name="P10"><text:span text:style-name="T13">(-0.6324555)</text:span></text:p>
              </table:table-cell>
              <table:table-cell>
                <text:p text:style-name="P10"><text:span text:style-name="T13">-0.632456</text:span></text:p>
                <text:p text:style-name="P10"><text:span text:style-name="T13">(scaled)</text:span></text:p>
              </table:table-cell>
            </table:table-row>
            <table:table-row table:style-name="ro4" table:default-cell-style-name="ce1">
              <table:table-cell table:style-name="ce2">
                <text:p text:style-name="P23"><text:span text:style-name="T17">Entropy</text:span></text:p>
              </table:table-cell>
              <table:table-cell>
                <text:p text:style-name="P10"><text:span text:style-name="T13">log 2</text:span></text:p>
                <text:p text:style-name="P10"><text:span text:style-name="T13">~ 0.69</text:span></text:p>
              </table:table-cell>
              <table:table-cell>
                <text:p text:style-name="P10"><text:span text:style-name="T13">0.693147</text:span></text:p>
              </table:table-cell>
            </table:table-row>
            <table:table-row table:style-name="ro4" table:default-cell-style-name="ce1">
              <table:table-cell table:style-name="ce2">
                <text:p text:style-name="P23"><text:span text:style-name="T17">String order</text:span></text:p>
              </table:table-cell>
              <table:table-cell>
                <text:p text:style-name="P10"><text:span text:style-name="T13">4/9</text:span></text:p>
                <text:p text:style-name="P10"><text:span text:style-name="T13">~ 0.44</text:span></text:p>
              </table:table-cell>
              <table:table-cell>
                <text:p text:style-name="P10"><text:span text:style-name="T13">0.444444</text:span></text:p>
              </table:table-cell>
            </table:table-row>
            <table:table-row table:style-name="ro3" table:default-cell-style-name="ce1">
              <table:table-cell table:style-name="ce2">
                <text:p text:style-name="P23"><text:span text:style-name="T17">Correlation</text:span></text:p>
              </table:table-cell>
              <table:table-cell>
                <text:p text:style-name="P10"><text:span text:style-name="T13">Exponential</text:span></text:p>
                <text:p text:style-name="P10"><text:span text:style-name="T13">decay</text:span></text:p>
              </table:table-cell>
              <table:table-cell>
                <text:p text:style-name="P10"><text:span text:style-name="T13">Exponential decay</text:span></text:p>
              </table:table-cell>
            </table:table-row>
          </table:table>
          <draw:image xlink:href="Pictures/TablePreview2.svm" xlink:type="simple" xlink:show="embed" xlink:actuate="onLoad"/>
        </draw:frame>
        <draw:frame draw:style-name="gr38" draw:text-style-name="P24" draw:layer="layout" svg:width="11.857cm" svg:height="7.129cm" svg:x="15.141cm" svg:y="2.843cm">
          <draw:text-box>
            <text:p><text:span text:style-name="T27">Computational conditions:</text:span></text:p>
            <text:list text:style-name="L1">
              <text:list-item>
                <text:p><text:span text:style-name="T28">N = 200 (number of spin), OBC</text:span></text:p>
                <text:p><text:span text:style-name="T28">but N = 100,200,300 is used for scaling</text:span></text:p>
              </text:list-item>
              <text:list-item>
                <text:p><text:span text:style-name="T28">Correlation functions: Let i0 is the centering site (i0=N/2) and calculate until i0+r=N</text:span></text:p>
              </text:list-item>
              <text:list-item>
                <text:p><text:span text:style-name="T28">String order correlation function (α=z)</text:span></text:p>
              </text:list-item>
            </text:list>
            <text:p><text:span text:style-name="T28"/></text:p>
            <text:p><text:span text:style-name="T28"/></text:p>
            <text:p><text:span text:style-name="T28"/></text:p>
            <text:p><text:span text:style-name="T28"/></text:p>
            <text:list text:continue-numbering="true" text:style-name="L1">
              <text:list-item>
                <text:p><text:span text:style-name="T26">Correlation function (</text:span><text:span text:style-name="T28">α=x,y,z)</text:span></text:p>
              </text:list-item>
            </text:list>
          </draw:text-box>
        </draw:frame>
        <draw:frame draw:style-name="gr2" draw:text-style-name="P2" draw:layer="layout" svg:width="8.156cm" svg:height="1.672cm" svg:x="16.857cm" svg:y="6.484cm">
          <draw:image xlink:href="Pictures/10000001000003C1000000C50363C0DD.png" xlink:type="simple" xlink:show="embed" xlink:actuate="onLoad" draw:mime-type="image/png">
            <text:p/>
          </draw:image>
        </draw:frame>
        <draw:frame draw:style-name="gr2" draw:text-style-name="P2" draw:layer="layout" svg:width="6.977cm" svg:height="1.43cm" svg:x="17.201cm" svg:y="9.151cm">
          <draw:image xlink:href="Pictures/10000001000003C1000000C573350A38.png" xlink:type="simple" xlink:show="embed" xlink:actuate="onLoad" draw:mime-type="image/png">
            <text:p/>
          </draw:image>
        </draw:frame>
        <draw:frame draw:style-name="gr2" draw:text-style-name="P2" draw:layer="layout" svg:width="9.753cm" svg:height="8.633cm" svg:x="14.476cm" svg:y="11.347cm">
          <draw:image xlink:href="Pictures/10001E710000E02C0000C670B3EDF066.pdf" xlink:type="simple" xlink:show="embed" xlink:actuate="onLoad" draw:mime-type="application/pdf" loext:page-number="0">
            <text:p/>
          </draw:image>
          <draw:image xlink:href="Pictures/100000010000087900000780822C90CE.png" xlink:type="simple" xlink:show="embed" xlink:actuate="onLoad" draw:mime-type="image/png"/>
        </draw:frame>
        <draw:frame draw:style-name="gr3" draw:text-style-name="P25" draw:layer="layout" svg:width="9.431cm" svg:height="0.725cm" svg:x="15.139cm" svg:y="19.88cm">
          <draw:text-box>
            <text:p><text:span text:style-name="T29">System size scaling of ground energy per site</text:span></text:p>
          </draw:text-box>
        </draw:frame>
        <draw:frame draw:style-name="gr39" draw:text-style-name="P26" draw:layer="layout" svg:width="11.514cm" svg:height="5.292cm" svg:x="1.74cm" svg:y="15.018cm">
          <draw:text-box>
            <text:p><text:span text:style-name="T30">Ground energy</text:span></text:p>
            <text:p><text:span text:style-name="T28">Due to the constant difference of the exact-solvable form (where the ground energy is 0.0) and coded AKLT Hamiltonian, the true ground energy (per site) is </text:span></text:p>
            <text:p><text:span text:style-name="T28"/></text:p>
            <text:p><text:span text:style-name="T28">-2/3*cos(θ), θ=arctan(1/3) = -0.6324555</text:span></text:p>
            <text:p><text:span text:style-name="T28"/></text:p>
            <text:p><text:span text:style-name="T28"/></text:p>
          </draw:text-box>
        </draw:frame>
        <presentation:notes draw:style-name="dp2">
          <draw:page-thumbnail draw:style-name="gr8"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2" draw:text-style-name="P2" draw:layer="layout" svg:width="6.35cm" svg:height="4.75cm" svg:x="14.623cm" svg:y="8.13cm">
          <draw:image xlink:href="Pictures/1000000000000280000001E08DE80222.png" xlink:type="simple" xlink:show="embed" xlink:actuate="onLoad" draw:mime-type="image/png">
            <text:p/>
          </draw:image>
        </draw:frame>
        <draw:frame draw:style-name="gr2" draw:text-style-name="P2" draw:layer="layout" svg:width="6.35cm" svg:height="4.75cm" svg:x="15.431cm" svg:y="14.405cm">
          <draw:image xlink:href="Pictures/1000000000000280000001E0A643510D.png" xlink:type="simple" xlink:show="embed" xlink:actuate="onLoad" draw:mime-type="image/png">
            <text:p/>
          </draw:image>
        </draw:frame>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1"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40" draw:text-style-name="P5" draw:layer="layout" svg:width="18.693cm" svg:height="4.169cm" svg:x="0.466cm" svg:y="1.992cm">
          <draw:text-box>
            <text:p><text:span text:style-name="T7">Sampling</text:span></text:p>
            <text:p><text:span text:style-name="T22">We calculate the expectation values using sampling generated from the resulting MPS through DMRG, to know how big samples is enough to recover the true expectation value. </text:span></text:p>
            <text:p><text:span text:style-name="T22">We calculate the z-axis spin and the string correlator, and compare the results from the normally calculated value in MPS term (true) and the samplings (relative error). </text:span></text:p>
            <text:p><text:span text:style-name="T22">For simplicity, we use the AKLT for comparison.</text:span></text:p>
          </draw:text-box>
        </draw:frame>
        <draw:g draw:style-name="gr4">
          <draw:frame draw:style-name="gr41" draw:text-style-name="P27" draw:layer="layout" svg:width="8.403cm" svg:height="4.824cm" svg:x="19.379cm" svg:y="4.24cm">
            <draw:text-box>
              <text:p text:style-name="P14"><text:span text:style-name="T31">Computational conditions:</text:span></text:p>
              <text:list text:style-name="L1">
                <text:list-item>
                  <text:p text:style-name="P14"><text:span text:style-name="T32">N = 10 </text:span><text:span text:style-name="T33">(</text:span><text:span text:style-name="T34">number of spin), θ=arctan(1/3) [equivalent to AKLT]</text:span></text:p>
                </text:list-item>
                <text:list-item>
                  <text:p text:style-name="P14"><text:span text:style-name="T34">String order correlation function (α=z)</text:span></text:p>
                </text:list-item>
              </text:list>
              <text:p text:style-name="P14"><text:span text:style-name="T34"/></text:p>
              <text:p text:style-name="P14"><text:span text:style-name="T34"/></text:p>
              <text:p text:style-name="P14"><text:span text:style-name="T34"/></text:p>
              <text:list text:continue-numbering="true" text:style-name="L1">
                <text:list-item>
                  <text:p text:style-name="P14"><text:span text:style-name="T35">Correlation function (</text:span><text:span text:style-name="T34">α=z)</text:span></text:p>
                </text:list-item>
              </text:list>
            </draw:text-box>
          </draw:frame>
          <draw:frame draw:style-name="gr2" draw:text-style-name="P28" draw:layer="layout" svg:width="6.025cm" svg:height="1.235cm" svg:x="20.727cm" svg:y="6.268cm">
            <draw:image xlink:href="Pictures/10000001000003C1000000C50363C0DD.png" xlink:type="simple" xlink:show="embed" xlink:actuate="onLoad" draw:mime-type="image/png">
              <text:p/>
            </draw:image>
          </draw:frame>
          <draw:frame draw:style-name="gr2" draw:text-style-name="P28" draw:layer="layout" svg:width="5.436cm" svg:height="1.114cm" svg:x="20.802cm" svg:y="8.266cm">
            <draw:image xlink:href="Pictures/10000001000003C1000000C573350A38.png" xlink:type="simple" xlink:show="embed" xlink:actuate="onLoad" draw:mime-type="image/png">
              <text:p/>
            </draw:image>
          </draw:frame>
        </draw:g>
        <draw:frame draw:style-name="gr6" draw:text-style-name="P6" draw:layer="layout" svg:width="8.282cm" svg:height="0.999cm" svg:x="19.159cm" svg:y="2.672cm">
          <draw:object xlink:href="./Object 1" xlink:type="simple" xlink:show="embed" xlink:actuate="onLoad">
            <loext:p/>
          </draw:object>
          <draw:image xlink:href="./ObjectReplacements/Object 1" xlink:type="simple" xlink:show="embed" xlink:actuate="onLoad"/>
        </draw:frame>
        <draw:frame draw:style-name="gr2" draw:text-style-name="P2" draw:layer="layout" svg:width="6.35cm" svg:height="4.75cm" svg:x="10.094cm" svg:y="14.405cm">
          <draw:image xlink:href="Pictures/1000000000000280000001E0520CEBC7.png" xlink:type="simple" xlink:show="embed" xlink:actuate="onLoad" draw:mime-type="image/png">
            <text:p/>
          </draw:image>
        </draw:frame>
        <draw:frame draw:style-name="gr42" draw:text-style-name="P29" draw:layer="layout" svg:width="4.973cm" svg:height="0.725cm" svg:x="11.196cm" svg:y="13.68cm">
          <draw:text-box>
            <text:p text:style-name="P6"><text:span text:style-name="T36"># of sample: 100</text:span></text:p>
          </draw:text-box>
        </draw:frame>
        <draw:frame draw:style-name="gr42" draw:text-style-name="P29" draw:layer="layout" svg:width="4.973cm" svg:height="0.725cm" svg:x="16.444cm" svg:y="13.68cm">
          <draw:text-box>
            <text:p text:style-name="P6"><text:span text:style-name="T36"># of sample: 500</text:span></text:p>
          </draw:text-box>
        </draw:frame>
        <draw:frame draw:style-name="gr2" draw:text-style-name="P2" draw:layer="layout" svg:width="6.35cm" svg:height="4.75cm" svg:x="9.274cm" svg:y="8.13cm">
          <draw:image xlink:href="Pictures/1000000000000280000001E05D70F6AF.png" xlink:type="simple" xlink:show="embed" xlink:actuate="onLoad" draw:mime-type="image/png">
            <text:p/>
          </draw:image>
        </draw:frame>
        <draw:frame draw:style-name="gr2" draw:text-style-name="P2" draw:layer="layout" svg:width="9.144cm" svg:height="6.833cm" svg:x="0.746cm" svg:y="6.946cm">
          <draw:image xlink:href="Pictures/1000000000000280000001E00F56EEAD.png" xlink:type="simple" xlink:show="embed" xlink:actuate="onLoad" draw:mime-type="image/png">
            <text:p/>
          </draw:image>
        </draw:frame>
        <draw:frame draw:style-name="gr6" draw:text-style-name="P6" draw:layer="layout" svg:width="2.338cm" svg:height="0.812cm" svg:x="6.002cm" svg:y="7.741cm">
          <draw:object xlink:href="./Object 2" xlink:type="simple" xlink:show="embed" xlink:actuate="onLoad">
            <loext:p/>
          </draw:object>
          <draw:image xlink:href="./ObjectReplacements/Object 2" xlink:type="simple" xlink:show="embed" xlink:actuate="onLoad"/>
        </draw:frame>
        <draw:frame draw:style-name="gr2" draw:text-style-name="P2" draw:layer="layout" svg:width="9.144cm" svg:height="6.833cm" svg:x="0.793cm" svg:y="12.88cm">
          <draw:image xlink:href="Pictures/1000000000000280000001E0B96F4DBE.png" xlink:type="simple" xlink:show="embed" xlink:actuate="onLoad" draw:mime-type="image/png">
            <text:p/>
          </draw:image>
        </draw:frame>
        <draw:frame draw:style-name="gr6" draw:text-style-name="P6" draw:layer="layout" svg:width="1.251cm" svg:height="0.777cm" svg:x="7.105cm" svg:y="14.013cm">
          <draw:object xlink:href="./Object 3" xlink:type="simple" xlink:show="embed" xlink:actuate="onLoad">
            <loext:p/>
          </draw:object>
          <draw:image xlink:href="./ObjectReplacements/Object 3" xlink:type="simple" xlink:show="embed" xlink:actuate="onLoad"/>
        </draw:frame>
        <draw:frame draw:style-name="gr42" draw:text-style-name="P29" draw:layer="layout" svg:width="4.973cm" svg:height="0.725cm" svg:x="10.29cm" svg:y="9.242cm">
          <draw:text-box>
            <text:p text:style-name="P6"><text:span text:style-name="T36"># of sample: 100</text:span></text:p>
          </draw:text-box>
        </draw:frame>
        <draw:frame draw:style-name="gr42" draw:text-style-name="P29" draw:layer="layout" svg:width="4.973cm" svg:height="0.725cm" svg:x="15.624cm" svg:y="9.267cm">
          <draw:text-box>
            <text:p text:style-name="P6"><text:span text:style-name="T36"># of sample: 500</text:span></text:p>
          </draw:text-box>
        </draw:frame>
        <presentation:notes draw:style-name="dp2">
          <draw:page-thumbnail draw:style-name="gr8"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1" draw:layer="layout" svg:width="5.464cm" svg:height="0.962cm" svg:x="22.367cm" svg:y="0.172cm">
          <draw:text-box>
            <text:p text:style-name="P3"><text:span text:style-name="T1">Generating data</text:span></text:p>
          </draw:text-box>
        </draw:frame>
        <draw:frame draw:style-name="gr22" draw:text-style-name="P30" draw:layer="layout" svg:width="12.887cm" svg:height="0.878cm" svg:x="0.466cm" svg:y="1.153cm">
          <draw:text-box>
            <text:p><text:span text:style-name="T7">Varying θ</text:span></text:p>
          </draw:text-box>
        </draw:frame>
        <draw:g draw:style-name="gr4">
          <draw:frame draw:style-name="gr43" draw:text-style-name="P27" draw:layer="layout" svg:width="8.403cm" svg:height="3.095cm" svg:x="19.379cm" svg:y="4.24cm">
            <draw:text-box>
              <text:p text:style-name="P14"><text:span text:style-name="T31">Computational conditions:</text:span></text:p>
              <text:list text:style-name="L1">
                <text:list-item>
                  <text:p text:style-name="P14"><text:span text:style-name="T32">N = 50,100,150 </text:span><text:span text:style-name="T33">(</text:span><text:span text:style-name="T34">number of spin)</text:span></text:p>
                </text:list-item>
                <text:list-item>
                  <text:p text:style-name="P14"><text:span text:style-name="T34">OBC</text:span></text:p>
                </text:list-item>
                <text:list-item>
                  <text:p text:style-name="P14"><text:span text:style-name="T34">Maxbonddim = 100</text:span></text:p>
                </text:list-item>
                <text:list-item>
                  <text:p text:style-name="P14"><text:span text:style-name="T34">max_sweep = 50 (stop before if energy_tol=1e-8)</text:span></text:p>
                </text:list-item>
              </text:list>
            </draw:text-box>
          </draw:frame>
        </draw:g>
        <draw:frame draw:style-name="gr6" draw:text-style-name="P6" draw:layer="layout" svg:width="8.282cm" svg:height="0.999cm" svg:x="19.159cm" svg:y="2.672cm">
          <draw:object xlink:href="./Object 4" xlink:type="simple" xlink:show="embed" xlink:actuate="onLoad">
            <loext:p/>
          </draw:object>
          <draw:image xlink:href="./ObjectReplacements/Object 4" xlink:type="simple" xlink:show="embed" xlink:actuate="onLoad"/>
        </draw:frame>
        <draw:frame draw:style-name="gr2" draw:text-style-name="P2" draw:layer="layout" svg:width="10.452cm" svg:height="9.592cm" svg:x="17.101cm" svg:y="9.017cm">
          <draw:image xlink:href="Pictures/1000000100000681000005F817FF4C25.png" xlink:type="simple" xlink:show="embed" xlink:actuate="onLoad" draw:mime-type="image/png">
            <text:p/>
          </draw:image>
        </draw:frame>
        <draw:frame draw:style-name="gr44" draw:text-style-name="P20" draw:layer="layout" svg:width="9.898cm" svg:height="1.199cm" svg:x="17.116cm" svg:y="7.766cm">
          <draw:text-box>
            <text:p><text:span text:style-name="T2">Ref. Bachelor Thesis</text:span></text:p>
            <text:p><text:span text:style-name="T2">Johannes Gutenberg University Mainz</text:span></text:p>
          </draw:text-box>
        </draw:frame>
        <draw:frame draw:style-name="gr2" draw:text-style-name="P2" draw:layer="layout" svg:width="11.36cm" svg:height="8.519cm" svg:x="1.09cm" svg:y="2.8cm">
          <draw:image xlink:href="Pictures/1000000000000280000001E0B2B706C4.png" xlink:type="simple" xlink:show="embed" xlink:actuate="onLoad" draw:mime-type="image/png">
            <text:p/>
          </draw:image>
        </draw:frame>
        <draw:frame draw:style-name="gr2" draw:text-style-name="P2" draw:layer="layout" svg:width="8.007cm" svg:height="6.005cm" svg:x="6.178cm" svg:y="14.234cm">
          <draw:image xlink:href="Pictures/1000000000000280000001E0A3DD3E8E.png" xlink:type="simple" xlink:show="embed" xlink:actuate="onLoad" draw:mime-type="image/png">
            <text:p/>
          </draw:image>
        </draw:frame>
        <draw:frame draw:style-name="gr6" draw:text-style-name="P6" draw:layer="layout" svg:width="1.34cm" svg:height="0.662cm" svg:x="10.167cm" svg:y="4.606cm">
          <draw:object xlink:href="./Object 5" xlink:type="simple" xlink:show="embed" xlink:actuate="onLoad">
            <loext:p/>
          </draw:object>
          <draw:image xlink:href="./ObjectReplacements/Object 5" xlink:type="simple" xlink:show="embed" xlink:actuate="onLoad"/>
        </draw:frame>
        <draw:frame draw:style-name="gr6" draw:text-style-name="P6" draw:layer="layout" svg:width="5.227cm" svg:height="0.639cm" svg:x="2.255cm" svg:y="11.882cm">
          <draw:object xlink:href="./Object 6" xlink:type="simple" xlink:show="embed" xlink:actuate="onLoad">
            <loext:p/>
          </draw:object>
          <draw:image xlink:href="./ObjectReplacements/Object 6" xlink:type="simple" xlink:show="embed" xlink:actuate="onLoad"/>
        </draw:frame>
        <draw:frame draw:style-name="gr6" draw:text-style-name="P6" draw:layer="layout" svg:width="6.973cm" svg:height="0.678cm" svg:x="2.181cm" svg:y="12.788cm">
          <draw:object xlink:href="./Object 7" xlink:type="simple" xlink:show="embed" xlink:actuate="onLoad">
            <loext:p/>
          </draw:object>
          <draw:image xlink:href="./ObjectReplacements/Object 7" xlink:type="simple" xlink:show="embed" xlink:actuate="onLoad"/>
        </draw:frame>
        <draw:frame draw:style-name="gr6" draw:text-style-name="P6" draw:layer="layout" svg:width="1.571cm" svg:height="0.662cm" svg:x="12.103cm" svg:y="16.855cm">
          <draw:object xlink:href="./Object 8" xlink:type="simple" xlink:show="embed" xlink:actuate="onLoad">
            <loext:p/>
          </draw:object>
          <draw:image xlink:href="./ObjectReplacements/Object 8" xlink:type="simple" xlink:show="embed" xlink:actuate="onLoad"/>
        </draw:frame>
        <presentation:notes draw:style-name="dp2">
          <draw:page-thumbnail draw:style-name="gr8"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1"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Varying θ, N = 150</text:span></text:p>
          </draw:text-box>
        </draw:frame>
        <draw:g draw:style-name="gr4">
          <draw:frame draw:style-name="gr43" draw:text-style-name="P27" draw:layer="layout" svg:width="8.403cm" svg:height="3.095cm" svg:x="19.379cm" svg:y="4.24cm">
            <draw:text-box>
              <text:p text:style-name="P14"><text:span text:style-name="T31">Computational conditions:</text:span></text:p>
              <text:list text:style-name="L1">
                <text:list-item>
                  <text:p text:style-name="P14"><text:span text:style-name="T32">N = 150 </text:span><text:span text:style-name="T33">(</text:span><text:span text:style-name="T34">number of spin)</text:span></text:p>
                </text:list-item>
                <text:list-item>
                  <text:p text:style-name="P14"><text:span text:style-name="T34">OBC</text:span></text:p>
                </text:list-item>
                <text:list-item>
                  <text:p text:style-name="P14"><text:span text:style-name="T34">Maxbonddim = 100</text:span></text:p>
                </text:list-item>
                <text:list-item>
                  <text:p text:style-name="P14"><text:span text:style-name="T34">max_sweep = 50 (stop before if energy_tol=1e-8)</text:span></text:p>
                </text:list-item>
              </text:list>
            </draw:text-box>
          </draw:frame>
        </draw:g>
        <draw:frame draw:style-name="gr6" draw:text-style-name="P6" draw:layer="layout" svg:width="8.282cm" svg:height="0.999cm" svg:x="19.159cm" svg:y="2.672cm">
          <draw:object xlink:href="./Object 9" xlink:type="simple" xlink:show="embed" xlink:actuate="onLoad">
            <loext:p/>
          </draw:object>
          <draw:image xlink:href="./ObjectReplacements/Object 9" xlink:type="simple" xlink:show="embed" xlink:actuate="onLoad"/>
        </draw:frame>
        <draw:g draw:style-name="gr4">
          <draw:frame draw:style-name="gr2" draw:text-style-name="P2" draw:layer="layout" svg:width="10.452cm" svg:height="9.592cm" svg:x="7.327cm" svg:y="7.621cm">
            <draw:image xlink:href="Pictures/1000000100000681000005F817FF4C25.png" xlink:type="simple" xlink:show="embed" xlink:actuate="onLoad" draw:mime-type="image/png">
              <text:p/>
            </draw:image>
          </draw:frame>
          <draw:frame draw:style-name="gr44" draw:text-style-name="P20" draw:layer="layout" svg:width="9.898cm" svg:height="1.199cm" svg:x="7.342cm" svg:y="6.37cm">
            <draw:text-box>
              <text:p><text:span text:style-name="T2">Ref. Bachelor Thesis</text:span></text:p>
              <text:p><text:span text:style-name="T2">Johannes Gutenberg University Mainz</text:span></text:p>
            </draw:text-box>
          </draw:frame>
        </draw:g>
        <draw:frame draw:style-name="gr6" draw:text-style-name="P6" draw:layer="layout" svg:width="2.765cm" svg:height="0.585cm" svg:x="14.176cm" svg:y="19.532cm">
          <draw:object xlink:href="./Object 16" xlink:type="simple" xlink:show="embed" xlink:actuate="onLoad">
            <loext:p/>
          </draw:object>
          <draw:image xlink:href="./ObjectReplacements/Object 16" xlink:type="simple" xlink:show="embed" xlink:actuate="onLoad"/>
        </draw:frame>
        <draw:g draw:style-name="gr4">
          <draw:frame draw:style-name="gr45" draw:text-style-name="P31" draw:layer="layout" svg:width="6.452cm" svg:height="4.826cm" svg:x="12.358cm" svg:y="1.752cm">
            <draw:image xlink:href="Pictures/1000000000000280000001E00F99CF3D.png" xlink:type="simple" xlink:show="embed" xlink:actuate="onLoad" draw:mime-type="image/png">
              <text:p/>
            </draw:image>
          </draw:frame>
          <draw:frame draw:style-name="gr46" draw:text-style-name="P32" draw:layer="layout" svg:width="2.368cm" svg:height="0.585cm" svg:x="15.875cm" svg:y="1.339cm">
            <draw:object xlink:href="./Object 15" xlink:type="simple" xlink:show="embed" xlink:actuate="onLoad">
              <loext:p/>
            </draw:object>
            <draw:image xlink:href="./ObjectReplacements/Object 15" xlink:type="simple" xlink:show="embed" xlink:actuate="onLoad"/>
          </draw:frame>
          <draw:frame draw:style-name="gr46" draw:text-style-name="P32" draw:layer="layout" svg:width="1.534cm" svg:height="0.957cm" svg:x="16.512cm" svg:y="5.146cm">
            <draw:object xlink:href="./Object 17" xlink:type="simple" xlink:show="embed" xlink:actuate="onLoad">
              <loext:p/>
            </draw:object>
            <draw:image xlink:href="./ObjectReplacements/Object 17" xlink:type="simple" xlink:show="embed" xlink:actuate="onLoad"/>
          </draw:frame>
        </draw:g>
        <draw:g draw:style-name="gr4">
          <draw:frame draw:style-name="gr2" draw:text-style-name="P2" draw:layer="layout" svg:width="6.439cm" svg:height="4.829cm" svg:x="17.332cm" svg:y="9.286cm">
            <draw:image xlink:href="Pictures/1000000000000280000001E066F59BD3.png" xlink:type="simple" xlink:show="embed" xlink:actuate="onLoad" draw:mime-type="image/png">
              <text:p/>
            </draw:image>
          </draw:frame>
          <draw:frame draw:style-name="gr6" draw:text-style-name="P6" draw:layer="layout" svg:width="2.816cm" svg:height="0.957cm" svg:x="19.501cm" svg:y="9.874cm">
            <draw:object xlink:href="./Object 13" xlink:type="simple" xlink:show="embed" xlink:actuate="onLoad">
              <loext:p/>
            </draw:object>
            <draw:image xlink:href="./ObjectReplacements/Object 13" xlink:type="simple" xlink:show="embed" xlink:actuate="onLoad"/>
          </draw:frame>
          <draw:frame draw:style-name="gr6" draw:text-style-name="P6" draw:layer="layout" svg:width="2.375cm" svg:height="0.585cm" svg:x="19.697cm" svg:y="12.127cm">
            <draw:object xlink:href="./Object 18" xlink:type="simple" xlink:show="embed" xlink:actuate="onLoad">
              <loext:p/>
            </draw:object>
            <draw:image xlink:href="./ObjectReplacements/Object 18" xlink:type="simple" xlink:show="embed" xlink:actuate="onLoad"/>
          </draw:frame>
        </draw:g>
        <draw:frame draw:style-name="gr6" draw:text-style-name="P6" draw:layer="layout" svg:width="2.426cm" svg:height="0.973cm" svg:x="1.666cm" svg:y="8.306cm">
          <draw:object xlink:href="./Object 10" xlink:type="simple" xlink:show="embed" xlink:actuate="onLoad">
            <loext:p/>
          </draw:object>
          <draw:image xlink:href="./ObjectReplacements/Object 10" xlink:type="simple" xlink:show="embed" xlink:actuate="onLoad"/>
        </draw:frame>
        <draw:frame draw:style-name="gr6" draw:text-style-name="P6" draw:layer="layout" svg:width="2.368cm" svg:height="0.585cm" svg:x="4.092cm" svg:y="8.694cm">
          <draw:object xlink:href="./Object 11" xlink:type="simple" xlink:show="embed" xlink:actuate="onLoad">
            <loext:p/>
          </draw:object>
          <draw:image xlink:href="./ObjectReplacements/Object 11" xlink:type="simple" xlink:show="embed" xlink:actuate="onLoad"/>
        </draw:frame>
        <draw:frame draw:style-name="gr2" draw:text-style-name="P2" draw:layer="layout" svg:width="6.452cm" svg:height="4.826cm" svg:x="7.9cm" svg:y="16.22cm">
          <draw:image xlink:href="Pictures/1000000000000280000001E0855C1EFF.png" xlink:type="simple" xlink:show="embed" xlink:actuate="onLoad" draw:mime-type="image/png">
            <text:p/>
          </draw:image>
        </draw:frame>
        <draw:frame draw:style-name="gr2" draw:text-style-name="P2" draw:layer="layout" svg:width="6.452cm" svg:height="4.826cm" svg:x="0.723cm" svg:y="9.575cm">
          <draw:image xlink:href="Pictures/1000000000000280000001E09E073F14.png" xlink:type="simple" xlink:show="embed" xlink:actuate="onLoad" draw:mime-type="image/png">
            <text:p/>
          </draw:image>
        </draw:frame>
        <presentation:notes draw:style-name="dp2">
          <draw:page-thumbnail draw:style-name="gr8" draw:layer="layout" svg:width="19.798cm" svg:height="11.136cm" svg:x="0.6cm" svg:y="2.257cm" draw:page-number="25" presentation:class="page"/>
          <draw:frame presentation:style-name="pr1"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17.81cm" svg:height="0.962cm" svg:x="0.072cm" svg:y="0.123cm">
          <draw:text-box>
            <text:p><text:span text:style-name="T1">Experiments with βVAE on string order in spin models</text:span></text:p>
          </draw:text-box>
        </draw:frame>
        <draw:frame draw:style-name="gr1" draw:text-style-name="P21" draw:layer="layout" svg:width="5.464cm" svg:height="0.962cm" svg:x="22.367cm" svg:y="0.172cm">
          <draw:text-box>
            <text:p text:style-name="P3"><text:span text:style-name="T1">dVAE</text:span></text:p>
          </draw:text-box>
        </draw:frame>
        <draw:g draw:style-name="gr4">
          <draw:frame draw:style-name="gr43" draw:text-style-name="P27" draw:layer="layout" svg:width="8.403cm" svg:height="3.095cm" svg:x="0.345cm" svg:y="1.473cm">
            <draw:text-box>
              <text:p text:style-name="P14"><text:span text:style-name="T31">Samples from DMRG</text:span></text:p>
              <text:list text:style-name="L1">
                <text:list-item>
                  <text:p text:style-name="P14"><text:span text:style-name="T33">N = 50, Nsamples=500</text:span></text:p>
                </text:list-item>
                <text:list-item>
                  <text:p text:style-name="P14"><text:span text:style-name="T34">OBC</text:span></text:p>
                </text:list-item>
                <text:list-item>
                  <text:p text:style-name="P14"><text:span text:style-name="T34">Maxbonddim = 100</text:span></text:p>
                </text:list-item>
                <text:list-item>
                  <text:p text:style-name="P14"><text:span text:style-name="T34">max_sweep = 50</text:span></text:p>
                  <text:p text:style-name="P14"><text:span text:style-name="T34">(stop before if energy_tol=1e-8)</text:span></text:p>
                </text:list-item>
              </text:list>
            </draw:text-box>
          </draw:frame>
        </draw:g>
        <draw:frame draw:style-name="gr47" draw:text-style-name="P33" draw:layer="layout" svg:width="6.981cm" svg:height="3.526cm" svg:x="20.531cm" svg:y="1.398cm">
          <draw:text-box>
            <text:p text:style-name="P3"><text:span text:style-name="T37">dVAE Conditions</text:span></text:p>
            <text:p text:style-name="P3"><text:span text:style-name="T38">Learning rate: 0.001</text:span></text:p>
            <text:p text:style-name="P3"><text:span text:style-name="T38"># of epochs: 10</text:span></text:p>
            <text:p text:style-name="P3"><text:span text:style-name="T38">Latent dimension: </text:span><text:span text:style-name="T39">5</text:span></text:p>
            <text:p text:style-name="P3"><text:span text:style-name="T39">Batch size: 50</text:span></text:p>
            <text:p text:style-name="P3"><text:span text:style-name="T40"/></text:p>
          </draw:text-box>
        </draw:frame>
        <draw:frame draw:style-name="gr48" draw:text-style-name="P5" draw:layer="layout" svg:width="25.307cm" svg:height="7.399cm" svg:x="1.152cm" svg:y="5.806cm">
          <draw:text-box>
            <text:p><text:span text:style-name="T7">Structure:</text:span></text:p>
            <text:p><text:span text:style-name="T10">Encoder</text:span></text:p>
            <text:p text:style-name="P13"><text:span text:style-name="T5">(input) → [CNN 32 kerne ls of size 3]+(ReLU) → [CNN </text:span><text:span text:style-name="T41">32 kernels of size 3]+(ReLU) → [mean over N]</text:span></text:p>
            <text:p text:style-name="P13"><text:span text:style-name="T41"><text:tab/></text:span><text:span text:style-name="T41">mean: <text:s text:c="5"/>[DENSE layer to 64 output]+(ReLU) → [DENSE to latent_dim output]</text:span></text:p>
            <text:p text:style-name="P13"><text:span text:style-name="T5"><text:tab/></text:span><text:span text:style-name="T5">var(log): <text:s/></text:span><text:span text:style-name="T41"><text:s/>[DENSE layer to 64 output]+(ReLU) → [DENSE to latent_dim output]</text:span></text:p>
            <text:p text:style-name="P13"><text:span text:style-name="T41"/></text:p>
            <text:p text:style-name="P13"><text:span text:style-name="T10">Decoder</text:span></text:p>
            <text:p text:style-name="P13"><text:span text:style-name="T5">(latent z) → [DENSE layer to α*N output]+(ReLU) → </text:span><text:span text:style-name="T41">[DENSE layer to α*N output]+(ReLU)</text:span></text:p>
            <text:p text:style-name="P13"><text:span text:style-name="T5">→ </text:span><text:span text:style-name="T41">[DENSE layer to K*N output]+(softmax)</text:span></text:p>
            <text:p text:style-name="P13"><text:span text:style-name="T41">→ (K*N output) = prob for each K-states at each site </text:span></text:p>
          </draw:text-box>
        </draw:frame>
        <presentation:notes draw:style-name="dp2">
          <draw:page-thumbnail draw:style-name="gr8" draw:layer="layout" svg:width="19.798cm" svg:height="11.136cm" svg:x="0.6cm" svg:y="2.257cm" draw:page-number="26"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26</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18:27.873363205</meta:creation-date>
    <dc:date>2026-05-26T20:45:10.222402615</dc:date>
    <meta:editing-duration>P1DT5H23M28S</meta:editing-duration>
    <meta:editing-cycles>100</meta:editing-cycles>
    <meta:generator>LibreOffice/26.2.2.2$Linux_X86_64 LibreOffice_project/620$Build-2</meta:generator>
    <meta:print-date>2026-05-12T15:18:12.142163034</meta:print-date>
    <meta:printed-by>PDF files</meta:printed-by>
    <meta:document-statistic meta:object-count="349"/>
  </office:meta>
</office:document-meta>
</file>

<file path=Object 1/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10/content.xml><?xml version="1.0" encoding="utf-8"?>
<math xmlns="http://www.w3.org/1998/Math/MathML" display="block">
  <semantics>
    <mrow>
      <mfrac>
        <mi>π</mi>
        <mn>4</mn>
      </mfrac>
      <mo stretchy="false">&lt;</mo>
      <mi>θ</mi>
      <mo stretchy="false">&lt;</mo>
      <mfrac>
        <mi>π</mi>
        <mn>2</mn>
      </mfrac>
    </mrow>
    <annotation encoding="StarMath 5.0">frac{%pi}{4} &lt;%theta &lt; frac{%pi}{2}</annotation>
  </semantics>
</math>
</file>

<file path=Object 11/content.xml><?xml version="1.0" encoding="utf-8"?>
<math xmlns="http://www.w3.org/1998/Math/MathML" display="block">
  <semantics>
    <mrow>
      <mi>θ</mi>
      <mo stretchy="false">=</mo>
      <mn>1.217</mn>
    </mrow>
    <annotation encoding="StarMath 5.0">%theta = 1.217</annotation>
  </semantics>
</math>
</file>

<file path=Object 12/content.xml><?xml version="1.0" encoding="utf-8"?>
<math xmlns="http://www.w3.org/1998/Math/MathML" display="block">
  <semantics>
    <mrow>
      <mrow>
        <mo stretchy="false">∫</mo>
        <msub>
          <mi>p</mi>
          <mi>θ</mi>
        </msub>
      </mrow>
      <mrow>
        <mo fence="true" form="prefix" stretchy="false">(</mo>
        <mrow>
          <mrow>
            <mi>x</mi>
            <mi>,</mi>
            <mi>z</mi>
          </mrow>
        </mrow>
        <mo fence="true" form="postfix" stretchy="false">)</mo>
      </mrow>
      <mi mathvariant="italic">dz</mi>
    </mrow>
    <annotation encoding="StarMath 5.0">int p_%theta (x,z)dz</annotation>
  </semantics>
</math>
</file>

<file path=Object 13/content.xml><?xml version="1.0" encoding="utf-8"?>
<math xmlns="http://www.w3.org/1998/Math/MathML" display="block">
  <semantics>
    <mrow>
      <mrow>
        <mo stretchy="false">−</mo>
        <mfrac>
          <mi>π</mi>
          <mn>4</mn>
        </mfrac>
      </mrow>
      <mo stretchy="false">&lt;</mo>
      <mi>θ</mi>
      <mo stretchy="false">&lt;</mo>
      <mfrac>
        <mi>π</mi>
        <mn>4</mn>
      </mfrac>
    </mrow>
    <annotation encoding="StarMath 5.0">-frac {%pi} {4} &lt; %theta &lt; frac{%pi}{4}</annotation>
  </semantics>
</math>
</file>

<file path=Object 14/content.xml><?xml version="1.0" encoding="utf-8"?>
<math xmlns="http://www.w3.org/1998/Math/MathML" display="block">
  <semantics>
    <mrow>
      <msub>
        <mtext>RC</mtext>
        <mtext>Schoulepnikoff2025</mtext>
      </msub>
      <mo stretchy="false">=</mo>
      <mn>16.695080104027806</mn>
    </mrow>
    <annotation encoding="StarMath 5.0">"RC"_{"Schoulepnikoff2025"} = 16.695080104027806</annotation>
  </semantics>
</math>
</file>

<file path=Object 15/content.xml><?xml version="1.0" encoding="utf-8"?>
<math xmlns="http://www.w3.org/1998/Math/MathML" display="block">
  <semantics>
    <mrow>
      <mi>θ</mi>
      <mo stretchy="false">=</mo>
      <mn>1.817</mn>
    </mrow>
    <annotation encoding="StarMath 5.0">%theta=1.817</annotation>
  </semantics>
</math>
</file>

<file path=Object 16/content.xml><?xml version="1.0" encoding="utf-8"?>
<math xmlns="http://www.w3.org/1998/Math/MathML" display="block">
  <semantics>
    <mrow>
      <mi>θ</mi>
      <mo stretchy="false">=</mo>
      <mrow>
        <mo stretchy="false">−</mo>
        <mn>1.483</mn>
      </mrow>
    </mrow>
    <annotation encoding="StarMath 5.0">%theta=-1.483</annotation>
  </semantics>
</math>
</file>

<file path=Object 17/content.xml><?xml version="1.0" encoding="utf-8"?>
<math xmlns="http://www.w3.org/1998/Math/MathML" display="block">
  <semantics>
    <mrow>
      <mfrac>
        <mi>π</mi>
        <mn>2</mn>
      </mfrac>
      <mo stretchy="false">&lt;</mo>
      <mi>θ</mi>
    </mrow>
    <annotation encoding="StarMath 5.0">frac{%pi}{2} &lt; %theta</annotation>
  </semantics>
</math>
</file>

<file path=Object 18/content.xml><?xml version="1.0" encoding="utf-8"?>
<math xmlns="http://www.w3.org/1998/Math/MathML" display="block">
  <semantics>
    <mrow>
      <mi>θ</mi>
      <mo stretchy="false">=</mo>
      <mn>0.017</mn>
    </mrow>
    <annotation encoding="StarMath 5.0">%theta = 0.017</annotation>
  </semantics>
</math>
</file>

<file path=Object 19/content.xml><?xml version="1.0" encoding="utf-8"?>
<math xmlns="http://www.w3.org/1998/Math/MathML" display="block">
  <semantics>
    <mrow>
      <msub>
        <mtext>RC</mtext>
        <mtext>generalized</mtext>
      </msub>
      <mo stretchy="false">=</mo>
      <mn>16.695080104027806</mn>
    </mrow>
    <annotation encoding="StarMath 5.0">"RC"_{"generalized"} = 16.695080104027806</annotation>
  </semantics>
</math>
</file>

<file path=Object 2/content.xml><?xml version="1.0" encoding="utf-8"?>
<math xmlns="http://www.w3.org/1998/Math/MathML" display="block">
  <semantics>
    <mrow>
      <msub>
        <mi>C</mi>
        <mi mathvariant="italic">STG</mi>
      </msub>
      <mrow>
        <mo fence="true" form="prefix" stretchy="false">(</mo>
        <mrow>
          <mi>r</mi>
        </mrow>
        <mo fence="true" form="postfix" stretchy="false">)</mo>
      </mrow>
    </mrow>
    <annotation encoding="StarMath 5.0">C_{STG}(r)</annotation>
  </semantics>
</math>
</file>

<file path=Object 20/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1/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2/content.xml><?xml version="1.0" encoding="utf-8"?>
<math xmlns="http://www.w3.org/1998/Math/MathML" display="block">
  <semantics>
    <mrow>
      <mi mathvariant="italic">Nd</mi>
      <msup>
        <mi>χ</mi>
        <mn>2</mn>
      </msup>
    </mrow>
    <annotation encoding="StarMath 5.0">Nd%chi^2</annotation>
  </semantics>
</math>
</file>

<file path=Object 23/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4/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5/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6/content.xml><?xml version="1.0" encoding="utf-8"?>
<math xmlns="http://www.w3.org/1998/Math/MathML" display="block">
  <semantics>
    <mrow>
      <mrow>
        <msub>
          <mi>O</mi>
          <mtext>STG</mtext>
        </msub>
        <mo stretchy="false">=</mo>
        <mi>C</mi>
      </mrow>
      <mrow>
        <mo fence="true" form="prefix" stretchy="false">(</mo>
        <mrow>
          <mrow>
            <mi>r</mi>
            <mo stretchy="false">=</mo>
            <msub>
              <mi>r</mi>
              <mi mathvariant="italic">max</mi>
            </msub>
          </mrow>
        </mrow>
        <mo fence="true" form="postfix" stretchy="false">)</mo>
      </mrow>
    </mrow>
    <annotation encoding="StarMath 5.0">O_{"STG"}=C(r=r_{max})</annotation>
  </semantics>
</math>
</file>

<file path=Object 3/content.xml><?xml version="1.0" encoding="utf-8"?>
<math xmlns="http://www.w3.org/1998/Math/MathML" display="block">
  <semantics>
    <mrow>
      <mo fence="true" form="prefix" stretchy="false">⟨</mo>
      <mrow>
        <mover accent="true">
          <msubsup>
            <mi>S</mi>
            <mi>i</mi>
            <mi>z</mi>
          </msubsup>
          <mo stretchy="false">^</mo>
        </mover>
      </mrow>
      <mo fence="true" form="postfix" stretchy="false">⟩</mo>
    </mrow>
    <annotation encoding="StarMath 5.0">langle hat{S}^z_i rangle </annotation>
  </semantics>
</math>
</file>

<file path=Object 4/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5/content.xml><?xml version="1.0" encoding="utf-8"?>
<math xmlns="http://www.w3.org/1998/Math/MathML" display="block">
  <semantics>
    <msub>
      <mi>O</mi>
      <mi mathvariant="italic">STG</mi>
    </msub>
    <annotation encoding="StarMath 5.0">O_STG</annotation>
  </semantics>
</math>
</file>

<file path=Object 6/content.xml><?xml version="1.0" encoding="utf-8"?>
<math xmlns="http://www.w3.org/1998/Math/MathML" display="block">
  <semantics>
    <mrow>
      <mi>C</mi>
      <mrow>
        <mrow>
          <mo fence="true" form="prefix" stretchy="false">(</mo>
          <mrow>
            <mi>r</mi>
          </mrow>
          <mo fence="true" form="postfix" stretchy="false">)</mo>
        </mrow>
        <mo stretchy="false">=</mo>
        <mi>C</mi>
      </mrow>
      <mrow>
        <mo fence="true" form="prefix" stretchy="false">(</mo>
        <mrow>
          <mrow>
            <mrow>
              <mi>i</mi>
              <mo stretchy="false">=</mo>
              <mn>1</mn>
            </mrow>
            <mi>,</mi>
            <mrow>
              <mi>j</mi>
              <mo stretchy="false">=</mo>
              <mrow>
                <mi>i</mi>
                <mo stretchy="false">+</mo>
                <mi>r</mi>
              </mrow>
            </mrow>
          </mrow>
        </mrow>
        <mo fence="true" form="postfix" stretchy="false">)</mo>
      </mrow>
    </mrow>
    <annotation encoding="StarMath 5.0">C(r) = C(i=1, j=i+r)</annotation>
  </semantics>
</math>
</file>

<file path=Object 7/content.xml><?xml version="1.0" encoding="utf-8"?>
<math xmlns="http://www.w3.org/1998/Math/MathML" display="block">
  <semantics>
    <mrow>
      <mrow>
        <mi>O</mi>
        <mo stretchy="false">=</mo>
        <mi>C</mi>
      </mrow>
      <mrow>
        <mrow>
          <mo fence="true" form="prefix" stretchy="false">(</mo>
          <mrow>
            <mrow>
              <mi>r</mi>
              <mo stretchy="false">=</mo>
              <msub>
                <mi>r</mi>
                <mi mathvariant="italic">max</mi>
              </msub>
            </mrow>
          </mrow>
          <mo fence="true" form="postfix" stretchy="false">)</mo>
        </mrow>
        <mo stretchy="false">=</mo>
        <mi>C</mi>
      </mrow>
      <mrow>
        <mo fence="true" form="prefix" stretchy="false">(</mo>
        <mrow>
          <mrow>
            <mrow>
              <mi>i</mi>
              <mo stretchy="false">=</mo>
              <mn>1</mn>
            </mrow>
            <mi>,</mi>
            <mrow>
              <mi>j</mi>
              <mo stretchy="false">=</mo>
              <mi>N</mi>
            </mrow>
          </mrow>
        </mrow>
        <mo fence="true" form="postfix" stretchy="false">)</mo>
      </mrow>
    </mrow>
    <annotation encoding="StarMath 5.0">O = C(r=r_{max}) =C(i=1,j=N)</annotation>
  </semantics>
</math>
</file>

<file path=Object 8/content.xml><?xml version="1.0" encoding="utf-8"?>
<math xmlns="http://www.w3.org/1998/Math/MathML" display="block">
  <semantics>
    <mrow>
      <msub>
        <mi>E</mi>
        <mn>0</mn>
      </msub>
      <mo stretchy="false">/</mo>
      <mi>N</mi>
    </mrow>
    <annotation encoding="StarMath 5.0">E_0/N</annotation>
  </semantics>
</math>
</file>

<file path=Object 9/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