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4"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4"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4" manifest:media-type="application/vnd.oasis.opendocument.formula"/>
  <manifest:file-entry manifest:full-path="Object 11/content.xml" manifest:media-type="text/xml"/>
  <manifest:file-entry manifest:full-path="Object 11/settings.xml" manifest:media-type="text/xml"/>
  <manifest:file-entry manifest:full-path="Object 11/Configurations2/" manifest:media-type="application/vnd.sun.xml.ui.configuration"/>
  <manifest:file-entry manifest:full-path="Object 11/" manifest:version="1.4"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4" manifest:media-type="application/vnd.oasis.opendocument.formula"/>
  <manifest:file-entry manifest:full-path="content.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4" manifest:media-type="application/vnd.oasis.opendocument.formula"/>
  <manifest:file-entry manifest:full-path="style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4" manifest:media-type="application/vnd.oasis.opendocument.formula"/>
  <manifest:file-entry manifest:full-path="Pictures/1000000000000280000001E066F59BD3.png" manifest:media-type="image/png"/>
  <manifest:file-entry manifest:full-path="Pictures/1000000000000280000001E00F99CF3D.png" manifest:media-type="image/png"/>
  <manifest:file-entry manifest:full-path="Pictures/1000000100000681000005F817FF4C25.png" manifest:media-type="image/png"/>
  <manifest:file-entry manifest:full-path="Pictures/1000000000000280000001E0855C1EFF.png" manifest:media-type="image/png"/>
  <manifest:file-entry manifest:full-path="Pictures/1000000000000280000001E00F56EEAD.png" manifest:media-type="image/png"/>
  <manifest:file-entry manifest:full-path="Pictures/1000000000000280000001E0520CEBC7.png" manifest:media-type="image/png"/>
  <manifest:file-entry manifest:full-path="Pictures/10007D4A000032860000076CEE5E80E1.svg" manifest:media-type="image/svg+xml"/>
  <manifest:file-entry manifest:full-path="Pictures/1000768400001E880000018F523E2DFA.svg" manifest:media-type="image/svg+xml"/>
  <manifest:file-entry manifest:full-path="Pictures/1000000000000280000001E0A3DD3E8E.png" manifest:media-type="image/png"/>
  <manifest:file-entry manifest:full-path="Pictures/100000010000004E0000000AC2A6708F.png" manifest:media-type="image/png"/>
  <manifest:file-entry manifest:full-path="Pictures/TablePreview1.svm" manifest:media-type=""/>
  <manifest:file-entry manifest:full-path="Pictures/100000010000020C000000287EA370C3.png" manifest:media-type="image/png"/>
  <manifest:file-entry manifest:full-path="Pictures/1000000000000280000001E08DE80222.png" manifest:media-type="image/png"/>
  <manifest:file-entry manifest:full-path="Pictures/TablePreview2.svm" manifest:media-type=""/>
  <manifest:file-entry manifest:full-path="Pictures/10000001000000BD000000271E463347.png" manifest:media-type="image/png"/>
  <manifest:file-entry manifest:full-path="Pictures/1000000000000280000001E05D70F6AF.png" manifest:media-type="image/png"/>
  <manifest:file-entry manifest:full-path="Pictures/10000001000001270000000FB19DDA25.png" manifest:media-type="image/png"/>
  <manifest:file-entry manifest:full-path="Pictures/100000000000108B000005BCE9DFA142.jpg" manifest:media-type="image/jpeg"/>
  <manifest:file-entry manifest:full-path="Pictures/100019F80000081B000001117C0AB55D.svg" manifest:media-type="image/svg+xml"/>
  <manifest:file-entry manifest:full-path="Pictures/10007041000013D3000003A71CECB53A.svg" manifest:media-type="image/svg+xml"/>
  <manifest:file-entry manifest:full-path="Pictures/10007BDF0000361C0000041E028B9A37.svg" manifest:media-type="image/svg+xml"/>
  <manifest:file-entry manifest:full-path="Pictures/1000000000000280000001E09E073F14.png" manifest:media-type="image/png"/>
  <manifest:file-entry manifest:full-path="Pictures/10000001000001E90000004818EEF98B.png" manifest:media-type="image/png"/>
  <manifest:file-entry manifest:full-path="Pictures/1000000000000280000001E0B2B706C4.png" manifest:media-type="image/png"/>
  <manifest:file-entry manifest:full-path="Pictures/10000001000001AA0000000F1BDB9AA2.png" manifest:media-type="image/png"/>
  <manifest:file-entry manifest:full-path="Pictures/1000314F0000138F000003FEDEB57DB3.svg" manifest:media-type="image/svg+xml"/>
  <manifest:file-entry manifest:full-path="Pictures/100000010000009400000027043BCA17.png" manifest:media-type="image/png"/>
  <manifest:file-entry manifest:full-path="Pictures/10004F3600000F55000003FED56732D6.svg" manifest:media-type="image/svg+xml"/>
  <manifest:file-entry manifest:full-path="Pictures/1000368C000010F80000019D6845E844.svg" manifest:media-type="image/svg+xml"/>
  <manifest:file-entry manifest:full-path="Pictures/1000000000000280000001E0A643510D.png" manifest:media-type="image/png"/>
  <manifest:file-entry manifest:full-path="Pictures/10000001000000A4000000100661E3D1.png" manifest:media-type="image/png"/>
  <manifest:file-entry manifest:full-path="Pictures/100073CB00002C0E0000018F7AC2D07B.svg" manifest:media-type="image/svg+xml"/>
  <manifest:file-entry manifest:full-path="Pictures/1000000000000280000001E0B96F4DBE.png" manifest:media-type="image/png"/>
  <manifest:file-entry manifest:full-path="Pictures/10001E710000E02C0000C670B3EDF066.pdf" manifest:media-type="application/pdf"/>
  <manifest:file-entry manifest:full-path="Pictures/1000708E00001DAF0000018F2132834D.svg" manifest:media-type="image/svg+xml"/>
  <manifest:file-entry manifest:full-path="Pictures/1000000100000354000000BDA2F6D301.png" manifest:media-type="image/png"/>
  <manifest:file-entry manifest:full-path="Pictures/10000001000005B1000000C102F0FB83.png" manifest:media-type="image/png"/>
  <manifest:file-entry manifest:full-path="Pictures/100000010000011F0000000F65E56557.png" manifest:media-type="image/png"/>
  <manifest:file-entry manifest:full-path="Pictures/10000001000000C000000023D732FB99.png" manifest:media-type="image/png"/>
  <manifest:file-entry manifest:full-path="Pictures/10000001000003C1000000C50363C0DD.png" manifest:media-type="image/png"/>
  <manifest:file-entry manifest:full-path="Pictures/10000001000003C1000000C573350A38.png" manifest:media-type="image/png"/>
  <manifest:file-entry manifest:full-path="Pictures/100000010000087900000780822C90CE.png" manifest:media-type="image/png"/>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4" manifest:media-type="application/vnd.oasis.opendocument.formula"/>
  <manifest:file-entry manifest:full-path="Thumbnails/thumbnail.png" manifest:media-type="image/png"/>
  <manifest:file-entry manifest:full-path="settings.xml" manifest:media-type="text/xml"/>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4"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4" manifest:media-type="application/vnd.oasis.opendocument.formula"/>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
  <manifest:file-entry manifest:full-path="ObjectReplacements/Object 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0" manifest:media-type=""/>
  <manifest:file-entry manifest:full-path="ObjectReplacements/Object 9" manifest:media-type=""/>
  <manifest:file-entry manifest:full-path="ObjectReplacements/Object 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4"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4"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4"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4"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4" manifest:media-type="application/vnd.oasis.opendocument.formula"/>
  <manifest:file-entry manifest:full-path="meta.xml" manifest:media-type="text/xml"/>
  <manifest:file-entry manifest:full-path="Configurations2/" manifest:media-type="application/vnd.sun.xml.ui.configuration"/>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in-height="0.712cm" loext:decorative="false"/>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color="#000000" draw:fill="none" draw:fill-color="#ffffff" draw:auto-grow-height="true" draw:auto-grow-width="false" fo:min-height="0.475cm" loext:decorative="false"/>
      <style:paragraph-properties style:writing-mode="lr-tb"/>
    </style:style>
    <style:style style:name="gr4" style:family="graphic">
      <style:graphic-properties loext:decorative="false"/>
    </style:style>
    <style:style style:name="gr5" style:family="graphic" style:parent-style-name="standard">
      <style:graphic-properties draw:stroke="none" svg:stroke-color="#000000" draw:fill="none" draw:fill-color="#ffffff" draw:auto-grow-height="true" draw:auto-grow-width="false" fo:min-height="6.508cm" loext:decorative="false"/>
      <style:paragraph-properties style:writing-mode="lr-tb"/>
    </style:style>
    <style:style style:name="gr6" style:family="graphic" style:parent-style-name="Object_20_with_20_no_20_fill_20_and_20_no_20_line">
      <style:graphic-properties draw:textarea-horizontal-align="center" draw:textarea-vertical-align="middle" draw:ole-draw-aspect="1" style:protect="size" loext:decorative="false"/>
    </style:style>
    <style:style style:name="gr7" style:family="graphic" style:parent-style-name="standard">
      <style:graphic-properties draw:stroke="none" svg:stroke-color="#000000" draw:fill="none" draw:fill-color="#ffffff" draw:auto-grow-height="true" draw:auto-grow-width="false" fo:min-height="2.98cm" loext:decorative="false"/>
      <style:paragraph-properties style:writing-mode="lr-tb"/>
    </style:style>
    <style:style style:name="gr8" style:family="graphic">
      <style:graphic-properties style:protect="size" loext:decorative="false"/>
    </style:style>
    <style:style style:name="gr9" style:family="graphic" style:parent-style-name="standard">
      <style:graphic-properties draw:stroke="none" svg:stroke-color="#000000" draw:fill="none" draw:fill-color="#ffffff" draw:auto-grow-height="true" draw:auto-grow-width="false" fo:min-height="1.804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in-height="1.765cm"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in-height="4.117cm" loext:decorative="false"/>
      <style:paragraph-properties style:writing-mode="lr-tb"/>
    </style:style>
    <style:style style:name="gr12" style:family="graphic" style:parent-style-name="standard">
      <style:graphic-properties draw:stroke="none" svg:stroke-color="#000000" draw:fill="none" draw:fill-color="#ffffff" draw:auto-grow-height="true" draw:auto-grow-width="false" fo:min-height="2.353cm" loext:decorative="false"/>
      <style:paragraph-properties style:writing-mode="lr-tb"/>
    </style:style>
    <style:style style:name="gr13" style:family="graphic" style:parent-style-name="standard">
      <style:graphic-properties draw:stroke="none" svg:stroke-color="#000000" draw:fill="none" draw:fill-color="#ffffff" draw:auto-grow-height="true" draw:auto-grow-width="false" fo:min-height="2.392cm"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in-height="3.568cm" loext:decorative="false"/>
      <style:paragraph-properties style:writing-mode="lr-tb"/>
    </style:style>
    <style:style style:name="gr15" style:family="graphic" style:parent-style-name="standard">
      <style:graphic-properties draw:stroke="none" svg:stroke-color="#000000" draw:fill="none" draw:fill-color="#ffffff" draw:auto-grow-height="true" draw:auto-grow-width="false" fo:min-height="5.881cm" loext:decorative="false"/>
      <style:paragraph-properties style:writing-mode="lr-tb"/>
    </style:style>
    <style:style style:name="gr16" style:family="graphic" style:parent-style-name="standard">
      <style:graphic-properties draw:stroke="none" svg:stroke-color="#000000" draw:fill="none" draw:fill-color="#ffffff" draw:auto-grow-height="true" draw:auto-grow-width="false" fo:min-height="4.156cm" loext:decorative="false"/>
      <style:paragraph-properties style:writing-mode="lr-tb"/>
    </style:style>
    <style:style style:name="gr17" style:family="graphic" style:parent-style-name="standard">
      <style:graphic-properties draw:stroke="none" svg:stroke-color="#000000" draw:fill="none" draw:fill-color="#ffffff" draw:auto-grow-height="true" draw:auto-grow-width="false" fo:min-height="0.589cm" loext:decorative="false"/>
      <style:paragraph-properties style:writing-mode="lr-tb"/>
    </style:style>
    <style:style style:name="gr18" style:family="graphic" style:parent-style-name="standard">
      <style:graphic-properties draw:stroke="none" svg:stroke-color="#000000" draw:fill="none" draw:fill-color="#ffffff" draw:auto-grow-height="true" draw:auto-grow-width="false" fo:min-height="1.177cm" loext:decorative="false"/>
      <style:paragraph-properties style:writing-mode="lr-tb"/>
    </style:style>
    <style:style style:name="gr19" style:family="graphic" style:parent-style-name="standard">
      <style:graphic-properties loext:decorative="false"/>
    </style:style>
    <style:style style:name="gr20" style:family="graphic" style:parent-style-name="standard">
      <style:graphic-properties draw:stroke="none" svg:stroke-color="#000000" draw:fill="none" draw:fill-color="#ffffff" draw:auto-grow-height="true" draw:auto-grow-width="false" fo:min-height="1.216cm" loext:decorative="false"/>
      <style:paragraph-properties style:writing-mode="lr-tb"/>
    </style:style>
    <style:style style:name="gr21" style:family="graphic" style:parent-style-name="standard">
      <style:graphic-properties draw:stroke="none" svg:stroke-color="#000000" draw:fill="none" draw:fill-color="#ffffff" draw:auto-grow-height="true" draw:auto-grow-width="false" fo:min-height="4.705cm" loext:decorative="false"/>
      <style:paragraph-properties style:writing-mode="lr-tb"/>
    </style:style>
    <style:style style:name="gr22" style:family="graphic" style:parent-style-name="standard">
      <style:graphic-properties draw:stroke="none" svg:stroke-color="#000000" draw:fill="none" draw:fill-color="#ffffff" draw:auto-grow-height="true" draw:auto-grow-width="false" fo:min-height="0.628cm" loext:decorative="false"/>
      <style:paragraph-properties style:writing-mode="lr-tb"/>
    </style:style>
    <style:style style:name="gr23" style:family="graphic" style:parent-style-name="standard">
      <style:graphic-properties draw:stroke="none" draw:fill="none" fo:min-height="8.059cm" loext:decorative="false"/>
      <style:paragraph-properties style:writing-mode="lr-tb"/>
    </style:style>
    <style:style style:name="gr24" style:family="graphic" style:parent-style-name="standard">
      <style:graphic-properties draw:stroke="none" svg:stroke-color="#000000" draw:fill="none" draw:fill-color="#ffffff" draw:auto-grow-height="true" draw:auto-grow-width="false" fo:min-height="4.744cm" loext:decorative="false"/>
      <style:paragraph-properties style:writing-mode="lr-tb"/>
    </style:style>
    <style:style style:name="gr25" style:family="graphic" style:parent-style-name="standard">
      <style:graphic-properties draw:stroke="none" svg:stroke-color="#000000" draw:fill="none" draw:fill-color="#ffffff" draw:auto-grow-height="true" draw:auto-grow-width="false" fo:min-height="7.684cm" loext:decorative="false"/>
      <style:paragraph-properties style:writing-mode="lr-tb"/>
    </style:style>
    <style:style style:name="gr26" style:family="graphic" style:parent-style-name="standard">
      <style:graphic-properties draw:stroke="none" svg:stroke-color="#000000" draw:fill="none" draw:fill-color="#ffffff" draw:auto-grow-height="true" draw:auto-grow-width="false" fo:min-height="0.759cm" loext:decorative="false"/>
      <style:paragraph-properties style:writing-mode="lr-tb"/>
    </style:style>
    <style:style style:name="gr27" style:family="graphic" style:parent-style-name="standard">
      <style:graphic-properties draw:stroke="none" svg:stroke-color="#000000" draw:fill="none" draw:fill-color="#ffffff" draw:auto-grow-height="true" draw:auto-grow-width="false" fo:min-height="1.783cm" loext:decorative="false"/>
      <style:paragraph-properties style:writing-mode="lr-tb"/>
    </style:style>
    <style:style style:name="gr28" style:family="graphic" style:parent-style-name="standard">
      <style:graphic-properties draw:stroke="none" svg:stroke-color="#000000" draw:fill="none" draw:fill-color="#ffffff" draw:auto-grow-height="true" draw:auto-grow-width="false" fo:min-height="6.879cm" loext:decorative="false"/>
      <style:paragraph-properties style:writing-mode="lr-tb"/>
    </style:style>
    <style:style style:name="gr29" style:family="graphic" style:parent-style-name="standard">
      <style:graphic-properties draw:stroke="none" svg:stroke-color="#000000" draw:fill="none" draw:fill-color="#ffffff" draw:auto-grow-height="true" draw:auto-grow-width="false" fo:min-height="5.042cm" loext:decorative="false"/>
      <style:paragraph-properties style:writing-mode="lr-tb"/>
    </style:style>
    <style:style style:name="gr30" style:family="graphic" style:parent-style-name="standard">
      <style:graphic-properties draw:stroke="none" svg:stroke-color="#000000" draw:fill="none" draw:fill-color="#ffffff" draw:auto-grow-height="true" draw:auto-grow-width="false" fo:min-height="3.919cm" loext:decorative="false"/>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false" fo:min-height="4.574cm" loext:decorative="false"/>
      <style:paragraph-properties style:writing-mode="lr-tb"/>
    </style:style>
    <style:style style:name="gr32" style:family="graphic" style:parent-style-name="standard">
      <style:graphic-properties draw:stroke="none" svg:stroke-color="#000000" draw:fill="none" draw:fill-color="#ffffff" draw:textarea-horizontal-align="center" draw:auto-grow-height="true" draw:auto-grow-width="false" fo:min-height="0.475cm" loext:decorative="false"/>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false" fo:min-height="2.845cm" loext:decorative="false"/>
      <style:paragraph-properties style:writing-mode="lr-tb"/>
    </style:style>
    <style:style style:name="gr34" style:family="graphic" style:parent-style-name="standard">
      <style:graphic-properties draw:stroke="none" svg:stroke-color="#000000" draw:fill="none" draw:fill-color="#ffffff" draw:auto-grow-height="true" draw:auto-grow-width="false" fo:min-height="0.949cm" loext:decorative="false"/>
      <style:paragraph-properties style:writing-mode="lr-tb"/>
    </style:style>
    <style:style style:name="gr35" style:family="graphic" style:parent-style-name="Object_20_with_20_no_20_fill_20_and_20_no_20_line">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loext:decorative="false"/>
    </style:style>
    <style:style style:name="gr36" style:family="graphic" style:parent-style-name="Object_20_with_20_no_20_fill_20_and_20_no_20_line">
      <style:graphic-properties draw:opacity="100%" draw:textarea-horizontal-align="center" draw:textarea-vertical-align="middle" draw:ole-draw-aspect="1" style:protect="size" loext:decorative="false"/>
    </style:style>
    <style:style style:name="pr1" style:family="presentation" style:parent-style-name="Default-notes">
      <style:graphic-properties draw:fill-color="#ffffff" draw:auto-grow-height="false" fo:min-height="13.365cm" loext:decorative="false"/>
      <style:paragraph-properties style:writing-mode="lr-tb"/>
    </style:style>
    <style:style style:name="co1" style:family="table-column">
      <style:table-column-properties style:column-width="1.028cm" style:use-optimal-column-width="false"/>
    </style:style>
    <style:style style:name="co2" style:family="table-column">
      <style:table-column-properties style:column-width="3.11cm" style:use-optimal-column-width="false"/>
    </style:style>
    <style:style style:name="ro1" style:family="table-row">
      <style:table-row-properties style:row-height="1.04cm" style:use-optimal-row-height="false"/>
    </style:style>
    <style:style style:name="ro2" style:family="table-row">
      <style:table-row-properties style:row-height="0.756cm" style:use-optimal-row-height="false"/>
    </style:style>
    <style:style style:name="ro3" style:family="table-row">
      <style:table-row-properties style:row-height="1.936cm" style:use-optimal-row-height="false"/>
    </style:style>
    <style:style style:name="ro4" style:family="table-row">
      <style:table-row-properties style:row-height="1.937cm" style:use-optimal-row-height="false"/>
    </style:style>
    <style:style style:name="ce1" style:family="table-cell">
      <loext:graphic-properties draw:textarea-vertical-align="middle"/>
      <style:paragraph-properties fo:text-align="center"/>
      <style:text-properties fo:font-size="14pt" style:font-size-asian="14pt" style:font-size-complex="14pt"/>
    </style:style>
    <style:style style:name="ce2" style:family="table-cell">
      <loext:graphic-properties draw:textarea-vertical-align="middle"/>
      <style:paragraph-properties fo:text-align="center"/>
      <style:text-properties fo:font-size="14pt" fo:font-weight="bold" style:font-size-asian="14pt" style:font-weight-asian="bold" style:font-size-complex="14pt" style:font-weight-complex="bold"/>
    </style:style>
    <style:style style:name="P1" style:family="paragraph">
      <loext:graphic-properties draw:fill="none" draw:fill-color="#ffffff"/>
      <style:text-properties fo:font-size="21pt" fo:font-weight="bold" style:font-size-asian="21pt" style:font-weight-asian="bold" style:font-size-complex="21pt" style:font-weight-complex="bold"/>
    </style:style>
    <style:style style:name="P2" style:family="paragraph">
      <loext:graphic-properties draw:fill="none"/>
      <style:paragraph-properties fo:text-align="center"/>
    </style:style>
    <style:style style:name="P3" style:family="paragraph">
      <style:paragraph-properties fo:text-align="right"/>
    </style:style>
    <style:style style:name="P4" style:family="paragraph">
      <loext:graphic-properties draw:fill="none" draw:fill-color="#ffffff"/>
      <style:paragraph-properties fo:text-align="right"/>
    </style:style>
    <style:style style:name="P5" style:family="paragraph">
      <loext:graphic-properties draw:fill="none" draw:fill-color="#ffffff"/>
      <style:text-properties fo:font-weight="bold" style:font-weight-asian="bold" style:font-weight-complex="bold"/>
    </style:style>
    <style:style style:name="P6" style:family="paragraph">
      <style:paragraph-properties fo:text-align="center"/>
    </style:style>
    <style:style style:name="P7" style:family="paragraph">
      <loext:graphic-properties draw:fill-color="#ffffff"/>
    </style:style>
    <style:style style:name="P8" style:family="paragraph">
      <loext:graphic-properties draw:fill="none" draw:fill-color="#ffffff"/>
      <style:text-properties fo:font-size="15pt" fo:font-weight="bold" style:font-size-asian="15pt" style:font-weight-asian="bold" style:font-size-complex="15pt" style:font-weight-complex="bold"/>
    </style:style>
    <style:style style:name="P9" style:family="paragraph">
      <loext:graphic-properties draw:fill="none" draw:fill-color="#ffffff"/>
      <style:text-properties fo:font-weight="normal" style:font-weight-asian="normal" style:font-weight-complex="normal"/>
    </style:style>
    <style:style style:name="P10" style:family="paragraph">
      <style:paragraph-properties fo:text-align="center"/>
      <style:text-properties fo:font-size="14pt" style:font-size-asian="14pt" style:font-size-complex="14pt"/>
    </style:style>
    <style:style style:name="P11" style:family="paragraph">
      <style:paragraph-properties fo:text-align="center"/>
      <style:text-properties style:font-size-asian="14pt" style:font-size-complex="14pt"/>
    </style:style>
    <style:style style:name="P12" style:family="paragraph">
      <loext:graphic-properties draw:fill="none"/>
      <style:text-properties fo:font-size="12pt" style:font-size-asian="12pt" style:font-size-complex="12pt"/>
    </style:style>
    <style:style style:name="P13" style:family="paragraph">
      <style:paragraph-properties fo:margin-left="0cm" fo:margin-right="0cm" fo:margin-top="0cm" fo:margin-bottom="0cm" fo:line-height="100%" fo:text-indent="0cm"/>
    </style:style>
    <style:style style:name="P14" style:family="paragraph">
      <loext:graphic-properties draw:fill="none" draw:fill-color="#ffffff"/>
    </style:style>
    <style:style style:name="P15" style:family="paragraph">
      <loext:graphic-properties draw:fill="none" draw:fill-color="#ffffff"/>
      <style:paragraph-properties fo:text-align="right"/>
      <style:text-properties fo:font-size="21pt" fo:font-weight="bold" style:font-size-asian="21pt" style:font-weight-asian="bold" style:font-size-complex="21pt" style:font-weight-complex="bold"/>
    </style:style>
    <style:style style:name="P16" style:family="paragraph">
      <style:paragraph-properties fo:text-align="center"/>
      <style:text-properties fo:font-size="14pt" fo:font-weight="bold" style:font-size-asian="14pt" style:font-weight-asian="bold" style:font-size-complex="14pt" style:font-weight-complex="bold"/>
    </style:style>
    <style:style style:name="P17" style:family="paragraph">
      <style:paragraph-properties fo:text-align="center"/>
      <style:text-properties fo:font-weight="bold" style:font-size-asian="14pt" style:font-weight-asian="bold" style:font-size-complex="14pt" style:font-weight-complex="bold"/>
    </style:style>
    <style:style style:name="P18" style:family="paragraph">
      <loext:graphic-properties draw:fill="none" draw:fill-color="#ffffff"/>
      <style:text-properties style:text-underline-style="solid" style:text-underline-width="auto" style:text-underline-color="font-color"/>
    </style:style>
    <style:style style:name="P19" style:family="paragraph">
      <loext:graphic-properties draw:fill="none" draw:fill-color="#ffffff"/>
      <style:text-properties fo:font-size="12pt"/>
    </style:style>
    <style:style style:name="P20" style:family="paragraph">
      <loext:graphic-properties draw:fill="none" draw:fill-color="#ffffff"/>
      <style:text-properties fo:font-style="normal" style:text-underline-style="solid" style:text-underline-width="auto" style:text-underline-color="font-color" style:font-style-asian="normal" style:font-style-complex="normal"/>
    </style:style>
    <style:style style:name="P21" style:family="paragraph">
      <style:paragraph-properties fo:text-align="left"/>
    </style:style>
    <style:style style:name="P22" style:family="paragraph">
      <loext:graphic-properties draw:fill="none" draw:fill-color="#ffffff"/>
      <style:paragraph-properties fo:text-align="left"/>
      <style:text-properties fo:font-size="12pt" style:text-underline-style="solid" style:text-underline-width="auto" style:text-underline-color="font-color" style:font-size-asian="12pt" style:font-size-complex="12pt"/>
    </style:style>
    <style:style style:name="P23" style:family="paragraph">
      <loext:graphic-properties draw:fill="none"/>
      <style:paragraph-properties fo:text-align="center"/>
      <style:text-properties fo:font-size="15pt"/>
    </style:style>
    <style:style style:name="P24" style:family="paragraph">
      <loext:graphic-properties draw:fill="none" draw:fill-color="#ffffff"/>
      <style:paragraph-properties fo:text-align="center"/>
      <style:text-properties fo:font-weight="bold" style:font-weight-asian="bold" style:font-weight-complex="bold"/>
    </style:style>
    <style:style style:name="P25" style:family="paragraph">
      <loext:graphic-properties draw:fill="none" draw:fill-color="#ffffff"/>
      <style:text-properties fo:font-size="20pt" fo:font-weight="bold" style:font-size-asian="20pt" style:font-weight-asian="bold" style:font-size-complex="20pt" style:font-weight-complex="bold"/>
    </style:style>
    <style:style style:name="P26" style:family="paragraph">
      <loext:graphic-properties draw:fill="none" draw:opacity="100%"/>
      <style:paragraph-properties fo:text-align="center"/>
    </style:style>
    <style:style style:name="P27" style:family="paragraph">
      <loext:graphic-properties draw:opacity="100%"/>
      <style:paragraph-properties fo:text-align="center"/>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2pt" style:font-size-asian="12pt" style:font-size-complex="12pt"/>
    </style:style>
    <style:style style:name="T3" style:family="text">
      <style:text-properties fo:font-size="16pt" fo:font-weight="bold" style:font-size-asian="16pt" style:font-weight-asian="bold" style:font-size-complex="16pt" style:font-weight-complex="bold"/>
    </style:style>
    <style:style style:name="T4" style:family="text">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bold" style:letter-kerning="true" style:font-name-asian="Noto Sans CJK SC" style:font-size-asian="15pt" style:font-style-asian="normal" style:font-weight-asian="bold" style:font-name-complex="Lohit Devanagari" style:font-size-complex="15pt" style:font-style-complex="normal" style:font-weight-complex="bold"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normal" style:letter-kerning="true" style:font-name-asian="Noto Sans CJK SC" style:font-size-asian="15pt" style:font-style-asian="normal" style:font-weight-asian="normal" style:font-name-complex="Lohit Devanagari" style:font-size-complex="15pt" style:font-style-complex="normal" style:font-weight-complex="normal" style:text-emphasize="none" style:font-relief="none" style:text-overline-style="none" style:text-overline-color="font-color"/>
    </style:style>
    <style:style style:name="T6" style:family="text">
      <style:text-properties fo:font-size="15pt" fo:font-weight="normal" style:font-size-asian="15pt" style:font-weight-asian="normal" style:font-size-complex="15pt" style:font-weight-complex="normal"/>
    </style:style>
    <style:style style:name="T7" style:family="text">
      <style:text-properties fo:font-size="15pt" fo:font-weight="bold" style:font-size-asian="15pt" style:font-weight-asian="bold" style:font-size-complex="15pt" style:font-weight-complex="bold"/>
    </style:style>
    <style:style style:name="T8"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bold" style:letter-kerning="true" style:font-name-asian="Noto Sans CJK SC"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T9" style:family="text">
      <style:text-properties fo:font-size="15pt" style:font-size-asian="15pt" style:font-size-complex="15pt"/>
    </style:style>
    <style:style style:name="T10"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11" style:family="text">
      <style:text-properties fo:font-size="15pt" fo:font-style="italic" fo:font-weight="normal" style:font-size-asian="15pt" style:font-style-asian="italic" style:font-weight-asian="normal" style:font-size-complex="15pt" style:font-style-complex="italic" style:font-weight-complex="normal"/>
    </style:style>
    <style:style style:name="T12" style:family="text">
      <style:text-properties fo:font-size="15pt" fo:font-style="normal" fo:font-weight="normal" style:font-size-asian="15pt" style:font-style-asian="normal" style:font-weight-asian="normal" style:font-size-complex="15pt" style:font-style-complex="normal" style:font-weight-complex="normal"/>
    </style:style>
    <style:style style:name="T13" style:family="text">
      <style:text-properties fo:font-size="14pt" style:font-size-asian="14pt" style:font-size-complex="14pt"/>
    </style:style>
    <style:style style:name="T14" style:family="text">
      <style:text-properties fo:font-size="15pt" fo:font-style="normal" style:text-underline-style="solid" style:text-underline-width="auto" style:text-underline-color="font-color" fo:font-weight="normal" style:font-size-asian="15pt" style:font-style-asian="normal" style:font-weight-asian="normal" style:font-size-complex="15pt" style:font-style-complex="normal" style:font-weight-complex="normal"/>
    </style:style>
    <style:style style:name="T15" style:family="text">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T16" style:family="text">
      <style:text-properties fo:font-size="15pt" fo:font-style="normal" style:text-underline-style="none" fo:font-weight="bold" style:font-size-asian="15pt" style:font-style-asian="normal" style:font-weight-asian="bold" style:font-size-complex="15pt" style:font-style-complex="normal" style:font-weight-complex="bold"/>
    </style:style>
    <style:style style:name="T17"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8" style:family="text">
      <style:text-properties fo:font-size="14pt" fo:font-weight="bold" style:font-size-asian="14pt" style:font-weight-asian="bold" style:font-size-complex="14pt" style:font-weight-complex="bold"/>
    </style:style>
    <style:style style:name="T19" style:family="text">
      <style:text-properties fo:font-size="14pt" style:text-underline-style="solid" style:text-underline-width="auto" style:text-underline-color="font-color" style:font-size-asian="14pt" style:font-size-complex="14pt"/>
    </style:style>
    <style:style style:name="T20" style:family="text">
      <style:text-properties fo:font-size="14pt" fo:font-style="normal" style:text-underline-style="none" style:font-size-asian="14pt" style:font-style-asian="normal" style:font-size-complex="14pt" style:font-style-complex="normal"/>
    </style:style>
    <style:style style:name="T21" style:family="text">
      <style:text-properties fo:font-size="12pt"/>
    </style:style>
    <style:style style:name="T22" style:family="text">
      <style:text-properties fo:font-size="14pt" fo:font-style="normal" style:text-underline-style="solid" style:text-underline-width="auto" style:text-underline-color="font-color" style:font-size-asian="14pt" style:font-style-asian="normal" style:font-size-complex="14pt" style:font-style-complex="normal"/>
    </style:style>
    <style:style style:name="T23" style:family="text">
      <style:text-properties fo:font-size="14pt" fo:font-weight="normal" style:font-size-asian="14pt" style:font-weight-asian="normal" style:font-size-complex="14pt" style:font-weight-complex="normal"/>
    </style:style>
    <style:style style:name="T24" style:family="text">
      <style:text-properties fo:font-size="12pt" style:text-underline-style="solid" style:text-underline-width="auto" style:text-underline-color="font-color" style:font-size-asian="12pt" style:font-size-complex="12pt"/>
    </style:style>
    <style:style style:name="T25"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26"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7" style:family="text">
      <style:text-properties fo:font-size="12pt" fo:font-style="normal" style:text-underline-style="none" style:font-size-asian="12pt" style:font-style-asian="normal" style:font-size-complex="12pt" style:font-style-complex="normal"/>
    </style:style>
    <style:style style:name="T28"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9" style:family="text">
      <style:text-properties fo:font-size="12pt"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17.81cm" svg:height="0.962cm" svg:x="0.072cm" svg:y="0.123cm">
          <draw:text-box>
            <text:p><text:span text:style-name="T1">VAEs </text:span><text:span text:style-name="T1">basic</text:span></text:p>
          </draw:text-box>
        </draw:frame>
        <draw:frame draw:style-name="gr2" draw:text-style-name="P2" draw:layer="layout" svg:width="13.79cm" svg:height="4.779cm" svg:x="13.475cm" svg:y="0.962cm">
          <draw:image xlink:href="Pictures/100000000000108B000005BCE9DFA142.jpg" xlink:type="simple" xlink:show="embed" xlink:actuate="onLoad" draw:mime-type="image/jpeg">
            <text:p/>
          </draw:image>
        </draw:frame>
        <draw:frame draw:style-name="gr3" draw:text-style-name="P4" draw:layer="layout" svg:width="5.193cm" svg:height="0.725cm" svg:x="22.072cm" svg:y="5.741cm">
          <draw:text-box>
            <text:p text:style-name="P3"><text:span text:style-name="T2">Schoulepnikoff</text:span><text:span text:style-name="T2">2025</text:span></text:p>
          </draw:text-box>
        </draw:frame>
        <draw:g draw:style-name="gr4">
          <draw:frame draw:style-name="gr5" draw:text-style-name="P5" draw:layer="layout" svg:width="12.887cm" svg:height="6.758cm" svg:x="1.152cm" svg:y="3.694cm">
            <draw:text-box>
              <text:p><text:span text:style-name="T3">Generative </text:span><text:span text:style-name="T3">model – </text:span><text:span text:style-name="T3">Decoder </text:span><text:span text:style-name="T3">pθ(x)</text:span></text:p>
              <text:p><text:span text:style-name="T4">Aim</text:span><text:span text:style-name="T5">: </text:span><text:span text:style-name="T5">optimize </text:span><text:span text:style-name="T5">parameter θ </text:span><text:span text:style-name="T5">to well </text:span><text:span text:style-name="T5">approximat</text:span><text:span text:style-name="T5">e the true </text:span><text:span text:style-name="T5">probabilistic </text:span><text:span text:style-name="T5">distribution </text:span><text:span text:style-name="T5">p(x)~</text:span><text:span text:style-name="T6">pθ(x), </text:span><text:span text:style-name="T6">namely</text:span><text:span text:style-name="T7"> </text:span><text:span text:style-name="T4">maximize</text:span><text:span text:style-name="T5"> </text:span><text:span text:style-name="T4">the </text:span><text:span text:style-name="T4">logarithmic </text:span><text:span text:style-name="T4">evidence</text:span><text:span text:style-name="T5"> </text:span><text:span text:style-name="T5">log[</text:span><text:span text:style-name="T6">pθ(x)]</text:span></text:p>
              <text:p><text:span text:style-name="T6"/></text:p>
              <text:p><text:span text:style-name="T7">Latent </text:span><text:span text:style-name="T7">variable z</text:span></text:p>
              <text:p><text:span text:style-name="T6">To </text:span><text:span text:style-name="T6">represent </text:span><text:span text:style-name="T6">more </text:span><text:span text:style-name="T6">complex </text:span><text:span text:style-name="T6">distribution, </text:span><text:span text:style-name="T6">we </text:span><text:span text:style-name="T6">introduce </text:span><text:span text:style-name="T6">the latent </text:span><text:span text:style-name="T6">variable z</text:span></text:p>
              <text:p><text:span text:style-name="T6"/></text:p>
              <text:p><text:span text:style-name="T6"/></text:p>
              <text:p><text:span text:style-name="T6">However, </text:span><text:span text:style-name="T6">this integral </text:span><text:span text:style-name="T6">is in general </text:span><text:span text:style-name="T6">intractable.</text:span></text:p>
            </draw:text-box>
          </draw:frame>
          <draw:frame draw:style-name="gr6" draw:text-style-name="P6" draw:layer="layout" svg:width="3.56cm" svg:height="0.907cm" svg:x="4.582cm" svg:y="8.688cm">
            <draw:object xlink:href="./Object 12" xlink:type="simple" xlink:show="embed" xlink:actuate="onLoad">
              <loext:p/>
            </draw:object>
            <draw:image xlink:href="./ObjectReplacements/Object 12" xlink:type="simple" xlink:show="embed" xlink:actuate="onLoad"/>
          </draw:frame>
        </draw:g>
        <draw:frame draw:style-name="gr7" draw:text-style-name="P5" draw:layer="layout" svg:width="12.273cm" svg:height="3.23cm" svg:x="13.574cm" svg:y="11.313cm">
          <draw:text-box>
            <text:p><text:span text:style-name="T8">Interferenc</text:span><text:span text:style-name="T8">e model </text:span><text:span text:style-name="T3">– </text:span><text:span text:style-name="T3">Encoder </text:span><text:span text:style-name="T3">qφ(x)</text:span></text:p>
            <text:p><text:span text:style-name="T7">Aim</text:span><text:span text:style-name="T6">: </text:span><text:span text:style-name="T6">optimize </text:span><text:span text:style-name="T6">parameter φ </text:span><text:span text:style-name="T6">to </text:span><text:span text:style-name="T6">approximat</text:span><text:span text:style-name="T6">e the </text:span><text:span text:style-name="T6">posterior </text:span><text:span text:style-name="T6">probability </text:span><text:span text:style-name="T6">pθ(z|x) (how </text:span><text:span text:style-name="T6">to map data </text:span><text:span text:style-name="T6">into latent </text:span><text:span text:style-name="T6">space), </text:span><text:span text:style-name="T6">qφ(x)~pθ(z|</text:span><text:span text:style-name="T6">x)</text:span></text:p>
            <text:p><text:span text:style-name="T6"/></text:p>
          </draw:text-box>
        </draw:frame>
        <presentation:notes draw:style-name="dp2">
          <draw:page-thumbnail draw:style-name="gr8"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draw:style-name="gr1" draw:text-style-name="P1" draw:layer="layout" svg:width="17.81cm" svg:height="0.962cm" svg:x="0.072cm" svg:y="0.123cm">
          <draw:text-box>
            <text:p><text:span text:style-name="T1">VAEs </text:span><text:span text:style-name="T1">basic</text:span></text:p>
          </draw:text-box>
        </draw:frame>
        <draw:frame draw:style-name="gr2" draw:text-style-name="P2" draw:layer="layout" svg:width="13.79cm" svg:height="4.779cm" svg:x="13.475cm" svg:y="0.619cm">
          <draw:image xlink:href="Pictures/100000000000108B000005BCE9DFA142.jpg" xlink:type="simple" xlink:show="embed" xlink:actuate="onLoad" draw:mime-type="image/jpeg">
            <text:p/>
          </draw:image>
        </draw:frame>
        <draw:frame draw:style-name="gr3" draw:text-style-name="P4" draw:layer="layout" svg:width="5.193cm" svg:height="0.725cm" svg:x="22.072cm" svg:y="5.226cm">
          <draw:text-box>
            <text:p text:style-name="P3"><text:span text:style-name="T2">Schoulepnikoff</text:span><text:span text:style-name="T2">2025</text:span></text:p>
          </draw:text-box>
        </draw:frame>
        <draw:frame draw:style-name="gr9" draw:text-style-name="P5" draw:layer="layout" svg:width="13.181cm" svg:height="2.054cm" svg:x="0cm" svg:y="1.643cm">
          <draw:text-box>
            <text:p><text:span text:style-name="T3">Optimizing </text:span><text:span text:style-name="T3">parameter</text:span><text:span text:style-name="T3">s</text:span></text:p>
            <text:p><text:span text:style-name="T9">Using </text:span><text:span text:style-name="T9">Jensen's </text:span><text:span text:style-name="T9">inequality, </text:span><text:span text:style-name="T9">the </text:span><text:span text:style-name="T9">logarithmic </text:span><text:span text:style-name="T9">evidence </text:span><text:span text:style-name="T9">can be </text:span><text:span text:style-name="T9">written as </text:span><text:span text:style-name="T9">follow,</text:span></text:p>
          </draw:text-box>
        </draw:frame>
        <draw:frame draw:style-name="gr10" draw:text-style-name="P5" draw:layer="layout" svg:width="27.56cm" svg:height="2.015cm" svg:x="0.124cm" svg:y="5.953cm">
          <draw:text-box>
            <text:p><text:span text:style-name="T9">As the KL </text:span><text:span text:style-name="T9">divergence </text:span><text:span text:style-name="T9">takes non-</text:span><text:span text:style-name="T9">negative </text:span><text:span text:style-name="T9">values, the </text:span><text:span text:style-name="T9">logarithmic </text:span><text:span text:style-name="T9">evidence </text:span><text:span text:style-name="T9">(l.h.s) is </text:span><text:span text:style-name="T9">greater than </text:span><text:span text:style-name="T9">the first </text:span><text:span text:style-name="T9">term of </text:span><text:span text:style-name="T9">r.h.s. This </text:span><text:span text:style-name="T9">term is </text:span><text:span text:style-name="T9">called</text:span><text:span text:style-name="T7"> the </text:span><text:span text:style-name="T7">evidence </text:span><text:span text:style-name="T7">lower </text:span><text:span text:style-name="T7">bound </text:span><text:span text:style-name="T7">(ELBO)</text:span><text:span text:style-name="T6">, </text:span><text:span text:style-name="T6">and we can </text:span><text:span text:style-name="T6">use the </text:span><text:span text:style-name="T6">ELBO as </text:span><text:span text:style-name="T6">the target </text:span><text:span text:style-name="T6">function to </text:span><text:span text:style-name="T6">maximize, </text:span><text:span text:style-name="T6">instead of </text:span><text:span text:style-name="T6">the </text:span><text:span text:style-name="T6">evidence </text:span><text:span text:style-name="T6">itself, which </text:span><text:span text:style-name="T6">is </text:span><text:span text:style-name="T6">intractable. </text:span><text:span text:style-name="T6">Therefore, </text:span><text:span text:style-name="T6">the cost </text:span><text:span text:style-name="T6">function of </text:span><text:span text:style-name="T6">VAE reads,</text:span></text:p>
          </draw:text-box>
        </draw:frame>
        <draw:frame draw:style-name="gr2" draw:text-style-name="P2" draw:layer="layout" svg:width="9.855cm" svg:height="1.814cm" svg:x="1.261cm" svg:y="3.821cm">
          <draw:image xlink:href="Pictures/10007041000013D3000003A71CECB53A.svg" xlink:type="simple" xlink:show="embed" xlink:actuate="onLoad" draw:mime-type="image/svg+xml">
            <text:p/>
          </draw:image>
          <draw:image xlink:href="Pictures/10000001000000C000000023D732FB99.png" xlink:type="simple" xlink:show="embed" xlink:actuate="onLoad" draw:mime-type="image/png"/>
        </draw:frame>
        <draw:frame draw:style-name="gr2" draw:text-style-name="P2" draw:layer="layout" svg:width="19.649cm" svg:height="1.029cm" svg:x="4.164cm" svg:y="8.4cm">
          <draw:image xlink:href="Pictures/1000708E00001DAF0000018F2132834D.svg" xlink:type="simple" xlink:show="embed" xlink:actuate="onLoad" draw:mime-type="image/svg+xml">
            <text:p/>
          </draw:image>
          <draw:image xlink:href="Pictures/100000010000011F0000000F65E56557.png" xlink:type="simple" xlink:show="embed" xlink:actuate="onLoad" draw:mime-type="image/png"/>
        </draw:frame>
        <draw:frame draw:style-name="gr11" draw:text-style-name="P5" draw:layer="layout" svg:width="27.56cm" svg:height="4.367cm" svg:x="0.247cm" svg:y="12.306cm">
          <draw:text-box>
            <text:p><text:span text:style-name="T7">Reparamet</text:span><text:span text:style-name="T7">rization </text:span><text:span text:style-name="T7">trick</text:span></text:p>
            <text:p><text:span text:style-name="T9">To optimize </text:span><text:span text:style-name="T9">the </text:span><text:span text:style-name="T9">parameters, </text:span><text:span text:style-name="T9">we </text:span><text:span text:style-name="T9">calculate </text:span><text:span text:style-name="T9">the gradient </text:span><text:span text:style-name="T9">of ELBO </text:span><text:span text:style-name="T9">with the </text:span><text:span text:style-name="T9">parameters </text:span><text:span text:style-name="T9">θ and φ. </text:span><text:span text:style-name="T9">However, </text:span><text:span text:style-name="T9">random </text:span><text:span text:style-name="T9">sampling </text:span><text:span text:style-name="T9">itself </text:span><text:span text:style-name="T9">depends on </text:span><text:span text:style-name="T9">the </text:span><text:span text:style-name="T9">parameter </text:span><text:span text:style-name="T9">φ, and the </text:span><text:span text:style-name="T9">back </text:span><text:span text:style-name="T9">propagation </text:span><text:span text:style-name="T9">won’t reach </text:span><text:span text:style-name="T9">encoder as </text:span><text:span text:style-name="T9">the gradient </text:span><text:span text:style-name="T9">is not </text:span><text:span text:style-name="T9">differentiabl</text:span><text:span text:style-name="T9">e.</text:span></text:p>
            <text:p><text:span text:style-name="T9">Reparamet</text:span><text:span text:style-name="T9">erization </text:span><text:span text:style-name="T9">trick </text:span><text:span text:style-name="T9">enables to </text:span><text:span text:style-name="T9">avoid this </text:span><text:span text:style-name="T9">issue by </text:span><text:span text:style-name="T9">rewriting </text:span><text:span text:style-name="T9">random </text:span><text:span text:style-name="T9">sampling as </text:span><text:span text:style-name="T9">the </text:span><text:span text:style-name="T9">deterministi</text:span><text:span text:style-name="T9">c </text:span><text:span text:style-name="T9">calculation </text:span><text:span text:style-name="T9">for a fixed </text:span><text:span text:style-name="T9">distribution. </text:span><text:span text:style-name="T9">Namely, let </text:span><text:span text:style-name="T9">μ and σ^2 </text:span><text:span text:style-name="T9">as predicted </text:span><text:span text:style-name="T9">mean and </text:span><text:span text:style-name="T9">variance, </text:span><text:span text:style-name="T9">and denote </text:span><text:span text:style-name="T9">the </text:span><text:span text:style-name="T9">standard </text:span><text:span text:style-name="T9">normal </text:span><text:span text:style-name="T9">distribution </text:span><text:span text:style-name="T9">as ε, the </text:span><text:span text:style-name="T9">random </text:span><text:span text:style-name="T9">sampling </text:span><text:span text:style-name="T9">can be </text:span><text:span text:style-name="T9">written as</text:span></text:p>
          </draw:text-box>
        </draw:frame>
        <draw:frame draw:style-name="gr12" draw:text-style-name="P5" draw:layer="layout" svg:width="22.049cm" svg:height="2.603cm" svg:x="2.794cm" svg:y="9.85cm">
          <draw:text-box>
            <text:list text:style-name="L1">
              <text:list-item>
                <text:p><text:span text:style-name="T7">First term</text:span><text:span text:style-name="T9">: Reconstruction error</text:span></text:p>
              </text:list-item>
              <text:list-item>
                <text:p><text:span text:style-name="T7">Second term</text:span><text:span text:style-name="T6">: The distance between the posterior </text:span><text:span text:style-name="T6">distribution predicted by encoder and priori </text:span><text:span text:style-name="T6">distribution. Regularization term to make the </text:span><text:span text:style-name="T6">resulting distribution into the desired form.</text:span></text:p>
              </text:list-item>
            </text:list>
          </draw:text-box>
        </draw:frame>
        <draw:frame draw:style-name="gr2" draw:text-style-name="P2" draw:layer="layout" svg:width="5.147cm" svg:height="0.675cm" svg:x="9.228cm" svg:y="17.523cm">
          <draw:image xlink:href="Pictures/100019F80000081B000001117C0AB55D.svg" xlink:type="simple" xlink:show="embed" xlink:actuate="onLoad" draw:mime-type="image/svg+xml">
            <text:p/>
          </draw:image>
          <draw:image xlink:href="Pictures/100000010000004E0000000AC2A6708F.png" xlink:type="simple" xlink:show="embed" xlink:actuate="onLoad" draw:mime-type="image/png"/>
        </draw:frame>
        <presentation:notes draw:style-name="dp2">
          <draw:page-thumbnail draw:style-name="gr8" draw:layer="layout" svg:width="19.798cm" svg:height="11.136cm" svg:x="0.6cm" svg:y="2.257cm" draw:page-number="2" presentation:class="page"/>
          <draw:frame presentation:style-name="pr1"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draw:style-name="gr1" draw:text-style-name="P1" draw:layer="layout" svg:width="17.81cm" svg:height="0.962cm" svg:x="0.072cm" svg:y="0.123cm">
          <draw:text-box>
            <text:p><text:span text:style-name="T1">VAEs basic</text:span></text:p>
          </draw:text-box>
        </draw:frame>
        <draw:frame draw:style-name="gr2" draw:text-style-name="P2" draw:layer="layout" svg:width="13.79cm" svg:height="4.779cm" svg:x="13.475cm" svg:y="0.619cm">
          <draw:image xlink:href="Pictures/100000000000108B000005BCE9DFA142.jpg" xlink:type="simple" xlink:show="embed" xlink:actuate="onLoad" draw:mime-type="image/jpeg">
            <text:p/>
          </draw:image>
        </draw:frame>
        <draw:frame draw:style-name="gr3" draw:text-style-name="P4" draw:layer="layout" svg:width="5.193cm" svg:height="0.725cm" svg:x="22.072cm" svg:y="5.226cm">
          <draw:text-box>
            <text:p text:style-name="P3"><text:span text:style-name="T2">Schoulepnikoff2025</text:span></text:p>
          </draw:text-box>
        </draw:frame>
        <draw:frame draw:style-name="gr13" draw:text-style-name="P5" draw:layer="layout" svg:width="13.181cm" svg:height="2.642cm" svg:x="0cm" svg:y="1.643cm">
          <draw:text-box>
            <text:p><text:span text:style-name="T3">β-VAE</text:span></text:p>
            <text:p><text:span text:style-name="T9">One can introduce the additional coefficient β for KL divergence term to adjust how strongly enforce the regularization. The ELBO reads,</text:span></text:p>
          </draw:text-box>
        </draw:frame>
        <draw:frame draw:style-name="gr2" draw:text-style-name="P2" draw:layer="layout" svg:width="15.925cm" svg:height="0.811cm" svg:x="0.601cm" svg:y="4.432cm">
          <draw:image xlink:href="Pictures/1000768400001E880000018F523E2DFA.svg" xlink:type="simple" xlink:show="embed" xlink:actuate="onLoad" draw:mime-type="image/svg+xml">
            <text:p/>
          </draw:image>
          <draw:image xlink:href="Pictures/10000001000001270000000FB19DDA25.png" xlink:type="simple" xlink:show="embed" xlink:actuate="onLoad" draw:mime-type="image/png"/>
        </draw:frame>
        <draw:frame draw:style-name="gr14" draw:text-style-name="P5" draw:layer="layout" svg:width="27.537cm" svg:height="3.818cm" svg:x="0.2cm" svg:y="6.396cm">
          <draw:text-box>
            <text:p><text:span text:style-name="T3">TC-VAE (Total Correlation VAE)</text:span></text:p>
            <text:p><text:span text:style-name="T9">In the βVAE, the reconstruction error and the regularization terms are trading off, either increasing the generality and losing the reconstruction precision, or keep the precision and lose the generality.</text:span></text:p>
            <text:p><text:span text:style-name="T9">To evade this drawback, Chen introduced the so-called the total correlation (TC) VAE in 2018, enabling to separate the regularization term into three terms and optimize each weight.</text:span></text:p>
            <text:p><text:span text:style-name="T9">The KL divergence term can be decomposed as follow: <text:s/></text:span></text:p>
          </draw:text-box>
        </draw:frame>
        <draw:frame draw:style-name="gr2" draw:text-style-name="P2" draw:layer="layout" svg:width="25.315cm" svg:height="3.717cm" svg:x="1.348cm" svg:y="10.388cm">
          <draw:image xlink:href="Pictures/10007D4A000032860000076CEE5E80E1.svg" xlink:type="simple" xlink:show="embed" xlink:actuate="onLoad" draw:mime-type="image/svg+xml">
            <text:p/>
          </draw:image>
          <draw:image xlink:href="Pictures/10000001000001E90000004818EEF98B.png" xlink:type="simple" xlink:show="embed" xlink:actuate="onLoad" draw:mime-type="image/png"/>
        </draw:frame>
        <draw:frame draw:style-name="gr15" draw:text-style-name="P8" draw:layer="layout" svg:width="27.537cm" svg:height="6.131cm" svg:x="0.177cm" svg:y="14.652cm">
          <draw:text-box>
            <text:list text:style-name="L1">
              <text:list-item>
                <text:p><text:span text:style-name="T7">MI: Index-core mutual information</text:span></text:p>
                <text:p><text:span text:style-name="T9">Mutual information between latent variable z and the data x. Indicates how much information regarding the specific input x the latent variable z has. Important for recovering information.</text:span></text:p>
              </text:list-item>
              <text:list-item>
                <text:p><text:span text:style-name="T10">TC: Total correlation</text:span></text:p>
                <text:p><text:span text:style-name="T6">The distance between the entire latent variable distribution and the distribution under the assumption of the independence of each latent variable z. The larger value indicates the latent variables are strongly entangles each other. Imposing the big penalty leads </text:span><text:span text:style-name="T11">disentangle</text:span><text:span text:style-name="T12"> of latent variables.</text:span></text:p>
              </text:list-item>
              <text:list-item>
                <text:p><text:span text:style-name="T7">dwKL: dimension-wise KL</text:span></text:p>
                <text:p><text:span text:style-name="T6">How close the joint distribution of each latent variable to priori distribution. Important to enforcing the distribution form (to normal distribution in general).</text:span></text:p>
              </text:list-item>
            </text:list>
          </draw:text-box>
        </draw:frame>
        <presentation:notes draw:style-name="dp2">
          <draw:page-thumbnail draw:style-name="gr8" draw:layer="layout" svg:width="19.798cm" svg:height="11.136cm" svg:x="0.6cm" svg:y="2.257cm" draw:page-number="3" presentation:class="page"/>
          <draw:frame presentation:style-name="pr1"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draw:style-name="gr1" draw:text-style-name="P1" draw:layer="layout" svg:width="17.81cm" svg:height="0.962cm" svg:x="0.072cm" svg:y="0.123cm">
          <draw:text-box>
            <text:p><text:span text:style-name="T1">cpVAE</text:span></text:p>
          </draw:text-box>
        </draw:frame>
        <draw:frame draw:style-name="gr2" draw:text-style-name="P2" draw:layer="layout" svg:width="13.79cm" svg:height="4.779cm" svg:x="13.475cm" svg:y="0.619cm">
          <draw:image xlink:href="Pictures/100000000000108B000005BCE9DFA142.jpg" xlink:type="simple" xlink:show="embed" xlink:actuate="onLoad" draw:mime-type="image/jpeg">
            <text:p/>
          </draw:image>
        </draw:frame>
        <draw:frame draw:style-name="gr3" draw:text-style-name="P4" draw:layer="layout" svg:width="5.193cm" svg:height="0.725cm" svg:x="22.072cm" svg:y="5.226cm">
          <draw:text-box>
            <text:p text:style-name="P3"><text:span text:style-name="T2">Schoulepnikoff2025</text:span></text:p>
          </draw:text-box>
        </draw:frame>
        <draw:frame draw:style-name="gr16" draw:text-style-name="P5" draw:layer="layout" svg:width="13.181cm" svg:height="4.406cm" svg:x="0cm" svg:y="1.643cm">
          <draw:text-box>
            <text:p><text:span text:style-name="T3">Conditional Probabilistic Decoder</text:span></text:p>
            <text:p><text:span text:style-name="T9">Schoulepnikoff2025 proposed to enable the decoder to generate the spin distribution with the conditional probability. To this end, they embed the autoregressive neural network (ARNN) into the decider part, which generate the spin configuration with the conditional probability,</text:span></text:p>
          </draw:text-box>
        </draw:frame>
        <draw:frame draw:style-name="gr2" draw:text-style-name="P2" draw:layer="layout" svg:width="8.865cm" svg:height="1.808cm" svg:x="1.785cm" svg:y="6.272cm">
          <draw:image xlink:href="Pictures/1000314F0000138F000003FEDEB57DB3.svg" xlink:type="simple" xlink:show="embed" xlink:actuate="onLoad" draw:mime-type="image/svg+xml">
            <text:p/>
          </draw:image>
          <draw:image xlink:href="Pictures/10000001000000BD000000271E463347.png" xlink:type="simple" xlink:show="embed" xlink:actuate="onLoad" draw:mime-type="image/png"/>
        </draw:frame>
        <draw:frame draw:style-name="gr9" draw:text-style-name="P5" draw:layer="layout" svg:width="27.095cm" svg:height="2.054cm" svg:x="0.344cm" svg:y="8.625cm">
          <draw:text-box>
            <text:p><text:span text:style-name="T3">ELBO for the cpVAE</text:span></text:p>
            <text:p><text:span text:style-name="T9">Assuming outcome x can be -1 or 1, the probabilistic mass function can be rewritten using the Bernoulli distribution,</text:span></text:p>
          </draw:text-box>
        </draw:frame>
        <draw:frame draw:style-name="gr2" draw:text-style-name="P2" draw:layer="layout" svg:width="9.106cm" svg:height="0.864cm" svg:x="6.133cm" svg:y="10.679cm">
          <draw:image xlink:href="Pictures/1000368C000010F80000019D6845E844.svg" xlink:type="simple" xlink:show="embed" xlink:actuate="onLoad" draw:mime-type="image/svg+xml">
            <text:p/>
          </draw:image>
          <draw:image xlink:href="Pictures/10000001000000A4000000100661E3D1.png" xlink:type="simple" xlink:show="embed" xlink:actuate="onLoad" draw:mime-type="image/png"/>
        </draw:frame>
        <draw:frame draw:style-name="gr17" draw:text-style-name="P9" draw:layer="layout" svg:width="27.095cm" svg:height="0.839cm" svg:x="0.345cm" svg:y="12.125cm">
          <draw:text-box>
            <text:p><text:span text:style-name="T6">Therefore, the ELBO for the cpVAE reads,</text:span></text:p>
          </draw:text-box>
        </draw:frame>
        <draw:frame draw:style-name="gr2" draw:text-style-name="P2" draw:layer="layout" svg:width="20.911cm" svg:height="0.738cm" svg:x="2.74cm" svg:y="13.327cm">
          <draw:image xlink:href="Pictures/100073CB00002C0E0000018F7AC2D07B.svg" xlink:type="simple" xlink:show="embed" xlink:actuate="onLoad" draw:mime-type="image/svg+xml">
            <text:p/>
          </draw:image>
          <draw:image xlink:href="Pictures/10000001000001AA0000000F1BDB9AA2.png" xlink:type="simple" xlink:show="embed" xlink:actuate="onLoad" draw:mime-type="image/png"/>
        </draw:frame>
        <draw:frame draw:style-name="gr18" draw:text-style-name="P9" draw:layer="layout" svg:width="27.095cm" svg:height="1.427cm" svg:x="0.346cm" svg:y="14.626cm">
          <draw:text-box>
            <text:p><text:span text:style-name="T6">They demonstrate the cpVAE with the models which consider only two states for each lattice site. To use cpVAE, one needs to extend this formula to the categorical distribution.</text:span></text:p>
          </draw:text-box>
        </draw:frame>
        <presentation:notes draw:style-name="dp2">
          <draw:page-thumbnail draw:style-name="gr8" draw:layer="layout" svg:width="19.798cm" svg:height="11.136cm" svg:x="0.6cm" svg:y="2.257cm" draw:page-number="4" presentation:class="page"/>
          <draw:frame presentation:style-name="pr1"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draw:style-name="gr1" draw:text-style-name="P1" draw:layer="layout" svg:width="17.81cm" svg:height="0.962cm" svg:x="0.072cm" svg:y="0.123cm">
          <draw:text-box>
            <text:p><text:span text:style-name="T1">cpVAE</text:span></text:p>
          </draw:text-box>
        </draw:frame>
        <draw:frame draw:style-name="gr2" draw:text-style-name="P2" draw:layer="layout" svg:width="13.79cm" svg:height="4.779cm" svg:x="13.475cm" svg:y="0.619cm">
          <draw:image xlink:href="Pictures/100000000000108B000005BCE9DFA142.jpg" xlink:type="simple" xlink:show="embed" xlink:actuate="onLoad" draw:mime-type="image/jpeg">
            <text:p/>
          </draw:image>
        </draw:frame>
        <draw:frame draw:style-name="gr3" draw:text-style-name="P4" draw:layer="layout" svg:width="5.193cm" svg:height="0.725cm" svg:x="22.072cm" svg:y="5.226cm">
          <draw:text-box>
            <text:p text:style-name="P3"><text:span text:style-name="T2">Schoulepnikoff2025</text:span></text:p>
          </draw:text-box>
        </draw:frame>
        <draw:frame draw:style-name="gr16" draw:text-style-name="P5" draw:layer="layout" svg:width="13.181cm" svg:height="4.406cm" svg:x="0cm" svg:y="1.643cm">
          <draw:text-box>
            <text:p><text:span text:style-name="T3">Conditional Probabilistic Decoder</text:span></text:p>
            <text:p><text:span text:style-name="T9">Schoulepnikoff2025 proposed to enable the decoder to generate the spin distribution with the conditional probability. To this end, they embed the autoregressive neural network (ARNN) into the decider part, which generate the spin configuration with the conditional probability,</text:span></text:p>
          </draw:text-box>
        </draw:frame>
        <draw:frame draw:style-name="gr2" draw:text-style-name="P2" draw:layer="layout" svg:width="8.865cm" svg:height="1.808cm" svg:x="1.785cm" svg:y="6.272cm">
          <draw:image xlink:href="Pictures/1000314F0000138F000003FEDEB57DB3.svg" xlink:type="simple" xlink:show="embed" xlink:actuate="onLoad" draw:mime-type="image/svg+xml">
            <text:p/>
          </draw:image>
          <draw:image xlink:href="Pictures/10000001000000BD000000271E463347.png" xlink:type="simple" xlink:show="embed" xlink:actuate="onLoad" draw:mime-type="image/png"/>
        </draw:frame>
        <draw:frame draw:style-name="gr9" draw:text-style-name="P5" draw:layer="layout" svg:width="27.095cm" svg:height="2.054cm" svg:x="0.344cm" svg:y="8.625cm">
          <draw:text-box>
            <text:p><text:span text:style-name="T3">ELBO for the cpVAE with more than three local Hilbert space</text:span></text:p>
            <text:p><text:span text:style-name="T9">Assume outcome x can be K categories, the probabilistic mass function can be rewritten using the categorical distribution in the one-hot encoding manner.</text:span></text:p>
          </draw:text-box>
        </draw:frame>
        <draw:frame draw:style-name="gr19" draw:layer="layout" svg:width="4.111cm" svg:height="4.159cm" svg:x="1.182cm" svg:y="10.916cm">
          <table:table table:template-name="default" table:use-first-row-styles="true" table:use-banding-rows-styles="true">
            <table:table-column table:style-name="co1"/>
            <table:table-column table:style-name="co1"/>
            <table:table-column table:style-name="co1"/>
            <table:table-column table:style-name="co1"/>
            <table:table-row table:style-name="ro1" table:default-cell-style-name="ce1">
              <table:table-cell>
                <text:p text:style-name="P10"><text:span text:style-name="T13">x1</text:span></text:p>
              </table:table-cell>
              <table:table-cell>
                <text:p text:style-name="P10"><text:span text:style-name="T13">x2</text:span></text:p>
              </table:table-cell>
              <table:table-cell>
                <text:p text:style-name="P10"><text:span text:style-name="T13">...</text:span></text:p>
              </table:table-cell>
              <table:table-cell>
                <text:p text:style-name="P10"><text:span text:style-name="T13">xK</text:span></text:p>
              </table:table-cell>
            </table:table-row>
            <table:table-row table:style-name="ro1" table:default-cell-style-name="ce1">
              <table:table-cell>
                <text:p text:style-name="P11"><text:span text:style-name="T13">1</text:span></text:p>
              </table:table-cell>
              <table:table-cell>
                <text:p text:style-name="P10"><text:span text:style-name="T13">0</text:span></text:p>
              </table:table-cell>
              <table:table-cell>
                <text:p text:style-name="P10"><text:span text:style-name="T13">...</text:span></text:p>
              </table:table-cell>
              <table:table-cell>
                <text:p text:style-name="P10"><text:span text:style-name="T13">0</text:span></text:p>
              </table:table-cell>
            </table:table-row>
            <table:table-row table:style-name="ro1" table:default-cell-style-name="ce1">
              <table:table-cell>
                <text:p text:style-name="P11"><text:span text:style-name="T13">0</text:span></text:p>
              </table:table-cell>
              <table:table-cell>
                <text:p text:style-name="P10"><text:span text:style-name="T13">1</text:span></text:p>
              </table:table-cell>
              <table:table-cell>
                <text:p text:style-name="P10"><text:span text:style-name="T13">...</text:span></text:p>
              </table:table-cell>
              <table:table-cell>
                <text:p text:style-name="P10"><text:span text:style-name="T13">0</text:span></text:p>
              </table:table-cell>
            </table:table-row>
            <table:table-row table:style-name="ro1" table:default-cell-style-name="ce1">
              <table:table-cell>
                <text:p text:style-name="P11"><text:span text:style-name="T13">0</text:span></text:p>
              </table:table-cell>
              <table:table-cell>
                <text:p text:style-name="P10"><text:span text:style-name="T13">0</text:span></text:p>
              </table:table-cell>
              <table:table-cell>
                <text:p text:style-name="P10"><text:span text:style-name="T13">...</text:span></text:p>
              </table:table-cell>
              <table:table-cell>
                <text:p text:style-name="P10"><text:span text:style-name="T13">1</text:span></text:p>
              </table:table-cell>
            </table:table-row>
          </table:table>
          <draw:image xlink:href="Pictures/TablePreview1.svm" xlink:type="simple" xlink:show="embed" xlink:actuate="onLoad"/>
        </draw:frame>
        <draw:frame draw:style-name="gr17" draw:text-style-name="P5" draw:layer="layout" svg:width="20.921cm" svg:height="0.839cm" svg:x="6.322cm" svg:y="10.679cm">
          <draw:text-box>
            <text:p><text:span text:style-name="T9">In this case, the probabilistic mass function is given as:</text:span></text:p>
          </draw:text-box>
        </draw:frame>
        <draw:frame draw:style-name="gr2" draw:text-style-name="P2" draw:layer="layout" svg:width="6.714cm" svg:height="1.747cm" svg:x="19.792cm" svg:y="10.23cm">
          <draw:image xlink:href="Pictures/10004F3600000F55000003FED56732D6.svg" xlink:type="simple" xlink:show="embed" xlink:actuate="onLoad" draw:mime-type="image/svg+xml">
            <text:p/>
          </draw:image>
          <draw:image xlink:href="Pictures/100000010000009400000027043BCA17.png" xlink:type="simple" xlink:show="embed" xlink:actuate="onLoad" draw:mime-type="image/png"/>
        </draw:frame>
        <draw:frame draw:style-name="gr17" draw:text-style-name="P5" draw:layer="layout" svg:width="20.921cm" svg:height="0.839cm" svg:x="6.348cm" svg:y="11.697cm">
          <draw:text-box>
            <text:p><text:span text:style-name="T9">Therefore, the reconstruction loss is given as:</text:span></text:p>
          </draw:text-box>
        </draw:frame>
        <draw:frame draw:style-name="gr2" draw:text-style-name="P2" draw:layer="layout" svg:width="20.139cm" svg:height="1.531cm" svg:x="7.21cm" svg:y="12.936cm">
          <draw:image xlink:href="Pictures/10007BDF0000361C0000041E028B9A37.svg" xlink:type="simple" xlink:show="embed" xlink:actuate="onLoad" draw:mime-type="image/svg+xml">
            <text:p/>
          </draw:image>
          <draw:image xlink:href="Pictures/100000010000020C000000287EA370C3.png" xlink:type="simple" xlink:show="embed" xlink:actuate="onLoad" draw:mime-type="image/png"/>
        </draw:frame>
        <presentation:notes draw:style-name="dp2">
          <draw:page-thumbnail draw:style-name="gr8" draw:layer="layout" svg:width="19.798cm" svg:height="11.136cm" svg:x="0.6cm" svg:y="2.257cm" draw:page-number="5" presentation:class="page"/>
          <draw:frame presentation:style-name="pr1"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draw:style-name="gr1" draw:text-style-name="P1" draw:layer="layout" svg:width="17.81cm" svg:height="0.962cm" svg:x="0.072cm" svg:y="0.123cm">
          <draw:text-box>
            <text:p><text:span text:style-name="T1">cpVAE</text:span></text:p>
          </draw:text-box>
        </draw:frame>
        <draw:frame draw:style-name="gr20" draw:text-style-name="P5" draw:layer="layout" svg:width="27.684cm" svg:height="1.466cm" svg:x="0.1cm" svg:y="12.143cm">
          <draw:text-box>
            <text:p><text:span text:style-name="T3">Benchmark for generalized reconstruction error</text:span></text:p>
            <text:p><text:span text:style-name="T9">Compare the reconstruction error in the previous paper (Schoulepnikoff2025) and the generalized code.</text:span></text:p>
          </draw:text-box>
        </draw:frame>
        <draw:frame draw:style-name="gr2" draw:text-style-name="P2" draw:layer="layout" svg:width="6.714cm" svg:height="1.747cm" svg:x="1.369cm" svg:y="18.927cm">
          <draw:image xlink:href="Pictures/10004F3600000F55000003FED56732D6.svg" xlink:type="simple" xlink:show="embed" xlink:actuate="onLoad" draw:mime-type="image/svg+xml">
            <text:p/>
          </draw:image>
          <draw:image xlink:href="Pictures/100000010000009400000027043BCA17.png" xlink:type="simple" xlink:show="embed" xlink:actuate="onLoad" draw:mime-type="image/png"/>
        </draw:frame>
        <draw:frame draw:style-name="gr21" draw:text-style-name="P5" draw:layer="layout" svg:width="21.878cm" svg:height="4.955cm" svg:x="0.417cm" svg:y="13.834cm">
          <draw:text-box>
            <text:p><text:span text:style-name="T7">Condition:</text:span></text:p>
            <text:p><text:span text:style-name="T6">Model: NNN-TFIM (N=20)</text:span></text:p>
            <text:p><text:span text:style-name="T9">Input data: 1 sample generated from wave function obtained through ED </text:span></text:p>
            <text:p><text:span text:style-name="T9">Models (different reconstruction error): </text:span></text:p>
            <text:p><text:span text:style-name="T9">- Schoulepnikoff2025</text:span></text:p>
            <text:p><text:span text:style-name="T9"/></text:p>
            <text:p><text:span text:style-name="T9"/></text:p>
            <text:p><text:span text:style-name="T9">- generalized</text:span></text:p>
          </draw:text-box>
        </draw:frame>
        <draw:frame draw:style-name="gr2" draw:text-style-name="P2" draw:layer="layout" svg:width="6.999cm" svg:height="0.664cm" svg:x="1.356cm" svg:y="17.225cm">
          <draw:image xlink:href="Pictures/1000368C000010F80000019D6845E844.svg" xlink:type="simple" xlink:show="embed" xlink:actuate="onLoad" draw:mime-type="image/svg+xml">
            <text:p/>
          </draw:image>
          <draw:image xlink:href="Pictures/10000001000000A4000000100661E3D1.png" xlink:type="simple" xlink:show="embed" xlink:actuate="onLoad" draw:mime-type="image/png"/>
        </draw:frame>
        <draw:frame draw:style-name="gr6" draw:text-style-name="P6" draw:layer="layout" svg:width="9.882cm" svg:height="0.757cm" svg:x="12.593cm" svg:y="18.251cm">
          <draw:object xlink:href="./Object 14" xlink:type="simple" xlink:show="embed" xlink:actuate="onLoad">
            <loext:p/>
          </draw:object>
          <draw:image xlink:href="./ObjectReplacements/Object 14" xlink:type="simple" xlink:show="embed" xlink:actuate="onLoad"/>
        </draw:frame>
        <draw:frame draw:style-name="gr6" draw:text-style-name="P6" draw:layer="layout" svg:width="8.621cm" svg:height="0.757cm" svg:x="13.916cm" svg:y="19.575cm">
          <draw:object xlink:href="./Object 19" xlink:type="simple" xlink:show="embed" xlink:actuate="onLoad">
            <loext:p/>
          </draw:object>
          <draw:image xlink:href="./ObjectReplacements/Object 19" xlink:type="simple" xlink:show="embed" xlink:actuate="onLoad"/>
        </draw:frame>
        <draw:frame draw:style-name="gr22" draw:text-style-name="P5" draw:layer="layout" svg:width="27.684cm" svg:height="0.878cm" svg:x="0.1cm" svg:y="1.343cm">
          <draw:text-box>
            <text:p><text:span text:style-name="T3">Code for generalized reconstruction error</text:span></text:p>
          </draw:text-box>
        </draw:frame>
        <draw:frame draw:style-name="gr23" draw:text-style-name="P12" draw:layer="layout" svg:width="27.255cm" svg:height="8.309cm" svg:x="0.502cm" svg:y="2.442cm">
          <draw:text-box>
            <text:p><text:span text:style-name="T2">Consider $N=4$ system and the spin configuration is $s = [-1,1,-1,1]$. For encoding, one needs to map the spin configuration in to positive indices, such as $-1\rightarrow 0$ and $+1\rightarrow 1$. The mapped configuration is $s_{\text{map}} = [0,1,0,1]$. Using one_hot() function, it will return $N\times K$ array, which contains</text:span></text:p>
            <text:p/>
            <text:p><text:span text:style-name="T2">one_hot($s_{\text{map}}$, $K=2$)</text:span></text:p>
            <text:p><text:span text:style-name="T2">$$\rightarrow [[x_{i=1,k=1}, x_{i=1,k=2}], [x_{i=2,k=1}, x_{i=2,k=2}], [x_{i=3,k=1}, x_{i=3,k=2}], [x_{i=4,k=1}, x_{i=4,k=2}]] = [[1,0],[0.1],[1,0],[0,1]]$$</text:span></text:p>
            <text:p/>
            <text:p><text:span text:style-name="T2">Obtraining the same array structure of logrithmic probability, such as,</text:span></text:p>
            <text:p/>
            <text:p><text:span text:style-name="T2">$\log p$</text:span></text:p>
            <text:p><text:span text:style-name="T2">$$\rightarrow [[\log p(x_{i=1,k=1}), \log p(x_{i=1,k=2})], [\log p(x_{i=2,k=1}), \log p(x_{i=2,k=2})], [\log p(x_{i=3,k=1}), \log p(x_{i=3,k=2})], [\log p(x_{i=4,k=1}), \log p(x_{i=4,k=2})]]$$</text:span></text:p>
            <text:p/>
            <text:p><text:span text:style-name="T2">we can calculate the reconstruction error simply one_hot($s_{\text{map}}$, $K=2$)*$\log p$</text:span></text:p>
          </draw:text-box>
        </draw:frame>
        <presentation:notes draw:style-name="dp2">
          <draw:page-thumbnail draw:style-name="gr8" draw:layer="layout" svg:width="19.798cm" svg:height="11.136cm" svg:x="0.6cm" svg:y="2.257cm" draw:page-number="6" presentation:class="page"/>
          <draw:frame presentation:style-name="pr1"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draw:style-name="gr1" draw:text-style-name="P1" draw:layer="layout" svg:width="17.81cm" svg:height="0.962cm" svg:x="0.072cm" svg:y="0.123cm">
          <draw:text-box>
            <text:p><text:span text:style-name="T1">dVAE for Spin-1 system</text:span></text:p>
          </draw:text-box>
        </draw:frame>
        <draw:frame draw:style-name="gr24" draw:text-style-name="P5" draw:layer="layout" svg:width="27.684cm" svg:height="4.994cm" svg:x="0.1cm" svg:y="1.343cm">
          <draw:text-box>
            <text:p><text:span text:style-name="T3">Code from previous paper (for spin-1/2)</text:span></text:p>
            <text:list text:style-name="L1">
              <text:list-item>
                <text:p><text:span text:style-name="T6">Input: sampling from wave function (Nsample, N)</text:span></text:p>
              </text:list-item>
              <text:list-item>
                <text:p><text:span text:style-name="T6">Encoder → μ, σ → (reparameterization trick) z</text:span></text:p>
              </text:list-item>
              <text:list-item>
                <text:p><text:span text:style-name="T6">z → decoder → probabilities (Nsample, N), which shows the probability 0 to 1 (1→ +1, 0→ -1)</text:span></text:p>
              </text:list-item>
              <text:list-item>
                <text:p><text:span text:style-name="T6">Jax.random.Bernoulli() → get samples generated from the probability predicted by the decoder</text:span></text:p>
              </text:list-item>
            </text:list>
            <text:p><text:span text:style-name="T6"/></text:p>
            <text:p><text:span text:style-name="T6">This architecture works for only the system with 2 states as the state is either +1 (p=1) or -1 (p=0)</text:span></text:p>
            <text:p><text:span text:style-name="T6">For K&gt;2 cases, we need to output from decoder the probability for each z-axis spin.</text:span></text:p>
          </draw:text-box>
        </draw:frame>
        <draw:frame draw:style-name="gr25" draw:text-style-name="P5" draw:layer="layout" svg:width="27.684cm" svg:height="7.934cm" svg:x="0.1cm" svg:y="8.043cm">
          <draw:text-box>
            <text:p><text:span text:style-name="T3">Code for spin-1</text:span></text:p>
            <text:list text:style-name="L1">
              <text:list-item>
                <text:p><text:span text:style-name="T6">Input: sampling from wave function (Nsample, N)</text:span></text:p>
              </text:list-item>
              <text:list-item>
                <text:p><text:span text:style-name="T6">Encoder → μ, σ → (reparameterization trick) z</text:span></text:p>
              </text:list-item>
            </text:list>
            <text:p><text:span text:style-name="T6"/></text:p>
            <text:p><text:span text:style-name="T6">change:</text:span></text:p>
            <text:list text:continue-numbering="true" text:style-name="L1">
              <text:list-item>
                <text:p><text:span text:style-name="T14">Output from decoder: </text:span><text:span text:style-name="T15"><text:s/>Instead of output all the probabilities for Nsample*N, we output probability of each state at each site. Namely, decoder outputs N*(K=3) probability p_i^k corresponds to z-axis spin at site i,</text:span></text:p>
                <text:p><text:span text:style-name="T15">-1 → p_i^1,</text:span><text:span text:style-name="T15"><text:tab/></text:span><text:span text:style-name="T15">0 → p_i^2, +1 → p_i^3</text:span></text:p>
                <text:p text:style-name="P13"><text:span text:style-name="T5">so that p_i^1+p_i^2+</text:span><text:span text:style-name="T15">p_i^3 = 1. (We can do this by using softmax function as an activate function to the output layer)</text:span></text:p>
              </text:list-item>
              <text:list-item>
                <text:p><text:span text:style-name="T14">Loss function: </text:span><text:span text:style-name="T16"><text:s/></text:span><text:span text:style-name="T15">Instead of MSE as in the previous paper, we calculate the cross-entropy for reconstruction error.</text:span></text:p>
              </text:list-item>
              <text:list-item>
                <text:p><text:span text:style-name="T14">Samples from decoder: </text:span><text:span text:style-name="T15"><text:s/>We use jax.random.categorical() for generating samples </text:span></text:p>
              </text:list-item>
            </text:list>
            <text:p><text:span text:style-name="T6"/></text:p>
          </draw:text-box>
        </draw:frame>
        <presentation:notes draw:style-name="dp2">
          <draw:page-thumbnail draw:style-name="gr8" draw:layer="layout" svg:width="19.798cm" svg:height="11.136cm" svg:x="0.6cm" svg:y="2.257cm" draw:page-number="7" presentation:class="page"/>
          <draw:frame presentation:style-name="pr1"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draw:style-name="gr1" draw:text-style-name="P1" draw:layer="layout" svg:width="17.81cm" svg:height="0.962cm" svg:x="0.072cm" svg:y="0.123cm">
          <draw:text-box>
            <text:p><text:span text:style-name="T1">BENCHMARK: dVAE for Spin-1 system</text:span></text:p>
          </draw:text-box>
        </draw:frame>
        <draw:frame draw:style-name="gr26" draw:text-style-name="P5" draw:layer="layout" svg:width="27.684cm" svg:height="2.054cm" svg:x="0.1cm" svg:y="1.343cm">
          <draw:text-box>
            <text:p><text:span text:style-name="T3">Product state</text:span></text:p>
            <text:p><text:span text:style-name="T6">We prepare the simple product state where there are no correlations between sites, and all the sites are in a same state (+1, 0, or -1). We feed the samples to dVAE to benchmark the code for spin-1 systems.</text:span></text:p>
          </draw:text-box>
        </draw:frame>
        <presentation:notes draw:style-name="dp1">
          <draw:page-thumbnail draw:style-name="gr8" draw:layer="layout" svg:width="19.798cm" svg:height="11.136cm" svg:x="0.6cm" svg:y="2.257cm" draw:page-number="8" presentation:class="page"/>
          <draw:frame presentation:style-name="pr1"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draw:style-name="gr1" draw:text-style-name="P1" draw:layer="layout" svg:width="17.81cm" svg:height="0.962cm" svg:x="0.072cm" svg:y="0.123cm">
          <draw:text-box>
            <text:p><text:span text:style-name="T1">Experiments with cpVAE on string order in spin models</text:span></text:p>
          </draw:text-box>
        </draw:frame>
        <draw:frame draw:style-name="gr17" draw:text-style-name="P5" draw:layer="layout" svg:width="12.887cm" svg:height="0.839cm" svg:x="0.637cm" svg:y="1.176cm">
          <draw:text-box>
            <text:p><text:span text:style-name="T7">Generating data</text:span></text:p>
          </draw:text-box>
        </draw:frame>
        <draw:frame draw:style-name="gr2" draw:text-style-name="P2" draw:layer="layout" svg:width="9.606cm" svg:height="2.131cm" svg:x="1.568cm" svg:y="2.4cm">
          <draw:image xlink:href="Pictures/1000000100000354000000BDA2F6D301.png" xlink:type="simple" xlink:show="embed" xlink:actuate="onLoad" draw:mime-type="image/png">
            <text:p/>
          </draw:image>
        </draw:frame>
        <draw:frame draw:style-name="gr27" draw:text-style-name="P14" draw:layer="layout" svg:width="15.36cm" svg:height="2.033cm" svg:x="11.956cm" svg:y="2.181cm">
          <draw:text-box>
            <text:p><text:span text:style-name="T13">The general spin-1 model. We use α=cos(θ) and β=sin(θ).</text:span></text:p>
            <text:list text:style-name="L1">
              <text:list-item>
                <text:p><text:span text:style-name="T13">θ=0.0: Heisenberg model</text:span></text:p>
              </text:list-item>
              <text:list-item>
                <text:p><text:span text:style-name="T17">arctan(</text:span><text:span text:style-name="T13">θ)=1/3: AKLT model</text:span></text:p>
              </text:list-item>
            </text:list>
          </draw:text-box>
        </draw:frame>
        <presentation:notes draw:style-name="dp2">
          <draw:page-thumbnail draw:style-name="gr8" draw:layer="layout" svg:width="19.798cm" svg:height="11.136cm" svg:x="0.6cm" svg:y="2.257cm" draw:page-number="9" presentation:class="page"/>
          <draw:frame presentation:style-name="pr1" draw:text-style-name="P7"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draw:style-name="gr1" draw:text-style-name="P1" draw:layer="layout" svg:width="17.81cm" svg:height="0.962cm" svg:x="0.072cm" svg:y="0.123cm">
          <draw:text-box>
            <text:p><text:span text:style-name="T1">Experiments with cpVAE on string order in spin models</text:span></text:p>
          </draw:text-box>
        </draw:frame>
        <draw:frame draw:style-name="gr1" draw:text-style-name="P15" draw:layer="layout" svg:width="5.464cm" svg:height="0.962cm" svg:x="22.367cm" svg:y="0.172cm">
          <draw:text-box>
            <text:p text:style-name="P3"><text:span text:style-name="T1">Generating data</text:span></text:p>
          </draw:text-box>
        </draw:frame>
        <draw:frame draw:style-name="gr17" draw:text-style-name="P5" draw:layer="layout" svg:width="12.887cm" svg:height="0.839cm" svg:x="0.466cm" svg:y="1.153cm">
          <draw:text-box>
            <text:p><text:span text:style-name="T7">Benchmark of the code for generating data </text:span></text:p>
          </draw:text-box>
        </draw:frame>
        <draw:frame draw:style-name="gr2" draw:text-style-name="P2" draw:layer="layout" svg:width="12.04cm" svg:height="1.594cm" svg:x="1.509cm" svg:y="3.119cm">
          <draw:image xlink:href="Pictures/10000001000005B1000000C102F0FB83.png" xlink:type="simple" xlink:show="embed" xlink:actuate="onLoad" draw:mime-type="image/png">
            <text:p/>
          </draw:image>
        </draw:frame>
        <draw:frame draw:style-name="gr17" draw:text-style-name="P5" draw:layer="layout" svg:width="12.887cm" svg:height="0.839cm" svg:x="0.908cm" svg:y="2.28cm">
          <draw:text-box>
            <text:p><text:span text:style-name="T7">Exactly-solvable AKLT model</text:span></text:p>
          </draw:text-box>
        </draw:frame>
        <draw:frame draw:style-name="gr19" draw:layer="layout" svg:width="9.329cm" svg:height="8.501cm" svg:x="1.891cm" svg:y="5.825cm">
          <table:table table:template-name="default" table:use-first-row-styles="true" table:use-banding-rows-styles="true">
            <table:table-column table:style-name="co2"/>
            <table:table-column table:style-name="co2"/>
            <table:table-column table:style-name="co2"/>
            <table:table-row table:style-name="ro2" table:default-cell-style-name="ce2">
              <table:table-cell table:style-name="ce1"/>
              <table:table-cell>
                <text:p text:style-name="P16"><text:span text:style-name="T18">Exact</text:span></text:p>
              </table:table-cell>
              <table:table-cell>
                <text:p text:style-name="P16"><text:span text:style-name="T18">Code</text:span></text:p>
              </table:table-cell>
            </table:table-row>
            <table:table-row table:style-name="ro3" table:default-cell-style-name="ce1">
              <table:table-cell table:style-name="ce2">
                <text:p text:style-name="P17"><text:span text:style-name="T18">Ground energy per site*</text:span></text:p>
              </table:table-cell>
              <table:table-cell>
                <text:p text:style-name="P10"><text:span text:style-name="T13">0.0</text:span></text:p>
                <text:p text:style-name="P10"><text:span text:style-name="T13">(-0.6324555)</text:span></text:p>
              </table:table-cell>
              <table:table-cell>
                <text:p text:style-name="P10"><text:span text:style-name="T13">-0.632456</text:span></text:p>
                <text:p text:style-name="P10"><text:span text:style-name="T13">(scaled)</text:span></text:p>
              </table:table-cell>
            </table:table-row>
            <table:table-row table:style-name="ro4" table:default-cell-style-name="ce1">
              <table:table-cell table:style-name="ce2">
                <text:p text:style-name="P17"><text:span text:style-name="T18">Entropy</text:span></text:p>
              </table:table-cell>
              <table:table-cell>
                <text:p text:style-name="P10"><text:span text:style-name="T13">log 2</text:span></text:p>
                <text:p text:style-name="P10"><text:span text:style-name="T13">~ 0.69</text:span></text:p>
              </table:table-cell>
              <table:table-cell>
                <text:p text:style-name="P10"><text:span text:style-name="T13">0.693147</text:span></text:p>
              </table:table-cell>
            </table:table-row>
            <table:table-row table:style-name="ro4" table:default-cell-style-name="ce1">
              <table:table-cell table:style-name="ce2">
                <text:p text:style-name="P17"><text:span text:style-name="T18">String order</text:span></text:p>
              </table:table-cell>
              <table:table-cell>
                <text:p text:style-name="P10"><text:span text:style-name="T13">4/9</text:span></text:p>
                <text:p text:style-name="P10"><text:span text:style-name="T13">~ 0.44</text:span></text:p>
              </table:table-cell>
              <table:table-cell>
                <text:p text:style-name="P10"><text:span text:style-name="T13">0.444444</text:span></text:p>
              </table:table-cell>
            </table:table-row>
            <table:table-row table:style-name="ro3" table:default-cell-style-name="ce1">
              <table:table-cell table:style-name="ce2">
                <text:p text:style-name="P17"><text:span text:style-name="T18">Correlation</text:span></text:p>
              </table:table-cell>
              <table:table-cell>
                <text:p text:style-name="P10"><text:span text:style-name="T13">Exponential</text:span></text:p>
                <text:p text:style-name="P10"><text:span text:style-name="T13">decay</text:span></text:p>
              </table:table-cell>
              <table:table-cell>
                <text:p text:style-name="P10"><text:span text:style-name="T13">Exponential decay</text:span></text:p>
              </table:table-cell>
            </table:table-row>
          </table:table>
          <draw:image xlink:href="Pictures/TablePreview2.svm" xlink:type="simple" xlink:show="embed" xlink:actuate="onLoad"/>
        </draw:frame>
        <draw:frame draw:style-name="gr28" draw:text-style-name="P18" draw:layer="layout" svg:width="11.857cm" svg:height="7.129cm" svg:x="15.141cm" svg:y="2.843cm">
          <draw:text-box>
            <text:p><text:span text:style-name="T19">Computational conditions:</text:span></text:p>
            <text:list text:style-name="L1">
              <text:list-item>
                <text:p><text:span text:style-name="T20">N = 200 (number of spin), OBC</text:span></text:p>
                <text:p><text:span text:style-name="T20">but N = 100,200,300 is used for scaling</text:span></text:p>
              </text:list-item>
              <text:list-item>
                <text:p><text:span text:style-name="T20">Correlation functions: Let i0 is the centering site (i0=N/2) and calculate until i0+r=N</text:span></text:p>
              </text:list-item>
              <text:list-item>
                <text:p><text:span text:style-name="T20">String order correlation function (α=z)</text:span></text:p>
              </text:list-item>
            </text:list>
            <text:p><text:span text:style-name="T20"/></text:p>
            <text:p><text:span text:style-name="T20"/></text:p>
            <text:p><text:span text:style-name="T20"/></text:p>
            <text:p><text:span text:style-name="T20"/></text:p>
            <text:list text:continue-numbering="true" text:style-name="L1">
              <text:list-item>
                <text:p><text:span text:style-name="T17">Correlation function (</text:span><text:span text:style-name="T20">α=x,y,z)</text:span></text:p>
              </text:list-item>
            </text:list>
          </draw:text-box>
        </draw:frame>
        <draw:frame draw:style-name="gr2" draw:text-style-name="P2" draw:layer="layout" svg:width="8.156cm" svg:height="1.672cm" svg:x="16.857cm" svg:y="6.484cm">
          <draw:image xlink:href="Pictures/10000001000003C1000000C50363C0DD.png" xlink:type="simple" xlink:show="embed" xlink:actuate="onLoad" draw:mime-type="image/png">
            <text:p/>
          </draw:image>
        </draw:frame>
        <draw:frame draw:style-name="gr2" draw:text-style-name="P2" draw:layer="layout" svg:width="6.977cm" svg:height="1.43cm" svg:x="17.201cm" svg:y="9.151cm">
          <draw:image xlink:href="Pictures/10000001000003C1000000C573350A38.png" xlink:type="simple" xlink:show="embed" xlink:actuate="onLoad" draw:mime-type="image/png">
            <text:p/>
          </draw:image>
        </draw:frame>
        <draw:frame draw:style-name="gr2" draw:text-style-name="P2" draw:layer="layout" svg:width="9.753cm" svg:height="8.633cm" svg:x="14.476cm" svg:y="11.347cm">
          <draw:image xlink:href="Pictures/10001E710000E02C0000C670B3EDF066.pdf" xlink:type="simple" xlink:show="embed" xlink:actuate="onLoad" draw:mime-type="application/pdf" loext:page-number="0">
            <text:p/>
          </draw:image>
          <draw:image xlink:href="Pictures/100000010000087900000780822C90CE.png" xlink:type="simple" xlink:show="embed" xlink:actuate="onLoad" draw:mime-type="image/png"/>
        </draw:frame>
        <draw:frame draw:style-name="gr3" draw:text-style-name="P19" draw:layer="layout" svg:width="9.431cm" svg:height="0.725cm" svg:x="15.139cm" svg:y="19.88cm">
          <draw:text-box>
            <text:p><text:span text:style-name="T21">System size scaling of ground energy per site</text:span></text:p>
          </draw:text-box>
        </draw:frame>
        <draw:frame draw:style-name="gr29" draw:text-style-name="P20" draw:layer="layout" svg:width="11.514cm" svg:height="5.292cm" svg:x="1.74cm" svg:y="15.018cm">
          <draw:text-box>
            <text:p><text:span text:style-name="T22">Ground energy</text:span></text:p>
            <text:p><text:span text:style-name="T20">Due to the constant difference of the exact-solvable form (where the ground energy is 0.0) and coded AKLT Hamiltonian, the true ground energy (per site) is </text:span></text:p>
            <text:p><text:span text:style-name="T20"/></text:p>
            <text:p><text:span text:style-name="T20">-2/3*cos(θ), θ=arctan(1/3) = -0.6324555</text:span></text:p>
            <text:p><text:span text:style-name="T20"/></text:p>
            <text:p><text:span text:style-name="T20"/></text:p>
          </draw:text-box>
        </draw:frame>
        <presentation:notes draw:style-name="dp2">
          <draw:page-thumbnail draw:style-name="gr8" draw:layer="layout" svg:width="19.798cm" svg:height="11.136cm" svg:x="0.6cm" svg:y="2.257cm" draw:page-number="10" presentation:class="page"/>
          <draw:frame presentation:style-name="pr1" draw:text-style-name="P7"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draw:style-name="gr2" draw:text-style-name="P2" draw:layer="layout" svg:width="6.35cm" svg:height="4.75cm" svg:x="14.623cm" svg:y="8.13cm">
          <draw:image xlink:href="Pictures/1000000000000280000001E08DE80222.png" xlink:type="simple" xlink:show="embed" xlink:actuate="onLoad" draw:mime-type="image/png">
            <text:p/>
          </draw:image>
        </draw:frame>
        <draw:frame draw:style-name="gr2" draw:text-style-name="P2" draw:layer="layout" svg:width="6.35cm" svg:height="4.75cm" svg:x="15.431cm" svg:y="14.405cm">
          <draw:image xlink:href="Pictures/1000000000000280000001E0A643510D.png" xlink:type="simple" xlink:show="embed" xlink:actuate="onLoad" draw:mime-type="image/png">
            <text:p/>
          </draw:image>
        </draw:frame>
        <draw:frame draw:style-name="gr1" draw:text-style-name="P1" draw:layer="layout" svg:width="17.81cm" svg:height="0.962cm" svg:x="0.072cm" svg:y="0.123cm">
          <draw:text-box>
            <text:p><text:span text:style-name="T1">Experiments with cpVAE on string order in spin models</text:span></text:p>
          </draw:text-box>
        </draw:frame>
        <draw:frame draw:style-name="gr1" draw:text-style-name="P15" draw:layer="layout" svg:width="5.464cm" svg:height="0.962cm" svg:x="22.367cm" svg:y="0.172cm">
          <draw:text-box>
            <text:p text:style-name="P3"><text:span text:style-name="T1">Generating data</text:span></text:p>
          </draw:text-box>
        </draw:frame>
        <draw:frame draw:style-name="gr17" draw:text-style-name="P5" draw:layer="layout" svg:width="12.887cm" svg:height="0.839cm" svg:x="0.466cm" svg:y="1.153cm">
          <draw:text-box>
            <text:p><text:span text:style-name="T7">Benchmark of the code for generating data </text:span></text:p>
          </draw:text-box>
        </draw:frame>
        <draw:frame draw:style-name="gr30" draw:text-style-name="P5" draw:layer="layout" svg:width="18.693cm" svg:height="4.169cm" svg:x="0.466cm" svg:y="1.992cm">
          <draw:text-box>
            <text:p><text:span text:style-name="T7">Sampling</text:span></text:p>
            <text:p><text:span text:style-name="T23">We calculate the expectation values using sampling generated from the resulting MPS through DMRG, to know how big samples is enough to recover the true expectation value. </text:span></text:p>
            <text:p><text:span text:style-name="T23">We calculate the z-axis spin and the string correlator, and compare the results from the normally calculated value in MPS term (true) and the samplings (relative error). </text:span></text:p>
            <text:p><text:span text:style-name="T23">For simplicity, we use the AKLT for comparison.</text:span></text:p>
          </draw:text-box>
        </draw:frame>
        <draw:g draw:style-name="gr4">
          <draw:frame draw:style-name="gr31" draw:text-style-name="P22" draw:layer="layout" svg:width="8.403cm" svg:height="4.824cm" svg:x="19.379cm" svg:y="4.24cm">
            <draw:text-box>
              <text:p text:style-name="P21"><text:span text:style-name="T24">Computational conditions:</text:span></text:p>
              <text:list text:style-name="L1">
                <text:list-item>
                  <text:p text:style-name="P21"><text:span text:style-name="T25">N = 10 </text:span><text:span text:style-name="T26">(</text:span><text:span text:style-name="T27">number of spin), θ=arctan(1/3) [equivalent to AKLT]</text:span></text:p>
                </text:list-item>
                <text:list-item>
                  <text:p text:style-name="P21"><text:span text:style-name="T27">String order correlation function (α=z)</text:span></text:p>
                </text:list-item>
              </text:list>
              <text:p text:style-name="P21"><text:span text:style-name="T27"/></text:p>
              <text:p text:style-name="P21"><text:span text:style-name="T27"/></text:p>
              <text:p text:style-name="P21"><text:span text:style-name="T27"/></text:p>
              <text:list text:continue-numbering="true" text:style-name="L1">
                <text:list-item>
                  <text:p text:style-name="P21"><text:span text:style-name="T28">Correlation function (</text:span><text:span text:style-name="T27">α=z)</text:span></text:p>
                </text:list-item>
              </text:list>
            </draw:text-box>
          </draw:frame>
          <draw:frame draw:style-name="gr2" draw:text-style-name="P23" draw:layer="layout" svg:width="6.025cm" svg:height="1.235cm" svg:x="20.727cm" svg:y="6.268cm">
            <draw:image xlink:href="Pictures/10000001000003C1000000C50363C0DD.png" xlink:type="simple" xlink:show="embed" xlink:actuate="onLoad" draw:mime-type="image/png">
              <text:p/>
            </draw:image>
          </draw:frame>
          <draw:frame draw:style-name="gr2" draw:text-style-name="P23" draw:layer="layout" svg:width="5.436cm" svg:height="1.114cm" svg:x="20.802cm" svg:y="8.266cm">
            <draw:image xlink:href="Pictures/10000001000003C1000000C573350A38.png" xlink:type="simple" xlink:show="embed" xlink:actuate="onLoad" draw:mime-type="image/png">
              <text:p/>
            </draw:image>
          </draw:frame>
        </draw:g>
        <draw:frame draw:style-name="gr6" draw:text-style-name="P6" draw:layer="layout" svg:width="8.282cm" svg:height="0.999cm" svg:x="19.159cm" svg:y="2.672cm">
          <draw:object xlink:href="./Object 1" xlink:type="simple" xlink:show="embed" xlink:actuate="onLoad">
            <loext:p/>
          </draw:object>
          <draw:image xlink:href="./ObjectReplacements/Object 1" xlink:type="simple" xlink:show="embed" xlink:actuate="onLoad"/>
        </draw:frame>
        <draw:frame draw:style-name="gr2" draw:text-style-name="P2" draw:layer="layout" svg:width="6.35cm" svg:height="4.75cm" svg:x="10.094cm" svg:y="14.405cm">
          <draw:image xlink:href="Pictures/1000000000000280000001E0520CEBC7.png" xlink:type="simple" xlink:show="embed" xlink:actuate="onLoad" draw:mime-type="image/png">
            <text:p/>
          </draw:image>
        </draw:frame>
        <draw:frame draw:style-name="gr32" draw:text-style-name="P24" draw:layer="layout" svg:width="4.973cm" svg:height="0.725cm" svg:x="11.196cm" svg:y="13.68cm">
          <draw:text-box>
            <text:p text:style-name="P6"><text:span text:style-name="T29"># of sample: 100</text:span></text:p>
          </draw:text-box>
        </draw:frame>
        <draw:frame draw:style-name="gr32" draw:text-style-name="P24" draw:layer="layout" svg:width="4.973cm" svg:height="0.725cm" svg:x="16.444cm" svg:y="13.68cm">
          <draw:text-box>
            <text:p text:style-name="P6"><text:span text:style-name="T29"># of sample: 500</text:span></text:p>
          </draw:text-box>
        </draw:frame>
        <draw:frame draw:style-name="gr2" draw:text-style-name="P2" draw:layer="layout" svg:width="6.35cm" svg:height="4.75cm" svg:x="9.274cm" svg:y="8.13cm">
          <draw:image xlink:href="Pictures/1000000000000280000001E05D70F6AF.png" xlink:type="simple" xlink:show="embed" xlink:actuate="onLoad" draw:mime-type="image/png">
            <text:p/>
          </draw:image>
        </draw:frame>
        <draw:frame draw:style-name="gr2" draw:text-style-name="P2" draw:layer="layout" svg:width="9.144cm" svg:height="6.833cm" svg:x="0.746cm" svg:y="6.946cm">
          <draw:image xlink:href="Pictures/1000000000000280000001E00F56EEAD.png" xlink:type="simple" xlink:show="embed" xlink:actuate="onLoad" draw:mime-type="image/png">
            <text:p/>
          </draw:image>
        </draw:frame>
        <draw:frame draw:style-name="gr6" draw:text-style-name="P6" draw:layer="layout" svg:width="2.338cm" svg:height="0.812cm" svg:x="6.002cm" svg:y="7.741cm">
          <draw:object xlink:href="./Object 2" xlink:type="simple" xlink:show="embed" xlink:actuate="onLoad">
            <loext:p/>
          </draw:object>
          <draw:image xlink:href="./ObjectReplacements/Object 2" xlink:type="simple" xlink:show="embed" xlink:actuate="onLoad"/>
        </draw:frame>
        <draw:frame draw:style-name="gr2" draw:text-style-name="P2" draw:layer="layout" svg:width="9.144cm" svg:height="6.833cm" svg:x="0.793cm" svg:y="12.88cm">
          <draw:image xlink:href="Pictures/1000000000000280000001E0B96F4DBE.png" xlink:type="simple" xlink:show="embed" xlink:actuate="onLoad" draw:mime-type="image/png">
            <text:p/>
          </draw:image>
        </draw:frame>
        <draw:frame draw:style-name="gr6" draw:text-style-name="P6" draw:layer="layout" svg:width="1.251cm" svg:height="0.777cm" svg:x="7.105cm" svg:y="14.013cm">
          <draw:object xlink:href="./Object 3" xlink:type="simple" xlink:show="embed" xlink:actuate="onLoad">
            <loext:p/>
          </draw:object>
          <draw:image xlink:href="./ObjectReplacements/Object 3" xlink:type="simple" xlink:show="embed" xlink:actuate="onLoad"/>
        </draw:frame>
        <draw:frame draw:style-name="gr32" draw:text-style-name="P24" draw:layer="layout" svg:width="4.973cm" svg:height="0.725cm" svg:x="10.29cm" svg:y="9.242cm">
          <draw:text-box>
            <text:p text:style-name="P6"><text:span text:style-name="T29"># of sample: 100</text:span></text:p>
          </draw:text-box>
        </draw:frame>
        <draw:frame draw:style-name="gr32" draw:text-style-name="P24" draw:layer="layout" svg:width="4.973cm" svg:height="0.725cm" svg:x="15.624cm" svg:y="9.267cm">
          <draw:text-box>
            <text:p text:style-name="P6"><text:span text:style-name="T29"># of sample: 500</text:span></text:p>
          </draw:text-box>
        </draw:frame>
        <presentation:notes draw:style-name="dp2">
          <draw:page-thumbnail draw:style-name="gr8" draw:layer="layout" svg:width="19.798cm" svg:height="11.136cm" svg:x="0.6cm" svg:y="2.257cm" draw:page-number="11" presentation:class="page"/>
          <draw:frame presentation:style-name="pr1" draw:text-style-name="P7"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draw:style-name="gr1" draw:text-style-name="P1" draw:layer="layout" svg:width="17.81cm" svg:height="0.962cm" svg:x="0.072cm" svg:y="0.123cm">
          <draw:text-box>
            <text:p><text:span text:style-name="T1">Experiments with cpVAE on string order in spin models</text:span></text:p>
          </draw:text-box>
        </draw:frame>
        <draw:frame draw:style-name="gr1" draw:text-style-name="P15" draw:layer="layout" svg:width="5.464cm" svg:height="0.962cm" svg:x="22.367cm" svg:y="0.172cm">
          <draw:text-box>
            <text:p text:style-name="P3"><text:span text:style-name="T1">Generating data</text:span></text:p>
          </draw:text-box>
        </draw:frame>
        <draw:frame draw:style-name="gr22" draw:text-style-name="P25" draw:layer="layout" svg:width="12.887cm" svg:height="0.878cm" svg:x="0.466cm" svg:y="1.153cm">
          <draw:text-box>
            <text:p><text:span text:style-name="T7">Varying θ</text:span></text:p>
          </draw:text-box>
        </draw:frame>
        <draw:g draw:style-name="gr4">
          <draw:frame draw:style-name="gr33" draw:text-style-name="P22" draw:layer="layout" svg:width="8.403cm" svg:height="3.095cm" svg:x="19.379cm" svg:y="4.24cm">
            <draw:text-box>
              <text:p text:style-name="P21"><text:span text:style-name="T24">Computational conditions:</text:span></text:p>
              <text:list text:style-name="L1">
                <text:list-item>
                  <text:p text:style-name="P21"><text:span text:style-name="T25">N = 50,100,150 </text:span><text:span text:style-name="T26">(</text:span><text:span text:style-name="T27">number of spin)</text:span></text:p>
                </text:list-item>
                <text:list-item>
                  <text:p text:style-name="P21"><text:span text:style-name="T27">OBC</text:span></text:p>
                </text:list-item>
                <text:list-item>
                  <text:p text:style-name="P21"><text:span text:style-name="T27">Maxbonddim = 100</text:span></text:p>
                </text:list-item>
                <text:list-item>
                  <text:p text:style-name="P21"><text:span text:style-name="T27">max_sweep = 50 (stop before if energy_tol=1e-8)</text:span></text:p>
                </text:list-item>
              </text:list>
            </draw:text-box>
          </draw:frame>
        </draw:g>
        <draw:frame draw:style-name="gr6" draw:text-style-name="P6" draw:layer="layout" svg:width="8.282cm" svg:height="0.999cm" svg:x="19.159cm" svg:y="2.672cm">
          <draw:object xlink:href="./Object 4" xlink:type="simple" xlink:show="embed" xlink:actuate="onLoad">
            <loext:p/>
          </draw:object>
          <draw:image xlink:href="./ObjectReplacements/Object 4" xlink:type="simple" xlink:show="embed" xlink:actuate="onLoad"/>
        </draw:frame>
        <draw:frame draw:style-name="gr2" draw:text-style-name="P2" draw:layer="layout" svg:width="10.452cm" svg:height="9.592cm" svg:x="17.101cm" svg:y="9.017cm">
          <draw:image xlink:href="Pictures/1000000100000681000005F817FF4C25.png" xlink:type="simple" xlink:show="embed" xlink:actuate="onLoad" draw:mime-type="image/png">
            <text:p/>
          </draw:image>
        </draw:frame>
        <draw:frame draw:style-name="gr34" draw:text-style-name="P14" draw:layer="layout" svg:width="9.898cm" svg:height="1.199cm" svg:x="17.116cm" svg:y="7.766cm">
          <draw:text-box>
            <text:p><text:span text:style-name="T2">Ref. Bachelor Thesis</text:span></text:p>
            <text:p><text:span text:style-name="T2">Johannes Gutenberg University Mainz</text:span></text:p>
          </draw:text-box>
        </draw:frame>
        <draw:frame draw:style-name="gr2" draw:text-style-name="P2" draw:layer="layout" svg:width="11.36cm" svg:height="8.519cm" svg:x="1.09cm" svg:y="2.8cm">
          <draw:image xlink:href="Pictures/1000000000000280000001E0B2B706C4.png" xlink:type="simple" xlink:show="embed" xlink:actuate="onLoad" draw:mime-type="image/png">
            <text:p/>
          </draw:image>
        </draw:frame>
        <draw:frame draw:style-name="gr2" draw:text-style-name="P2" draw:layer="layout" svg:width="8.007cm" svg:height="6.005cm" svg:x="6.178cm" svg:y="14.234cm">
          <draw:image xlink:href="Pictures/1000000000000280000001E0A3DD3E8E.png" xlink:type="simple" xlink:show="embed" xlink:actuate="onLoad" draw:mime-type="image/png">
            <text:p/>
          </draw:image>
        </draw:frame>
        <draw:frame draw:style-name="gr6" draw:text-style-name="P6" draw:layer="layout" svg:width="1.34cm" svg:height="0.662cm" svg:x="10.167cm" svg:y="4.606cm">
          <draw:object xlink:href="./Object 5" xlink:type="simple" xlink:show="embed" xlink:actuate="onLoad">
            <loext:p/>
          </draw:object>
          <draw:image xlink:href="./ObjectReplacements/Object 5" xlink:type="simple" xlink:show="embed" xlink:actuate="onLoad"/>
        </draw:frame>
        <draw:frame draw:style-name="gr6" draw:text-style-name="P6" draw:layer="layout" svg:width="5.227cm" svg:height="0.639cm" svg:x="2.255cm" svg:y="11.882cm">
          <draw:object xlink:href="./Object 6" xlink:type="simple" xlink:show="embed" xlink:actuate="onLoad">
            <loext:p/>
          </draw:object>
          <draw:image xlink:href="./ObjectReplacements/Object 6" xlink:type="simple" xlink:show="embed" xlink:actuate="onLoad"/>
        </draw:frame>
        <draw:frame draw:style-name="gr6" draw:text-style-name="P6" draw:layer="layout" svg:width="6.973cm" svg:height="0.678cm" svg:x="2.181cm" svg:y="12.788cm">
          <draw:object xlink:href="./Object 7" xlink:type="simple" xlink:show="embed" xlink:actuate="onLoad">
            <loext:p/>
          </draw:object>
          <draw:image xlink:href="./ObjectReplacements/Object 7" xlink:type="simple" xlink:show="embed" xlink:actuate="onLoad"/>
        </draw:frame>
        <draw:frame draw:style-name="gr6" draw:text-style-name="P6" draw:layer="layout" svg:width="1.571cm" svg:height="0.662cm" svg:x="12.103cm" svg:y="16.855cm">
          <draw:object xlink:href="./Object 8" xlink:type="simple" xlink:show="embed" xlink:actuate="onLoad">
            <loext:p/>
          </draw:object>
          <draw:image xlink:href="./ObjectReplacements/Object 8" xlink:type="simple" xlink:show="embed" xlink:actuate="onLoad"/>
        </draw:frame>
        <presentation:notes draw:style-name="dp2">
          <draw:page-thumbnail draw:style-name="gr8" draw:layer="layout" svg:width="19.798cm" svg:height="11.136cm" svg:x="0.6cm" svg:y="2.257cm" draw:page-number="12" presentation:class="page"/>
          <draw:frame presentation:style-name="pr1" draw:text-style-name="P7"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draw:style-name="gr1" draw:text-style-name="P1" draw:layer="layout" svg:width="17.81cm" svg:height="0.962cm" svg:x="0.072cm" svg:y="0.123cm">
          <draw:text-box>
            <text:p><text:span text:style-name="T1">Experiments with cpVAE on string order in spin models</text:span></text:p>
          </draw:text-box>
        </draw:frame>
        <draw:frame draw:style-name="gr1" draw:text-style-name="P15" draw:layer="layout" svg:width="5.464cm" svg:height="0.962cm" svg:x="22.367cm" svg:y="0.172cm">
          <draw:text-box>
            <text:p text:style-name="P3"><text:span text:style-name="T1">Generating data</text:span></text:p>
          </draw:text-box>
        </draw:frame>
        <draw:frame draw:style-name="gr17" draw:text-style-name="P5" draw:layer="layout" svg:width="12.887cm" svg:height="0.839cm" svg:x="0.466cm" svg:y="1.153cm">
          <draw:text-box>
            <text:p><text:span text:style-name="T7">Varying θ, N = 150</text:span></text:p>
          </draw:text-box>
        </draw:frame>
        <draw:g draw:style-name="gr4">
          <draw:frame draw:style-name="gr33" draw:text-style-name="P22" draw:layer="layout" svg:width="8.403cm" svg:height="3.095cm" svg:x="19.379cm" svg:y="4.24cm">
            <draw:text-box>
              <text:p text:style-name="P21"><text:span text:style-name="T24">Computational conditions:</text:span></text:p>
              <text:list text:style-name="L1">
                <text:list-item>
                  <text:p text:style-name="P21"><text:span text:style-name="T25">N = 150 </text:span><text:span text:style-name="T26">(</text:span><text:span text:style-name="T27">number of spin)</text:span></text:p>
                </text:list-item>
                <text:list-item>
                  <text:p text:style-name="P21"><text:span text:style-name="T27">OBC</text:span></text:p>
                </text:list-item>
                <text:list-item>
                  <text:p text:style-name="P21"><text:span text:style-name="T27">Maxbonddim = 100</text:span></text:p>
                </text:list-item>
                <text:list-item>
                  <text:p text:style-name="P21"><text:span text:style-name="T27">max_sweep = 50 (stop before if energy_tol=1e-8)</text:span></text:p>
                </text:list-item>
              </text:list>
            </draw:text-box>
          </draw:frame>
        </draw:g>
        <draw:frame draw:style-name="gr6" draw:text-style-name="P6" draw:layer="layout" svg:width="8.282cm" svg:height="0.999cm" svg:x="19.159cm" svg:y="2.672cm">
          <draw:object xlink:href="./Object 9" xlink:type="simple" xlink:show="embed" xlink:actuate="onLoad">
            <loext:p/>
          </draw:object>
          <draw:image xlink:href="./ObjectReplacements/Object 9" xlink:type="simple" xlink:show="embed" xlink:actuate="onLoad"/>
        </draw:frame>
        <draw:g draw:style-name="gr4">
          <draw:frame draw:style-name="gr2" draw:text-style-name="P2" draw:layer="layout" svg:width="10.452cm" svg:height="9.592cm" svg:x="7.327cm" svg:y="7.621cm">
            <draw:image xlink:href="Pictures/1000000100000681000005F817FF4C25.png" xlink:type="simple" xlink:show="embed" xlink:actuate="onLoad" draw:mime-type="image/png">
              <text:p/>
            </draw:image>
          </draw:frame>
          <draw:frame draw:style-name="gr34" draw:text-style-name="P14" draw:layer="layout" svg:width="9.898cm" svg:height="1.199cm" svg:x="7.342cm" svg:y="6.37cm">
            <draw:text-box>
              <text:p><text:span text:style-name="T2">Ref. Bachelor Thesis</text:span></text:p>
              <text:p><text:span text:style-name="T2">Johannes Gutenberg University Mainz</text:span></text:p>
            </draw:text-box>
          </draw:frame>
        </draw:g>
        <draw:frame draw:style-name="gr6" draw:text-style-name="P6" draw:layer="layout" svg:width="2.765cm" svg:height="0.585cm" svg:x="14.176cm" svg:y="19.532cm">
          <draw:object xlink:href="./Object 16" xlink:type="simple" xlink:show="embed" xlink:actuate="onLoad">
            <loext:p/>
          </draw:object>
          <draw:image xlink:href="./ObjectReplacements/Object 16" xlink:type="simple" xlink:show="embed" xlink:actuate="onLoad"/>
        </draw:frame>
        <draw:g draw:style-name="gr4">
          <draw:frame draw:style-name="gr35" draw:text-style-name="P26" draw:layer="layout" svg:width="6.452cm" svg:height="4.826cm" svg:x="12.358cm" svg:y="1.752cm">
            <draw:image xlink:href="Pictures/1000000000000280000001E00F99CF3D.png" xlink:type="simple" xlink:show="embed" xlink:actuate="onLoad" draw:mime-type="image/png">
              <text:p/>
            </draw:image>
          </draw:frame>
          <draw:frame draw:style-name="gr36" draw:text-style-name="P27" draw:layer="layout" svg:width="2.368cm" svg:height="0.585cm" svg:x="15.875cm" svg:y="1.339cm">
            <draw:object xlink:href="./Object 15" xlink:type="simple" xlink:show="embed" xlink:actuate="onLoad">
              <loext:p/>
            </draw:object>
            <draw:image xlink:href="./ObjectReplacements/Object 15" xlink:type="simple" xlink:show="embed" xlink:actuate="onLoad"/>
          </draw:frame>
          <draw:frame draw:style-name="gr36" draw:text-style-name="P27" draw:layer="layout" svg:width="1.534cm" svg:height="0.957cm" svg:x="16.512cm" svg:y="5.146cm">
            <draw:object xlink:href="./Object 17" xlink:type="simple" xlink:show="embed" xlink:actuate="onLoad">
              <loext:p/>
            </draw:object>
            <draw:image xlink:href="./ObjectReplacements/Object 17" xlink:type="simple" xlink:show="embed" xlink:actuate="onLoad"/>
          </draw:frame>
        </draw:g>
        <draw:g draw:style-name="gr4">
          <draw:frame draw:style-name="gr2" draw:text-style-name="P2" draw:layer="layout" svg:width="6.439cm" svg:height="4.829cm" svg:x="17.332cm" svg:y="9.286cm">
            <draw:image xlink:href="Pictures/1000000000000280000001E066F59BD3.png" xlink:type="simple" xlink:show="embed" xlink:actuate="onLoad" draw:mime-type="image/png">
              <text:p/>
            </draw:image>
          </draw:frame>
          <draw:frame draw:style-name="gr6" draw:text-style-name="P6" draw:layer="layout" svg:width="2.816cm" svg:height="0.957cm" svg:x="19.501cm" svg:y="9.874cm">
            <draw:object xlink:href="./Object 13" xlink:type="simple" xlink:show="embed" xlink:actuate="onLoad">
              <loext:p/>
            </draw:object>
            <draw:image xlink:href="./ObjectReplacements/Object 13" xlink:type="simple" xlink:show="embed" xlink:actuate="onLoad"/>
          </draw:frame>
          <draw:frame draw:style-name="gr6" draw:text-style-name="P6" draw:layer="layout" svg:width="2.375cm" svg:height="0.585cm" svg:x="19.697cm" svg:y="12.127cm">
            <draw:object xlink:href="./Object 18" xlink:type="simple" xlink:show="embed" xlink:actuate="onLoad">
              <loext:p/>
            </draw:object>
            <draw:image xlink:href="./ObjectReplacements/Object 18" xlink:type="simple" xlink:show="embed" xlink:actuate="onLoad"/>
          </draw:frame>
        </draw:g>
        <draw:frame draw:style-name="gr6" draw:text-style-name="P6" draw:layer="layout" svg:width="2.426cm" svg:height="0.973cm" svg:x="1.666cm" svg:y="8.306cm">
          <draw:object xlink:href="./Object 10" xlink:type="simple" xlink:show="embed" xlink:actuate="onLoad">
            <loext:p/>
          </draw:object>
          <draw:image xlink:href="./ObjectReplacements/Object 10" xlink:type="simple" xlink:show="embed" xlink:actuate="onLoad"/>
        </draw:frame>
        <draw:frame draw:style-name="gr6" draw:text-style-name="P6" draw:layer="layout" svg:width="2.368cm" svg:height="0.585cm" svg:x="4.092cm" svg:y="8.694cm">
          <draw:object xlink:href="./Object 11" xlink:type="simple" xlink:show="embed" xlink:actuate="onLoad">
            <loext:p/>
          </draw:object>
          <draw:image xlink:href="./ObjectReplacements/Object 11" xlink:type="simple" xlink:show="embed" xlink:actuate="onLoad"/>
        </draw:frame>
        <draw:frame draw:style-name="gr2" draw:text-style-name="P2" draw:layer="layout" svg:width="6.452cm" svg:height="4.826cm" svg:x="7.9cm" svg:y="16.22cm">
          <draw:image xlink:href="Pictures/1000000000000280000001E0855C1EFF.png" xlink:type="simple" xlink:show="embed" xlink:actuate="onLoad" draw:mime-type="image/png">
            <text:p/>
          </draw:image>
        </draw:frame>
        <draw:frame draw:style-name="gr2" draw:text-style-name="P2" draw:layer="layout" svg:width="6.452cm" svg:height="4.826cm" svg:x="0.723cm" svg:y="9.575cm">
          <draw:image xlink:href="Pictures/1000000000000280000001E09E073F14.png" xlink:type="simple" xlink:show="embed" xlink:actuate="onLoad" draw:mime-type="image/png">
            <text:p/>
          </draw:image>
        </draw:frame>
        <presentation:notes draw:style-name="dp2">
          <draw:page-thumbnail draw:style-name="gr8" draw:layer="layout" svg:width="19.798cm" svg:height="11.136cm" svg:x="0.6cm" svg:y="2.257cm" draw:page-number="13" presentation:class="page"/>
          <draw:frame presentation:style-name="pr1"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right"/>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3.505cm" svg:x="1.4cm" svg:y="0.837cm" presentation:class="title" presentation:placeholder="true">
        <draw:text-box/>
      </draw:frame>
      <draw:frame presentation:style-name="Default-outline1" draw:layer="backgroundobjects" svg:width="25.199cm" svg:height="12.179cm" svg:x="1.4cm" svg:y="4.913cm" presentation:class="outline" presentation:placeholder="true">
        <draw:text-box/>
      </draw:frame>
      <draw:frame presentation:style-name="Mpr1" draw:text-style-name="MP2" draw:layer="backgroundobjects" svg:width="6.523cm" svg:height="1.447cm" svg:x="1.4cm" svg:y="19.13cm" presentation:class="date-time">
        <draw:text-box>
          <text:p text:style-name="MP1"><text:span text:style-name="MT1"><presentation:date-time/></text:span></text:p>
        </draw:text-box>
      </draw:frame>
      <draw:frame presentation:style-name="Mpr1" draw:text-style-name="MP6" draw:layer="backgroundobjects" svg:width="8.875cm" svg:height="1.447cm" svg:x="9.576cm" svg:y="19.13cm" presentation:class="footer">
        <draw:text-box>
          <text:p text:style-name="MP5"><text:span text:style-name="MT1"><presentation:footer/></text:span></text:p>
        </draw:text-box>
      </draw:frame>
      <draw:frame presentation:style-name="Mpr1" draw:text-style-name="MP4" draw:layer="backgroundobjects" svg:width="6.523cm" svg:height="1.447cm" svg:x="20.076cm" svg:y="19.13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13:18:27.873363205</meta:creation-date>
    <dc:date>2026-05-24T16:03:31.730739253</dc:date>
    <meta:editing-duration>PT11H36M16S</meta:editing-duration>
    <meta:editing-cycles>50</meta:editing-cycles>
    <meta:generator>LibreOffice/26.2.2.2$Linux_X86_64 LibreOffice_project/620$Build-2</meta:generator>
    <meta:print-date>2026-05-12T15:18:12.142163034</meta:print-date>
    <meta:printed-by>PDF files</meta:printed-by>
    <meta:document-statistic meta:object-count="180"/>
  </office:meta>
</office:document-meta>
</file>

<file path=Object 1/content.xml><?xml version="1.0" encoding="utf-8"?>
<math xmlns="http://www.w3.org/1998/Math/MathML" display="block">
  <semantics>
    <mrow>
      <mrow>
        <mi>H</mi>
        <mo stretchy="false">=</mo>
        <mrow>
          <msubsup>
            <mo stretchy="false">∑</mo>
            <mrow>
              <mi>i</mi>
              <mo stretchy="false">=</mo>
              <mn>1</mn>
            </mrow>
            <mrow>
              <mi>N</mi>
              <mo stretchy="false">−</mo>
              <mn>1</mn>
            </mrow>
          </msubsup>
          <mi>cos</mi>
        </mrow>
      </mrow>
      <mi>θ</mi>
      <msub>
        <mi>S</mi>
        <mi>i</mi>
      </msub>
      <mrow>
        <msub>
          <mi>S</mi>
          <mrow>
            <mi>i</mi>
            <mo stretchy="false">+</mo>
            <mn>1</mn>
          </mrow>
        </msub>
        <mo stretchy="false">+</mo>
        <mi>sin</mi>
      </mrow>
      <mi>θ</mi>
      <msup>
        <mrow>
          <mo fence="true" form="prefix" stretchy="false">(</mo>
          <mrow>
            <mrow>
              <msub>
                <mi>S</mi>
                <mi>i</mi>
              </msub>
              <msub>
                <mi>S</mi>
                <mrow>
                  <mi>i</mi>
                  <mo stretchy="false">+</mo>
                  <mn>1</mn>
                </mrow>
              </msub>
            </mrow>
          </mrow>
          <mo fence="true" form="postfix" stretchy="false">)</mo>
        </mrow>
        <mn>2</mn>
      </msup>
    </mrow>
    <annotation encoding="StarMath 5.0">H = sum_{i=1}^{N-1} cos %theta S_i S_{i+1} + sin %theta (S_i S_{i+1})^2 </annotation>
  </semantics>
</math>
</file>

<file path=Object 10/content.xml><?xml version="1.0" encoding="utf-8"?>
<math xmlns="http://www.w3.org/1998/Math/MathML" display="block">
  <semantics>
    <mrow>
      <mfrac>
        <mi>π</mi>
        <mn>4</mn>
      </mfrac>
      <mo stretchy="false">&lt;</mo>
      <mi>θ</mi>
      <mo stretchy="false">&lt;</mo>
      <mfrac>
        <mi>π</mi>
        <mn>2</mn>
      </mfrac>
    </mrow>
    <annotation encoding="StarMath 5.0">frac{%pi}{4} &lt;%theta &lt; frac{%pi}{2}</annotation>
  </semantics>
</math>
</file>

<file path=Object 11/content.xml><?xml version="1.0" encoding="utf-8"?>
<math xmlns="http://www.w3.org/1998/Math/MathML" display="block">
  <semantics>
    <mrow>
      <mi>θ</mi>
      <mo stretchy="false">=</mo>
      <mn>1.217</mn>
    </mrow>
    <annotation encoding="StarMath 5.0">%theta = 1.217</annotation>
  </semantics>
</math>
</file>

<file path=Object 12/content.xml><?xml version="1.0" encoding="utf-8"?>
<math xmlns="http://www.w3.org/1998/Math/MathML" display="block">
  <semantics>
    <mrow>
      <mrow>
        <mo stretchy="false">∫</mo>
        <msub>
          <mi>p</mi>
          <mi>θ</mi>
        </msub>
      </mrow>
      <mrow>
        <mo fence="true" form="prefix" stretchy="false">(</mo>
        <mrow>
          <mrow>
            <mi>x</mi>
            <mi>,</mi>
            <mi>z</mi>
          </mrow>
        </mrow>
        <mo fence="true" form="postfix" stretchy="false">)</mo>
      </mrow>
      <mi mathvariant="italic">dz</mi>
    </mrow>
    <annotation encoding="StarMath 5.0">int p_%theta (x,z)dz</annotation>
  </semantics>
</math>
</file>

<file path=Object 13/content.xml><?xml version="1.0" encoding="utf-8"?>
<math xmlns="http://www.w3.org/1998/Math/MathML" display="block">
  <semantics>
    <mrow>
      <mrow>
        <mo stretchy="false">−</mo>
        <mfrac>
          <mi>π</mi>
          <mn>4</mn>
        </mfrac>
      </mrow>
      <mo stretchy="false">&lt;</mo>
      <mi>θ</mi>
      <mo stretchy="false">&lt;</mo>
      <mfrac>
        <mi>π</mi>
        <mn>4</mn>
      </mfrac>
    </mrow>
    <annotation encoding="StarMath 5.0">-frac {%pi} {4} &lt; %theta &lt; frac{%pi}{4}</annotation>
  </semantics>
</math>
</file>

<file path=Object 14/content.xml><?xml version="1.0" encoding="utf-8"?>
<math xmlns="http://www.w3.org/1998/Math/MathML" display="block">
  <semantics>
    <mrow>
      <msub>
        <mtext>RC</mtext>
        <mtext>Schoulepnikoff2025</mtext>
      </msub>
      <mo stretchy="false">=</mo>
      <mn>16.536491597330663</mn>
    </mrow>
    <annotation encoding="StarMath 5.0">"RC"_{"Schoulepnikoff2025"} = 16.536491597330663</annotation>
  </semantics>
</math>
</file>

<file path=Object 15/content.xml><?xml version="1.0" encoding="utf-8"?>
<math xmlns="http://www.w3.org/1998/Math/MathML" display="block">
  <semantics>
    <mrow>
      <mi>θ</mi>
      <mo stretchy="false">=</mo>
      <mn>1.817</mn>
    </mrow>
    <annotation encoding="StarMath 5.0">%theta=1.817</annotation>
  </semantics>
</math>
</file>

<file path=Object 16/content.xml><?xml version="1.0" encoding="utf-8"?>
<math xmlns="http://www.w3.org/1998/Math/MathML" display="block">
  <semantics>
    <mrow>
      <mi>θ</mi>
      <mo stretchy="false">=</mo>
      <mrow>
        <mo stretchy="false">−</mo>
        <mn>1.483</mn>
      </mrow>
    </mrow>
    <annotation encoding="StarMath 5.0">%theta=-1.483</annotation>
  </semantics>
</math>
</file>

<file path=Object 17/content.xml><?xml version="1.0" encoding="utf-8"?>
<math xmlns="http://www.w3.org/1998/Math/MathML" display="block">
  <semantics>
    <mrow>
      <mfrac>
        <mi>π</mi>
        <mn>2</mn>
      </mfrac>
      <mo stretchy="false">&lt;</mo>
      <mi>θ</mi>
    </mrow>
    <annotation encoding="StarMath 5.0">frac{%pi}{2} &lt; %theta</annotation>
  </semantics>
</math>
</file>

<file path=Object 18/content.xml><?xml version="1.0" encoding="utf-8"?>
<math xmlns="http://www.w3.org/1998/Math/MathML" display="block">
  <semantics>
    <mrow>
      <mi>θ</mi>
      <mo stretchy="false">=</mo>
      <mn>0.017</mn>
    </mrow>
    <annotation encoding="StarMath 5.0">%theta = 0.017</annotation>
  </semantics>
</math>
</file>

<file path=Object 19/content.xml><?xml version="1.0" encoding="utf-8"?>
<math xmlns="http://www.w3.org/1998/Math/MathML" display="block">
  <semantics>
    <mrow>
      <msub>
        <mtext>RC</mtext>
        <mtext>generalized</mtext>
      </msub>
      <mo stretchy="false">=</mo>
      <mn>16.536491603325125</mn>
    </mrow>
    <annotation encoding="StarMath 5.0">"RC"_{"generalized"} = 16.536491603325125</annotation>
  </semantics>
</math>
</file>

<file path=Object 2/content.xml><?xml version="1.0" encoding="utf-8"?>
<math xmlns="http://www.w3.org/1998/Math/MathML" display="block">
  <semantics>
    <mrow>
      <msub>
        <mi>C</mi>
        <mi mathvariant="italic">STG</mi>
      </msub>
      <mrow>
        <mo fence="true" form="prefix" stretchy="false">(</mo>
        <mrow>
          <mi>r</mi>
        </mrow>
        <mo fence="true" form="postfix" stretchy="false">)</mo>
      </mrow>
    </mrow>
    <annotation encoding="StarMath 5.0">C_{STG}(r)</annotation>
  </semantics>
</math>
</file>

<file path=Object 3/content.xml><?xml version="1.0" encoding="utf-8"?>
<math xmlns="http://www.w3.org/1998/Math/MathML" display="block">
  <semantics>
    <mrow>
      <mo fence="true" form="prefix" stretchy="false">⟨</mo>
      <mrow>
        <mover accent="true">
          <msubsup>
            <mi>S</mi>
            <mi>i</mi>
            <mi>z</mi>
          </msubsup>
          <mo stretchy="false">^</mo>
        </mover>
      </mrow>
      <mo fence="true" form="postfix" stretchy="false">⟩</mo>
    </mrow>
    <annotation encoding="StarMath 5.0">langle hat{S}^z_i rangle </annotation>
  </semantics>
</math>
</file>

<file path=Object 4/content.xml><?xml version="1.0" encoding="utf-8"?>
<math xmlns="http://www.w3.org/1998/Math/MathML" display="block">
  <semantics>
    <mrow>
      <mrow>
        <mi>H</mi>
        <mo stretchy="false">=</mo>
        <mrow>
          <msubsup>
            <mo stretchy="false">∑</mo>
            <mrow>
              <mi>i</mi>
              <mo stretchy="false">=</mo>
              <mn>1</mn>
            </mrow>
            <mrow>
              <mi>N</mi>
              <mo stretchy="false">−</mo>
              <mn>1</mn>
            </mrow>
          </msubsup>
          <mi>cos</mi>
        </mrow>
      </mrow>
      <mi>θ</mi>
      <msub>
        <mi>S</mi>
        <mi>i</mi>
      </msub>
      <mrow>
        <msub>
          <mi>S</mi>
          <mrow>
            <mi>i</mi>
            <mo stretchy="false">+</mo>
            <mn>1</mn>
          </mrow>
        </msub>
        <mo stretchy="false">+</mo>
        <mi>sin</mi>
      </mrow>
      <mi>θ</mi>
      <msup>
        <mrow>
          <mo fence="true" form="prefix" stretchy="false">(</mo>
          <mrow>
            <mrow>
              <msub>
                <mi>S</mi>
                <mi>i</mi>
              </msub>
              <msub>
                <mi>S</mi>
                <mrow>
                  <mi>i</mi>
                  <mo stretchy="false">+</mo>
                  <mn>1</mn>
                </mrow>
              </msub>
            </mrow>
          </mrow>
          <mo fence="true" form="postfix" stretchy="false">)</mo>
        </mrow>
        <mn>2</mn>
      </msup>
    </mrow>
    <annotation encoding="StarMath 5.0">H = sum_{i=1}^{N-1} cos %theta S_i S_{i+1} + sin %theta (S_i S_{i+1})^2 </annotation>
  </semantics>
</math>
</file>

<file path=Object 5/content.xml><?xml version="1.0" encoding="utf-8"?>
<math xmlns="http://www.w3.org/1998/Math/MathML" display="block">
  <semantics>
    <msub>
      <mi>O</mi>
      <mi mathvariant="italic">STG</mi>
    </msub>
    <annotation encoding="StarMath 5.0">O_STG</annotation>
  </semantics>
</math>
</file>

<file path=Object 6/content.xml><?xml version="1.0" encoding="utf-8"?>
<math xmlns="http://www.w3.org/1998/Math/MathML" display="block">
  <semantics>
    <mrow>
      <mi>C</mi>
      <mrow>
        <mrow>
          <mo fence="true" form="prefix" stretchy="false">(</mo>
          <mrow>
            <mi>r</mi>
          </mrow>
          <mo fence="true" form="postfix" stretchy="false">)</mo>
        </mrow>
        <mo stretchy="false">=</mo>
        <mi>C</mi>
      </mrow>
      <mrow>
        <mo fence="true" form="prefix" stretchy="false">(</mo>
        <mrow>
          <mrow>
            <mrow>
              <mi>i</mi>
              <mo stretchy="false">=</mo>
              <mn>1</mn>
            </mrow>
            <mi>,</mi>
            <mrow>
              <mi>j</mi>
              <mo stretchy="false">=</mo>
              <mrow>
                <mi>i</mi>
                <mo stretchy="false">+</mo>
                <mi>r</mi>
              </mrow>
            </mrow>
          </mrow>
        </mrow>
        <mo fence="true" form="postfix" stretchy="false">)</mo>
      </mrow>
    </mrow>
    <annotation encoding="StarMath 5.0">C(r) = C(i=1, j=i+r)</annotation>
  </semantics>
</math>
</file>

<file path=Object 7/content.xml><?xml version="1.0" encoding="utf-8"?>
<math xmlns="http://www.w3.org/1998/Math/MathML" display="block">
  <semantics>
    <mrow>
      <mrow>
        <mi>O</mi>
        <mo stretchy="false">=</mo>
        <mi>C</mi>
      </mrow>
      <mrow>
        <mrow>
          <mo fence="true" form="prefix" stretchy="false">(</mo>
          <mrow>
            <mrow>
              <mi>r</mi>
              <mo stretchy="false">=</mo>
              <msub>
                <mi>r</mi>
                <mi mathvariant="italic">max</mi>
              </msub>
            </mrow>
          </mrow>
          <mo fence="true" form="postfix" stretchy="false">)</mo>
        </mrow>
        <mo stretchy="false">=</mo>
        <mi>C</mi>
      </mrow>
      <mrow>
        <mo fence="true" form="prefix" stretchy="false">(</mo>
        <mrow>
          <mrow>
            <mrow>
              <mi>i</mi>
              <mo stretchy="false">=</mo>
              <mn>1</mn>
            </mrow>
            <mi>,</mi>
            <mrow>
              <mi>j</mi>
              <mo stretchy="false">=</mo>
              <mi>N</mi>
            </mrow>
          </mrow>
        </mrow>
        <mo fence="true" form="postfix" stretchy="false">)</mo>
      </mrow>
    </mrow>
    <annotation encoding="StarMath 5.0">O = C(r=r_{max}) =C(i=1,j=N)</annotation>
  </semantics>
</math>
</file>

<file path=Object 8/content.xml><?xml version="1.0" encoding="utf-8"?>
<math xmlns="http://www.w3.org/1998/Math/MathML" display="block">
  <semantics>
    <mrow>
      <msub>
        <mi>E</mi>
        <mn>0</mn>
      </msub>
      <mo stretchy="false">/</mo>
      <mi>N</mi>
    </mrow>
    <annotation encoding="StarMath 5.0">E_0/N</annotation>
  </semantics>
</math>
</file>

<file path=Object 9/content.xml><?xml version="1.0" encoding="utf-8"?>
<math xmlns="http://www.w3.org/1998/Math/MathML" display="block">
  <semantics>
    <mrow>
      <mrow>
        <mi>H</mi>
        <mo stretchy="false">=</mo>
        <mrow>
          <msubsup>
            <mo stretchy="false">∑</mo>
            <mrow>
              <mi>i</mi>
              <mo stretchy="false">=</mo>
              <mn>1</mn>
            </mrow>
            <mrow>
              <mi>N</mi>
              <mo stretchy="false">−</mo>
              <mn>1</mn>
            </mrow>
          </msubsup>
          <mi>cos</mi>
        </mrow>
      </mrow>
      <mi>θ</mi>
      <msub>
        <mi>S</mi>
        <mi>i</mi>
      </msub>
      <mrow>
        <msub>
          <mi>S</mi>
          <mrow>
            <mi>i</mi>
            <mo stretchy="false">+</mo>
            <mn>1</mn>
          </mrow>
        </msub>
        <mo stretchy="false">+</mo>
        <mi>sin</mi>
      </mrow>
      <mi>θ</mi>
      <msup>
        <mrow>
          <mo fence="true" form="prefix" stretchy="false">(</mo>
          <mrow>
            <mrow>
              <msub>
                <mi>S</mi>
                <mi>i</mi>
              </msub>
              <msub>
                <mi>S</mi>
                <mrow>
                  <mi>i</mi>
                  <mo stretchy="false">+</mo>
                  <mn>1</mn>
                </mrow>
              </msub>
            </mrow>
          </mrow>
          <mo fence="true" form="postfix" stretchy="false">)</mo>
        </mrow>
        <mn>2</mn>
      </msup>
    </mrow>
    <annotation encoding="StarMath 5.0">H = sum_{i=1}^{N-1} cos %theta S_i S_{i+1} + sin %theta (S_i S_{i+1})^2 </annotation>
  </semantics>
</math>
</file>